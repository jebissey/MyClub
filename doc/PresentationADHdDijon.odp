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0000005DA000002D131697D51.png" manifest:media-type="image/png"/>
  <manifest:file-entry manifest:full-path="Pictures/100000000000036A000003C4019461C3.png" manifest:media-type="image/png"/>
  <manifest:file-entry manifest:full-path="Pictures/10000000000002C100000415A2CF1560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78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outline1">
      <style:graphic-properties draw:textarea-horizontal-align="center" fo:min-height="11.929cm" loext:decorative="false"/>
      <style:paragraph-properties style:writing-mode="lr-tb"/>
    </style:style>
    <style:style style:name="pr8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text-properties fo:font-size="96pt" style:font-size-asian="96pt" style:font-size-complex="96pt"/>
    </style:style>
    <style:style style:name="P2" style:family="paragraph">
      <loext:graphic-properties draw:fill-color="#ffffff"/>
      <style:text-properties fo:color="#ffffff" loext:opacity="100%" fo:font-size="96pt" style:font-size-asian="96pt" style:font-size-complex="96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margin-left="0cm" fo:margin-right="0cm" fo:margin-top="0.42cm" fo:margin-bottom="0.35cm" fo:text-align="start" fo:text-indent="0cm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ffffff" loext:opacity="100%" fo:font-size="96pt" style:font-size-asian="96pt" style:font-size-complex="9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786cm" svg:x="1.4cm" svg:y="2.157cm" presentation:class="title" presentation:user-transformed="true">
          <draw:text-box>
            <text:p><text:span text:style-name="T1">MyClub</text:span>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<text:span text:style-name="T2">Amis des Hauts de Dij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5" draw:layer="layout" svg:width="25.199cm" svg:height="2.63cm" svg:x="1.4cm" svg:y="0.627cm" presentation:class="title" presentation:user-transformed="true">
          <draw:text-box>
            <text:p text:style-name="P4"><text:span text:style-name="T3">Pourquoi MyClub ?</text:span></text:p>
          </draw:text-box>
        </draw:frame>
        <draw:frame presentation:style-name="pr5" draw:layer="layout" svg:width="25.199cm" svg:height="11.5cm" svg:x="1.4cm" svg:y="3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  <text:list-item>
                <text:p text:style-name="P6"><text:span text:style-name="T5">Outil conçu pour les associations</text:span></text:p>
              </text:list-item>
              <text:list-item>
                <text:p text:style-name="P6"><text:span text:style-name="T5">Interface simple pour les membres et visiteurs</text:span></text:p>
              </text:list-item>
              <text:list-item>
                <text:p text:style-name="P6"><text:span text:style-name="T5">Gestion des membres avec des groupes pour les autorisations</text:span></text:p>
              </text:list-item>
              <text:list-item>
                <text:p text:style-name="P6"><text:span text:style-name="T5">Publication d’articles et d’événements</text:span></text:p>
              </text:list-item>
              <text:list-item>
                <text:p text:style-name="P6"><text:span text:style-name="T5">Accès différenciés selon les rôles</text:span></text:p>
              </text:list-item>
              <text:list-item>
                <text:p text:style-name="P6"><text:span text:style-name="T5">Centralisation des informations</text:span></text:p>
              </text:list-item>
            </text:list>
            <text:p text:style-name="P6"><text:span text:style-name="T5">👉 <text:s/>Un seul outil pour organiser la vie de l’association</text:span></text:p>
            <text:p text:style-name="P6"><text:span text:style-name="T6"><text:a xlink:href="https://myclub.ovh/article/9" xlink:type="simple">https://myclub.ovh/article/9</text:a></text:span></text:p>
            <text:p text:style-name="P6"><text:span text:style-name="T6"><text:a xlink:href="https://myclub.ovh/article/57" xlink:type="simple">https://myclub.ovh/article/57</text:a></text:span></text:p>
            <text:p text:style-name="P6"><text:span text:style-name="T6"><text:a xlink:href="https://myclub.ovh/article/62" xlink:type="simple">https://myclub.ovh/article/62</text:a></text:span></text:p>
            <text:p text:style-name="P6"><text:span text:style-name="T6"/></text:p>
            <text:p text:style-name="P6"><text:span text:style-name="T5"/></text:p>
            <text:list text:continue-numbering="true" text:style-name="L2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5" draw:layer="layout" svg:width="25.199cm" svg:height="2.63cm" svg:x="1.4cm" svg:y="0.627cm" presentation:class="title" presentation:user-transformed="true">
          <draw:text-box>
            <text:p text:style-name="P4"><text:span text:style-name="T3">Un outil qui évolue avec vos besoins</text:span>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p text:style-name="P6"><text:span text:style-name="T5">MyClub n’est pas une webapp figée.</text:span></text:p>
            <text:p text:style-name="P6"><text:span text:style-name="T5">Nouvelles fonctionnalités possibles selon vos usages :</text:span></text:p>
            <text:list text:continue-numbering="true" text:style-name="L2">
              <text:list-item>
                <text:p text:style-name="P6"><text:span text:style-name="T5">gestion d’événements</text:span></text:p>
              </text:list-item>
              <text:list-item>
                <text:p text:style-name="P6"><text:span text:style-name="T5">communication interne</text:span></text:p>
              </text:list-item>
              <text:list-item>
                <text:p text:style-name="P6"><text:span text:style-name="T5">documents adhérents</text:span></text:p>
              </text:list-item>
              <text:list-item>
                <text:p text:style-name="P6"><text:span text:style-name="T5">automatisations</text:span></text:p>
              </text:list-item>
              <text:list-item>
                <text:p text:style-name="P6"><text:span text:style-name="T5">nouveaux modules selon les besoins</text:span></text:p>
              </text:list-item>
            </text:list>
            <text:p text:style-name="P6"><text:span text:style-name="T5">👉 Le site s’adapte à l’association, pas l’inverse</text:span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Exemple concret : commandes groupées</text:span></text:p>
          </draw:text-box>
        </draw:frame>
        <draw:frame presentation:style-name="pr5" draw:layer="layout" svg:width="25.199cm" svg:height="10.815cm" svg:x="1.5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p text:style-name="P6"><text:span text:style-name="T5">Nouveau module ajouté récemment pour ADA21 :</text:span></text:p>
            <text:list text:continue-numbering="true" text:style-name="L2">
              <text:list-item>
                <text:p text:style-name="P6"><text:span text:style-name="T5">organisation de commandes groupées</text:span></text:p>
              </text:list-item>
              <text:list-item>
                <text:p text:style-name="P6"><text:span text:style-name="T5">suivi des demandes individuelles</text:span></text:p>
              </text:list-item>
              <text:list-item>
                <text:p text:style-name="P6"><text:span text:style-name="T5">centralisation des demandes</text:span></text:p>
              </text:list-item>
              <text:list-item>
                <text:p text:style-name="P6"><text:span text:style-name="T5">simplification du travail des bénévoles</text:span></text:p>
              </text:list-item>
            </text:list>
            <text:p text:style-name="P6"><text:span text:style-name="T5">Tutoriel vidéo disponible :</text:span></text:p>
            <text:p text:style-name="P6"><text:span text:style-name="T5"><text:a xlink:href="https://myclub.alwaysdata.net/article/61" xlink:type="simple">https://myclub.alwaysdata.net/article/61</text:a></text:span></text:p>
            <text:p text:style-name="P6"><text:span text:style-name="T5">👉 Exemple concret d’évolution basée sur vos besoins réels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Maquette déjà disponible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p text:style-name="P8"><text:span text:style-name="T6"><text:a xlink:href="https://amis-hauts-dijon.alwaysdata.net/" xlink:type="simple">https://amis-hauts-dijon.alwaysdata.net/</text:a></text:span></text:p>
            <text:list text:style-name="L2">
              <text:list-item>
                <text:p text:style-name="P4"><text:span text:style-name="T5">Reprise d’une partie du contenu existant sur</text:span></text:p>
              </text:list-item>
            </text:list>
            <text:p text:style-name="P4"><text:span text:style-name="T5"><text:a xlink:href="http://les.amis.hauts.dijon.free.fr/" xlink:type="simple">http://les.amis.hauts.dijon.free.fr/</text:a></text:span></text:p>
            <text:p text:style-name="P6"><text:span text:style-name="T5">Bêta-testeurs</text:span></text:p>
            <text:p text:style-name="P6"><text:span text:style-name="T5">👉 Pour définir ensemble la configuration de MyClub pour « Les amis des hauts de Dijon »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groupes et membres avec autorisations</text:span></text:p>
          </draw:text-box>
        </draw:frame>
        <draw:frame presentation:style-name="pr7" draw:text-style-name="P10" draw:layer="layout" svg:width="24.5cm" svg:height="1cm" svg:x="1.5cm" svg:y="13cm" presentation:class="outline" presentation:user-transformed="true">
          <draw:text-box>
            <text:p text:style-name="P9"><text:span text:style-name="T5">A compléter / modifier</text:span></text:p>
          </draw:text-box>
        </draw:frame>
        <draw:frame draw:style-name="gr2" draw:text-style-name="P11" draw:layer="layout" svg:width="7.439cm" svg:height="11.028cm" svg:x="2.061cm" svg:y="2.713cm">
          <draw:image xlink:href="Pictures/10000000000002C100000415A2CF15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types d’événement + attributs</text:span></text:p>
          </draw:text-box>
        </draw:frame>
        <draw:frame presentation:style-name="pr7" draw:text-style-name="P10" draw:layer="layout" svg:width="24.5cm" svg:height="1cm" svg:x="1.5cm" svg:y="13.5cm" presentation:class="outline" presentation:user-transformed="true">
          <draw:text-box>
            <text:p text:style-name="P9"><text:span text:style-name="T5">A compléter / modifier</text:span></text:p>
          </draw:text-box>
        </draw:frame>
        <draw:frame draw:style-name="gr2" draw:text-style-name="P11" draw:layer="layout" svg:width="9.067cm" svg:height="10cm" svg:x="8.998cm" svg:y="3cm">
          <draw:image xlink:href="Pictures/100000000000036A000003C4019461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besoins des événements</text:span></text:p>
          </draw:text-box>
        </draw:frame>
        <draw:frame presentation:style-name="pr7" draw:text-style-name="P10" draw:layer="layout" svg:width="24.5cm" svg:height="1cm" svg:x="1.5cm" svg:y="13.5cm" presentation:class="outline" presentation:user-transformed="true">
          <draw:text-box>
            <text:p text:style-name="P9"><text:span text:style-name="T5">A compléter / modifier</text:span></text:p>
          </draw:text-box>
        </draw:frame>
        <draw:frame draw:style-name="gr2" draw:text-style-name="P11" draw:layer="layout" svg:width="22.109cm" svg:height="10.641cm" svg:x="3cm" svg:y="2.859cm">
          <draw:image xlink:href="Pictures/10000000000005DA000002D131697D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Qui fait quoi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Reprise du contenu existant...</text:span></text:p>
              </text:list-item>
              <text:list-item>
                <text:p text:style-name="P4"><text:span text:style-name="T5">Définir groupes, types d’événement, besoins …</text:span></text:p>
              </text:list-item>
              <text:list-item>
                <text:p text:style-name="P4"><text:span text:style-name="T5">Rédaction des articles</text:span></text:p>
              </text:list-item>
              <text:list-item>
                <text:p text:style-name="P4"><text:span text:style-name="T5">Gestion des sondages</text:span></text:p>
              </text:list-item>
              <text:list-item>
                <text:p text:style-name="P4"><text:span text:style-name="T5">Gestion des commandes groupées</text:span></text:p>
              </text:list-item>
              <text:list-item>
                <text:p text:style-name="P4"><text:span text:style-name="T5">Création des événements</text:span></text:p>
              </text:list-item>
              <text:list-item>
                <text:p text:style-name="P4"><text:span text:style-name="T5">...</text:span></text:p>
              </text:list-item>
            </text:list>
            <text:p text:style-name="P6"><text:span text:style-name="T6"/></text:p>
            <text:p text:style-name="P6"><text:span text:style-name="T5"/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Qu’est ce qui fonctionne déjà ? TOUT !</text:span></text:p>
          </draw:text-box>
        </draw:frame>
        <draw:frame presentation:style-name="pr5" draw:layer="layout" svg:width="25.199cm" svg:height="10.815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Connexion des membres (il suffit d’ajouter leurs courriels)</text:span></text:p>
              </text:list-item>
              <text:list-item>
                <text:p text:style-name="P4"><text:span text:style-name="T5">Les messages, le trombinoscope, ...</text:span></text:p>
              </text:list-item>
              <text:list-item>
                <text:p text:style-name="P4"><text:span text:style-name="T5">Gestion des événements </text:span></text:p>
              </text:list-item>
              <text:list-item>
                <text:p text:style-name="P4"><text:span text:style-name="T5">Gestion des sondages</text:span></text:p>
              </text:list-item>
              <text:list-item>
                <text:p text:style-name="P4"><text:span text:style-name="T5">Gestion des commandes groupées</text:span></text:p>
              </text:list-item>
              <text:list-item>
                <text:p text:style-name="P4"><text:span text:style-name="T5">Création des articles</text:span></text:p>
              </text:list-item>
              <text:list-item>
                <text:p text:style-name="P4"><text:span text:style-name="T5">...</text:span></text:p>
              </text:list-item>
            </text:list>
            <text:p text:style-name="P6"><text:span text:style-name="T6"/></text:p>
            <text:p text:style-name="P6"><text:span text:style-name="T5">Bêta-testeurs</text:span></text:p>
            <text:p text:style-name="P6"><text:span text:style-name="T5">👉 Pour tester avec un nombre limité de membres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Qui l’utilise déjà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<text:a xlink:href="https://bnw-dijon.fr/" xlink:type="simple">https://bnw-dijon.fr/</text:a></text:span><text:span text:style-name="T5"> : association de marche nordique</text:span></text:p>
              </text:list-item>
              <text:list-item>
                <text:p text:style-name="P4"><text:span text:style-name="T5"><text:a xlink:href="https://myclub.ovh/" xlink:type="simple">https://myclub.ovh</text:a></text:span><text:span text:style-name="T5"> : le site qui présente MyClub</text:span></text:p>
              </text:list-item>
              <text:list-item>
                <text:p text:style-name="P4"><text:span text:style-name="T5"><text:a xlink:href="https://jeblog.alwaysdata.net/" xlink:type="simple">https://jeblog.alwaysdata.net/</text:a></text:span><text:span text:style-name="T5"><text:s/>: ma mémoire numérique externe 😉 </text:span></text:p>
              </text:list-item>
              <text:list-item>
                <text:p text:style-name="P4"><text:span text:style-name="T5"><text:a xlink:href="https://bnw.alwaysdata.net/" xlink:type="simple">https://bnw.alwaysdata.net/</text:a></text:span><text:span text:style-name="T5"> : la maquette pour BNW</text:span></text:p>
              </text:list-item>
              <text:list-item>
                <text:p text:style-name="P4"><text:span text:style-name="T5"><text:a xlink:href="https://ada21.alwaysdata.net/" xlink:type="simple">https://ada21.alwaysdata.net/</text:a></text:span><text:span text:style-name="T5"> : la maquette pour ADA21</text:span></text:p>
              </text:list-item>
              <text:list-item>
                <text:p text:style-name="P4"><text:span text:style-name="T5"><text:a xlink:href="https://testmyclub.alwaysdata.net/" xlink:type="simple">https://testmyclub.alwaysdata.net/</text:a></text:span><text:span text:style-name="T5"> : pour tester MyClub</text:span></text:p>
              </text:list-item>
              <text:list-item>
                <text:p text:style-name="P4"><text:span text:style-name="T5"><text:a xlink:href="https://mychess.alwaysdata.net/" xlink:type="simple">https://mychess.alwaysdata.net/</text:a></text:span><text:span text:style-name="T5"> : pour organiser des tournois d’échecs (wip)</text:span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>Et prochainement … : le site d’une association de quartier 😃</text:span></text:p>
              </text:list-item>
            </text:list>
            <text:p text:style-name="P6"><text:span text:style-name="T5"/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print_20_Plans">
        <draw:frame presentation:style-name="pr8" draw:text-style-name="P12" draw:layer="layout" svg:width="19.999cm" svg:height="2.63cm" svg:x="6.6cm" svg:y="6.6cm" presentation:class="title" presentation:user-transformed="true">
          <draw:text-box>
            <text:p><text:span text:style-name="T8">This work is licensed under a Creative Commons Attribution-ShareAlike 3.0 Unported License.</text:span><text:span text:style-name="T8"><text:line-break/></text:span><text:span text:style-name="T8">It makes use of the works of Mateus Machado Luna.</text:span></text:p>
          </draw:text-box>
        </draw:frame>
        <draw:frame draw:style-name="gr3" draw:text-style-name="P11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7:06:36.992820230</meta:creation-date>
    <meta:editing-duration>PT4H15M20S</meta:editing-duration>
    <meta:editing-cycles>30</meta:editing-cycles>
    <meta:generator>LibreOffice/25.2.3.2$Linux_X86_64 LibreOffice_project/520$Build-2</meta:generator>
    <dc:title>Blueprint Plans</dc:title>
    <dc:date>2026-05-03T14:43:23.102954844</dc:date>
    <meta:print-date>2026-05-03T14:34:27.395091897</meta:print-date>
    <meta:printed-by>Fichiers PDF</meta:printed-by>
    <meta:document-statistic meta:object-count="106"/>
  </office:meta>
</office:document-meta>
</file>