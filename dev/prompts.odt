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1288f26"/>
    </style:style>
    <style:style style:name="P4" style:family="paragraph" style:parent-style-name="Text_20_body">
      <style:text-properties officeooo:rsid="014a3d37" officeooo:paragraph-rsid="014a3d37"/>
    </style:style>
    <style:style style:name="P5" style:family="paragraph" style:parent-style-name="Heading_20_2">
      <style:text-properties officeooo:rsid="01374366" officeooo:paragraph-rsid="01374366"/>
    </style:style>
    <style:style style:name="P6" style:family="paragraph" style:parent-style-name="Text_20_body">
      <style:text-properties officeooo:rsid="01400646" officeooo:paragraph-rsid="01400646"/>
    </style:style>
    <style:style style:name="P7" style:family="paragraph" style:parent-style-name="Text_20_body">
      <style:text-properties officeooo:rsid="012aff9d" officeooo:paragraph-rsid="012aff9d"/>
    </style:style>
    <style:style style:name="P8" style:family="paragraph" style:parent-style-name="Heading_20_2">
      <style:text-properties officeooo:rsid="013b4873" officeooo:paragraph-rsid="013b4873"/>
    </style:style>
    <style:style style:name="P9" style:family="paragraph" style:parent-style-name="Text_20_body">
      <style:text-properties officeooo:rsid="013b4873" officeooo:paragraph-rsid="013b4873"/>
    </style:style>
    <style:style style:name="P10" style:family="paragraph" style:parent-style-name="Heading_20_3">
      <style:text-properties officeooo:paragraph-rsid="013b4873"/>
    </style:style>
    <style:style style:name="P11" style:family="paragraph" style:parent-style-name="Code">
      <style:text-properties officeooo:paragraph-rsid="01436614"/>
    </style:style>
    <style:style style:name="P12" style:family="paragraph" style:parent-style-name="Heading_20_3">
      <style:text-properties officeooo:rsid="0147f793" officeooo:paragraph-rsid="0147f793"/>
    </style:style>
    <style:style style:name="P13" style:family="paragraph" style:parent-style-name="Heading_20_2">
      <style:text-properties officeooo:rsid="013da5e2" officeooo:paragraph-rsid="013da5e2"/>
    </style:style>
    <style:style style:name="P14" style:family="paragraph" style:parent-style-name="Text_20_body">
      <style:text-properties officeooo:rsid="013da5e2" officeooo:paragraph-rsid="013da5e2"/>
    </style:style>
    <style:style style:name="P15" style:family="paragraph" style:parent-style-name="Text_20_body">
      <style:text-properties officeooo:rsid="0138c0e7" officeooo:paragraph-rsid="0138c0e7"/>
    </style:style>
    <style:style style:name="P16" style:family="paragraph" style:parent-style-name="Standard">
      <style:text-properties fo:color="#777777" loext:opacity="100%" style:font-name="Droid Sans Mono" fo:font-size="10.5pt" fo:font-weight="normal" officeooo:paragraph-rsid="01374366" fo:background-color="#f5f5f5"/>
    </style:style>
    <style:style style:name="P17" style:family="paragraph" style:parent-style-name="Standard">
      <style:paragraph-properties style:line-height-at-least="0.503cm"/>
    </style:style>
    <style:style style:name="P18"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19"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20" style:family="paragraph" style:parent-style-name="Text_20_body">
      <style:text-properties officeooo:paragraph-rsid="01374366"/>
    </style:style>
    <style:style style:name="P21" style:family="paragraph" style:parent-style-name="Standard">
      <style:text-properties fo:color="#333333" loext:opacity="100%" style:font-name="Droid Sans Mono" fo:font-size="10.5pt" fo:font-weight="normal" officeooo:paragraph-rsid="01374366" fo:background-color="#f5f5f5"/>
    </style:style>
    <style:style style:name="P22" style:family="paragraph" style:parent-style-name="Heading_20_2">
      <style:text-properties officeooo:paragraph-rsid="0145d878"/>
    </style:style>
    <style:style style:name="P23" style:family="paragraph" style:parent-style-name="Heading_20_2">
      <style:text-properties officeooo:paragraph-rsid="0145e616"/>
    </style:style>
    <style:style style:name="P24" style:family="paragraph" style:parent-style-name="Heading_20_2">
      <style:text-properties officeooo:paragraph-rsid="011182ac"/>
    </style:style>
    <style:style style:name="P25" style:family="paragraph" style:parent-style-name="Text_20_body">
      <style:text-properties officeooo:rsid="011182ac" officeooo:paragraph-rsid="011182ac"/>
    </style:style>
    <style:style style:name="P26"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27" style:family="paragraph" style:parent-style-name="Table_20_Contents">
      <style:text-properties fo:font-variant="normal" fo:text-transform="none" fo:color="#000000" loext:opacity="100%" style:font-name="DejaVu Sans Mono" fo:font-size="10pt" fo:font-style="normal" fo:font-weight="normal"/>
    </style:style>
    <style:style style:name="P28" style:family="paragraph" style:parent-style-name="Table_20_Contents">
      <style:text-properties fo:font-size="2pt" style:font-size-asian="2pt" style:font-size-complex="2pt"/>
    </style:style>
    <style:style style:name="P29" style:family="paragraph" style:parent-style-name="Text_20_body">
      <style:text-properties officeooo:rsid="011182ac" officeooo:paragraph-rsid="01132b63"/>
    </style:style>
    <style:style style:name="P30" style:family="paragraph" style:parent-style-name="Text_20_body">
      <style:text-properties officeooo:rsid="01132b63" officeooo:paragraph-rsid="01132b63"/>
    </style:style>
    <style:style style:name="P31" style:family="paragraph" style:parent-style-name="Text_20_body" style:list-style-name="L1">
      <style:text-properties officeooo:rsid="01132b63" officeooo:paragraph-rsid="01132b63"/>
    </style:style>
    <style:style style:name="P32" style:family="paragraph" style:parent-style-name="Heading_20_1">
      <style:text-properties officeooo:rsid="011bbc4e" officeooo:paragraph-rsid="011bbc4e"/>
    </style:style>
    <style:style style:name="P33" style:family="paragraph" style:parent-style-name="Text_20_body">
      <style:text-properties officeooo:rsid="011bbc4e" officeooo:paragraph-rsid="011bbc4e"/>
    </style:style>
    <style:style style:name="P34" style:family="paragraph" style:parent-style-name="Text_20_body">
      <style:text-properties officeooo:rsid="011bbc4e" officeooo:paragraph-rsid="011e34a0"/>
    </style:style>
    <style:style style:name="P35" style:family="paragraph" style:parent-style-name="Text_20_body">
      <style:text-properties officeooo:rsid="011e34a0" officeooo:paragraph-rsid="011e34a0"/>
    </style:style>
    <style:style style:name="P36" style:family="paragraph" style:parent-style-name="Text_20_body">
      <style:text-properties officeooo:rsid="011e5dce" officeooo:paragraph-rsid="011e5dce"/>
    </style:style>
    <style:style style:name="P37" style:family="paragraph" style:parent-style-name="Standard">
      <style:text-properties fo:color="#333333" loext:opacity="100%" style:font-name="Droid Sans Mono1" fo:font-size="10.5pt" fo:font-weight="normal" officeooo:rsid="011e5dce" officeooo:paragraph-rsid="011e5dce" fo:background-color="#f5f5f5"/>
    </style:style>
    <style:style style:name="P38" style:family="paragraph" style:parent-style-name="Standard">
      <style:paragraph-properties fo:margin-left="0cm" fo:margin-right="0cm" style:line-height-at-least="0.503cm" fo:text-indent="0cm" style:auto-text-indent="false"/>
      <style:text-properties fo:color="#333333" loext:opacity="100%" style:font-name="Droid Sans Mono1" fo:font-size="10.5pt" fo:font-weight="normal" fo:background-color="#f5f5f5"/>
    </style:style>
    <style:style style:name="P39" style:family="paragraph" style:parent-style-name="Standard">
      <style:paragraph-properties fo:margin-top="0cm" fo:margin-bottom="0.499cm" style:contextual-spacing="false" style:line-height-at-least="0.503cm"/>
    </style:style>
    <style:style style:name="P40" style:family="paragraph" style:parent-style-name="Heading_20_1">
      <style:text-properties officeooo:rsid="01211cef" officeooo:paragraph-rsid="01211cef"/>
    </style:style>
    <style:style style:name="P41" style:family="paragraph" style:parent-style-name="Text_20_body">
      <style:text-properties officeooo:rsid="01211cef" officeooo:paragraph-rsid="01211cef"/>
    </style:style>
    <style:style style:name="P42" style:family="paragraph" style:parent-style-name="Standard">
      <style:text-properties fo:color="#333333" loext:opacity="100%" style:font-name="Droid Sans Mono1" fo:font-size="10.5pt" fo:font-weight="normal" officeooo:rsid="01211cef" officeooo:paragraph-rsid="01211cef" fo:background-color="#f5f5f5"/>
    </style:style>
    <style:style style:name="P43" style:family="paragraph" style:parent-style-name="Standard">
      <style:paragraph-properties fo:margin-left="0cm" fo:margin-right="0cm" style:line-height-at-least="0.503cm" fo:text-indent="0cm" style:auto-text-indent="false"/>
      <style:text-properties fo:color="#777777" loext:opacity="100%" style:font-name="Droid Sans Mono1" fo:font-size="10.5pt" fo:font-weight="normal" fo:background-color="#f5f5f5"/>
    </style:style>
    <style:style style:name="P44" style:family="paragraph" style:parent-style-name="Standard">
      <style:paragraph-properties fo:margin-left="0cm" fo:margin-right="0cm" style:line-height-at-least="0.503cm" fo:text-indent="0cm" style:auto-text-indent="false"/>
      <style:text-properties fo:color="#333333" loext:opacity="100%" fo:background-color="#f5f5f5"/>
    </style:style>
    <style:style style:name="P45" style:family="paragraph" style:parent-style-name="Standard">
      <style:paragraph-properties fo:margin-left="0cm" fo:margin-right="0cm" style:line-height-at-least="0.503cm" fo:text-indent="0cm" style:auto-text-indent="false"/>
      <style:text-properties fo:color="#aaaaaa" loext:opacity="100%" style:font-name="Droid Sans Mono1" fo:font-size="10.5pt" fo:font-style="italic" fo:font-weight="normal" fo:background-color="#f5f5f5"/>
    </style:style>
    <style:style style:name="P46" style:family="paragraph" style:parent-style-name="Heading_20_1">
      <style:text-properties officeooo:rsid="0121ffd8" officeooo:paragraph-rsid="0121ffd8"/>
    </style:style>
    <style:style style:name="P47" style:family="paragraph" style:parent-style-name="Text_20_body">
      <style:text-properties officeooo:rsid="0121ffd8" officeooo:paragraph-rsid="0121ffd8"/>
    </style:style>
    <style:style style:name="P48" style:family="paragraph" style:parent-style-name="Standard">
      <style:text-properties fo:color="#777777" loext:opacity="100%" style:font-name="Droid Sans Mono" fo:font-size="10.5pt" fo:font-weight="normal" officeooo:rsid="0121ffd8" officeooo:paragraph-rsid="0121ffd8" fo:background-color="#f5f5f5"/>
    </style:style>
    <style:style style:name="P49" style:family="paragraph" style:parent-style-name="Standard">
      <style:paragraph-properties style:line-height-at-least="0.503cm"/>
      <style:text-properties fo:color="#333333" loext:opacity="100%" style:font-name="Droid Sans Mono" fo:font-size="10.5pt" fo:font-weight="normal" fo:background-color="#f5f5f5"/>
    </style:style>
    <style:style style:name="P50" style:family="paragraph" style:parent-style-name="Standard">
      <style:text-properties fo:color="#333333" loext:opacity="100%" style:font-name="Droid Sans Mono" fo:font-size="10.5pt" fo:font-weight="normal" officeooo:rsid="0121ffd8" officeooo:paragraph-rsid="0121ffd8" fo:background-color="#f5f5f5"/>
    </style:style>
    <style:style style:name="P51" style:family="paragraph" style:parent-style-name="Heading_20_1">
      <style:text-properties officeooo:rsid="0147a467" officeooo:paragraph-rsid="0147a467"/>
    </style:style>
    <style:style style:name="P52" style:family="paragraph" style:parent-style-name="Text_20_body">
      <style:text-properties officeooo:rsid="0147a467" officeooo:paragraph-rsid="0147a467"/>
    </style:style>
    <style:style style:name="P53" style:family="paragraph" style:parent-style-name="Standard">
      <style:text-properties fo:color="#777777" loext:opacity="100%" style:font-name="Droid Sans Mono" fo:font-size="10.5pt" fo:font-weight="normal" officeooo:rsid="0147a467" officeooo:paragraph-rsid="0147a467" fo:background-color="#f5f5f5"/>
    </style:style>
    <style:style style:name="P54" style:family="paragraph" style:parent-style-name="Standard">
      <style:paragraph-properties fo:margin-left="0cm" fo:margin-right="0cm" style:line-height-at-least="0.503cm" fo:text-indent="0cm" style:auto-text-indent="false"/>
      <style:text-properties fo:color="#aaaaaa" loext:opacity="100%" style:font-name="Droid Sans Mono" fo:font-size="10.5pt" fo:font-style="italic" fo:font-weight="normal" fo:background-color="#f5f5f5"/>
    </style:style>
    <style:style style:name="P55" style:family="paragraph" style:parent-style-name="Text_20_body">
      <style:text-properties officeooo:rsid="0149e773" officeooo:paragraph-rsid="0149e773"/>
    </style:style>
    <style:style style:name="P56" style:family="paragraph" style:parent-style-name="Standard">
      <style:text-properties fo:color="#333333" loext:opacity="100%" style:font-name="Droid Sans Mono" fo:font-size="10.5pt" fo:font-weight="normal" officeooo:rsid="0149e773" officeooo:paragraph-rsid="0149e773" fo:background-color="#f5f5f5"/>
    </style:style>
    <style:style style:name="P57" style:family="paragraph" style:parent-style-name="Heading_20_1">
      <style:text-properties officeooo:paragraph-rsid="008fbcf1"/>
    </style:style>
    <style:style style:name="P58" style:family="paragraph" style:parent-style-name="Text_20_body">
      <style:text-properties officeooo:paragraph-rsid="008fbcf1"/>
    </style:style>
    <style:style style:name="T1" style:family="text">
      <style:text-properties officeooo:rsid="01190a95"/>
    </style:style>
    <style:style style:name="T2" style:family="text">
      <style:text-properties officeooo:rsid="013a18f6"/>
    </style:style>
    <style:style style:name="T3" style:family="text">
      <style:text-properties officeooo:rsid="0070d7f6"/>
    </style:style>
    <style:style style:name="T4" style:family="text">
      <style:text-properties officeooo:rsid="01327263"/>
    </style:style>
    <style:style style:name="T5" style:family="text">
      <style:text-properties officeooo:rsid="01288f26"/>
    </style:style>
    <style:style style:name="T6" style:family="text">
      <style:text-properties officeooo:rsid="009b6d1b"/>
    </style:style>
    <style:style style:name="T7" style:family="text">
      <style:text-properties officeooo:rsid="01370ae7"/>
    </style:style>
    <style:style style:name="T8" style:family="text">
      <style:text-properties officeooo:rsid="0134edba"/>
    </style:style>
    <style:style style:name="T9" style:family="text">
      <style:text-properties fo:color="#4b69c6" loext:opacity="100%"/>
    </style:style>
    <style:style style:name="T10" style:family="text">
      <style:text-properties fo:color="#777777" loext:opacity="100%"/>
    </style:style>
    <style:style style:name="T11" style:family="text">
      <style:text-properties fo:color="#9c5d27" loext:opacity="100%"/>
    </style:style>
    <style:style style:name="T12" style:family="text">
      <style:text-properties fo:color="#7a3e9d" loext:opacity="100%" fo:font-weight="bold"/>
    </style:style>
    <style:style style:name="T13" style:family="text">
      <style:text-properties fo:color="#777777" loext:opacity="100%" fo:font-weight="bold"/>
    </style:style>
    <style:style style:name="T14" style:family="text">
      <style:text-properties fo:color="#7a3e9d" loext:opacity="100%"/>
    </style:style>
    <style:style style:name="T15" style:family="text">
      <style:text-properties fo:color="#aa3731" loext:opacity="100%" fo:font-weight="bold"/>
    </style:style>
    <style:style style:name="T16" style:family="text">
      <style:text-properties fo:color="#448c27" loext:opacity="100%"/>
    </style:style>
    <style:style style:name="T17" style:family="text">
      <style:text-properties fo:color="#91b3e0" loext:opacity="100%"/>
    </style:style>
    <style:style style:name="T18" style:family="text">
      <style:text-properties fo:color="#8190a0" loext:opacity="100%" fo:font-style="italic"/>
    </style:style>
    <style:style style:name="T19" style:family="text">
      <style:text-properties fo:color="#777777" loext:opacity="100%" style:font-name="Droid Sans Mono" fo:font-size="10.5pt" fo:font-weight="normal" fo:background-color="#f5f5f5" loext:char-shading-value="0"/>
    </style:style>
    <style:style style:name="T20" style:family="text">
      <style:text-properties style:font-name="Droid Sans Mono" fo:font-size="10.5pt" fo:font-weight="normal" fo:background-color="#f5f5f5" loext:char-shading-value="0"/>
    </style:style>
    <style:style style:name="T21" style:family="text">
      <style:text-properties fo:color="#448c27" loext:opacity="100%" fo:font-style="italic"/>
    </style:style>
    <style:style style:name="T22" style:family="text">
      <style:text-properties fo:color="#4b69c6" loext:opacity="100%" fo:font-style="italic"/>
    </style:style>
    <style:style style:name="T23" style:family="text">
      <style:text-properties fo:color="#777777" loext:opacity="100%" fo:font-style="italic"/>
    </style:style>
    <style:style style:name="T24" style:family="text">
      <style:text-properties fo:color="#aaaaaa" loext:opacity="100%" fo:font-style="italic"/>
    </style:style>
    <style:style style:name="T25" style:family="text">
      <style:text-properties officeooo:rsid="012f4ded"/>
    </style:style>
    <style:style style:name="T26" style:family="text">
      <style:text-properties officeooo:rsid="0145d878"/>
    </style:style>
    <style:style style:name="T27" style:family="text">
      <style:text-properties officeooo:rsid="0145e616"/>
    </style:style>
    <style:style style:name="T28" style:family="text">
      <style:text-properties fo:color="#000000" loext:opacity="100%" fo:background-color="#ffffff" loext:char-shading-value="0"/>
    </style:style>
    <style:style style:name="T29" style:family="text">
      <style:text-properties fo:color="#5454ff" loext:opacity="100%" fo:font-family="monospace" fo:font-weight="bold" fo:background-color="#ffffff" loext:char-shading-value="0"/>
    </style:style>
    <style:style style:name="T30" style:family="text">
      <style:text-properties fo:color="#000000" loext:opacity="100%" fo:font-family="monospace" fo:background-color="#ffffff" loext:char-shading-value="0"/>
    </style:style>
    <style:style style:name="T31" style:family="text">
      <style:text-properties fo:font-family="monospace"/>
    </style:style>
    <style:style style:name="T32" style:family="text">
      <style:text-properties officeooo:rsid="009e3755"/>
    </style:style>
    <style:style style:name="T33" style:family="text">
      <style:text-properties officeooo:rsid="011182ac"/>
    </style:style>
    <style:style style:name="T34" style:family="text">
      <style:text-properties officeooo:rsid="01132b63"/>
    </style:style>
    <style:style style:name="T35" style:family="text">
      <style:text-properties fo:color="#0000ff" loext:opacity="100%"/>
    </style:style>
    <style:style style:name="T36" style:family="text">
      <style:text-properties fo:color="#a31515" loext:opacity="100%"/>
    </style:style>
    <style:style style:name="T37" style:family="text">
      <style:text-properties fo:color="#098658" loext:opacity="100%"/>
    </style:style>
    <style:style style:name="T38" style:family="text">
      <style:text-properties fo:color="#800000" loext:opacity="100%"/>
    </style:style>
    <style:style style:name="T39" style:family="text">
      <style:text-properties fo:color="#e50000" loext:opacity="100%"/>
    </style:style>
    <style:style style:name="T40" style:family="text">
      <style:text-properties officeooo:rsid="011ecaf7"/>
    </style:style>
    <style:style style:name="T41" style:family="text">
      <style:text-properties officeooo:rsid="011e34a0"/>
    </style:style>
    <style:style style:name="T42" style:family="text">
      <style:text-properties fo:color="#660000" loext:opacity="100%"/>
    </style:style>
    <style:style style:name="T43" style:family="text">
      <style:text-properties officeooo:rsid="0123c6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M</text:span><text:span text:style-name="T2">YClub</text:span><text:span text:style-name="T3"> </text:span><text:span text:style-name="T4">( “self-hosted CMS installable” )</text:span><text:span text:style-name="T3">, utilise</text:span> <text:span text:style-name="T5">flightphp (3.13), latte (3.0), </text:span>bootstrap <text:span text:style-name="T5">(5.3). Elle est développé en PHP (8.4) avec JS (</text:span><text:span text:style-name="T6">vanilla </text:span><text:span text:style-name="T5">ES6). Tout le site est stocké dans MyClub.</text:span><text:span text:style-name="T3">sqlite, </text:span><text:span text:style-name="T5">les logs dans LogMyClub.sqlite </text:span><text:span text:style-name="T7">et les crédentials dans Credential.db</text:span><text:span text:style-name="T5"> via pdo. </text:span><text:span text:style-name="T8">Composer est utilisé.</text:span></text:p>
      <text:p text:style-name="P4">Tous les commentaires dans le code sont en anglais.</text:p>
      <text:h text:style-name="P5" text:outline-level="2">Les routes</text:h>
      <text:p text:style-name="P6">On distingue les pages et les APIs</text:p>
      <text:h text:style-name="Heading_20_3" text:outline-level="3">Les pages</text:h>
      <text:p text:style-name="Code">&lt;?php</text:p>
      <text:p text:style-name="Code"><text:span text:style-name="T9">declare</text:span><text:span text:style-name="T10">(</text:span><text:span text:style-name="T11">strict_types</text:span><text:span text:style-name="T10">=</text:span><text:span text:style-name="T11">1</text:span><text:span text:style-name="T10">);</text:span></text:p>
      <text:p text:style-name="Code"><text:span text:style-name="T9">namespace</text:span> <text:span text:style-name="T12">app</text:span><text:span text:style-name="T13">\</text:span><text:span text:style-name="T12">config</text:span><text:span text:style-name="T13">\</text:span><text:span text:style-name="T12">routes</text:span><text:span text:style-name="T10">;</text:span></text:p>
      <text:p text:style-name="Code"/>
      <text:p text:style-name="Code"><text:span text:style-name="T9">use</text:span> app<text:span text:style-name="T10">\</text:span>config<text:span text:style-name="T10">\</text:span><text:span text:style-name="T12">ControllerFactory</text:span><text:span text:style-name="T10">;</text:span></text:p>
      <text:p text:style-name="Code"><text:span text:style-name="T9">use</text:span> app<text:span text:style-name="T10">\</text:span>interfaces<text:span text:style-name="T10">\</text:span><text:span text:style-name="T12">RouteInterface</text:span><text:span text:style-name="T10">;</text:span></text:p>
      <text:p text:style-name="Code"><text:span text:style-name="T9">use</text:span> app<text:span text:style-name="T10">\</text:span>valueObjects<text:span text:style-name="T10">\</text:span><text:span text:style-name="T12">Route</text:span><text:span text:style-name="T10">;</text:span></text:p>
      <text:p text:style-name="Code"/>
      <text:p text:style-name="Code"><text:span text:style-name="T14">class</text:span> <text:span text:style-name="T12">Loan</text:span> <text:span text:style-name="T9">implements</text:span> <text:span text:style-name="T12">RouteInterface</text:span></text:p>
      <text:p text:style-name="Code">{</text:p>
      <text:p text:style-name="Code"><text:span text:style-name="T9"><text:tab/>private</text:span> <text:span text:style-name="T9">array</text:span> <text:span text:style-name="T10">$</text:span><text:span text:style-name="T14">routes</text:span> <text:span text:style-name="T10">=</text:span> <text:span text:style-name="T10">[];</text:span></text:p>
      <text:p text:style-name="Code"><text:tab/></text:p>
      <text:p text:style-name="Code"><text:span text:style-name="T9"><text:tab/>public</text:span> <text:span text:style-name="T14">function</text:span> <text:span text:style-name="T15">__construct</text:span><text:span text:style-name="T10">(</text:span><text:span text:style-name="T9">private</text:span> <text:span text:style-name="T12">ControllerFactory</text:span> <text:span text:style-name="T10">$</text:span><text:span text:style-name="T14">controllerFactory</text:span><text:span text:style-name="T10">)</text:span> <text:span text:style-name="T10">{}</text:span></text:p>
      <text:p text:style-name="Code"/>
      <text:p text:style-name="Code"><text:span text:style-name="T9"><text:tab/>public</text:span> <text:span text:style-name="T14">function</text:span> <text:span text:style-name="T15">get</text:span><text:span text:style-name="T10">():</text:span> <text:span text:style-name="T9">array</text:span></text:p>
      <text:p text:style-name="Code"><text:tab/>{</text:p>
      <text:p text:style-name="Code"><text:span text:style-name="T10"><text:tab/><text:tab/>$</text:span><text:span text:style-name="T14">loanController</text:span> <text:span text:style-name="T10">=</text:span> <text:span text:style-name="T14">fn</text:span><text:span text:style-name="T10">()</text:span> <text:span text:style-name="T10">=&gt;</text:span> <text:span text:style-name="T10">$</text:span><text:span text:style-name="T11">this</text:span><text:span text:style-name="T10">-&gt;</text:span><text:span text:style-name="T14">controllerFactory</text:span><text:span text:style-name="T10">-&gt;</text:span><text:span text:style-name="T15">makeLoanController</text:span><text:span text:style-name="T10">();</text:span></text:p>
      <text:p text:style-name="Code"/>
      <text:p text:style-name="Code"><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loan/calendar</text:span><text:span text:style-name="T10">',</text:span> <text:span text:style-name="T10">$</text:span><text:span text:style-name="T14">loanController</text:span><text:span text:style-name="T10">,</text:span> <text:span text:style-name="T10">'</text:span><text:span text:style-name="T16">calendar</text:span><text:span text:style-name="T10">');</text:span></text:p>
      <text:p text:style-name="Code"><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loan</text:span><text:span text:style-name="T10">',</text:span> <text:span text:style-name="T10">$</text:span><text:span text:style-name="T14">loanController</text:span><text:span text:style-name="T10">,</text:span> <text:span text:style-name="T10">'</text:span><text:span text:style-name="T16">designer</text:span><text:span text:style-name="T10">');</text:span></text:p>
      <text:p text:style-name="Code"><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loan/designer/help</text:span><text:span text:style-name="T10">',</text:span> <text:span text:style-name="T10">$</text:span><text:span text:style-name="T14">loanController</text:span><text:span text:style-name="T10">,</text:span> <text:span text:style-name="T10">'</text:span><text:span text:style-name="T16">designerHelp</text:span><text:span text:style-name="T10">');</text:span></text:p>
      <text:p text:style-name="Code"><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loan/manager</text:span><text:span text:style-name="T10">',</text:span> <text:span text:style-name="T10">$</text:span><text:span text:style-name="T14">loanController</text:span><text:span text:style-name="T10">,</text:span> <text:span text:style-name="T10">'</text:span><text:span text:style-name="T16">manager</text:span><text:span text:style-name="T10">');</text:span></text:p>
      <text:p text:style-name="Code"><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loan/reservations</text:span><text:span text:style-name="T10">',</text:span> <text:span text:style-name="T10">$</text:span><text:span text:style-name="T14">loanController</text:span><text:span text:style-name="T10">,</text:span> <text:span text:style-name="T10">'</text:span><text:span text:style-name="T16">reservations</text:span><text:span text:style-name="T10">');</text:span></text:p>
      <text:p text:style-name="Code"><text:span text:style-name="T9"><text:tab/><text:tab/>return</text:span> <text:span text:style-name="T10">$</text:span><text:span text:style-name="T11">this</text:span><text:span text:style-name="T10">-&gt;</text:span><text:span text:style-name="T14">routes</text:span><text:span text:style-name="T10">;</text:span></text:p>
      <text:p text:style-name="Code"><text:tab/>}</text:p>
      <text:p text:style-name="Code">}</text:p>
      <text:h text:style-name="Heading_20_3" text:outline-level="3">Les APIs</text:h>
      <text:h text:style-name="Heading_20_2" text:outline-level="2">Les traductions</text:h>
      <text:p text:style-name="P7">Tous les messages <text:span text:style-name="T7">sont stockés dans la table Languages</text:span>. Un nouveau migrateur est créé à chaque fois.</text:p>
      <text:h text:style-name="Heading_20_3" text:outline-level="3">Exemple de migrateur</text:h>
      <text:p text:style-name="Code">&lt;?php</text:p>
      <text:p text:style-name="Code"><text:span text:style-name="T9">declare</text:span><text:span text:style-name="T10">(</text:span><text:span text:style-name="T11">strict_types</text:span><text:span text:style-name="T10">=</text:span><text:span text:style-name="T11">1</text:span><text:span text:style-name="T10">);</text:span></text:p>
      <text:p text:style-name="Code"><text:soft-page-break/><text:span text:style-name="T9">namespace</text:span> <text:span text:style-name="T12">app</text:span><text:span text:style-name="T13">\</text:span><text:span text:style-name="T12">models</text:span><text:span text:style-name="T13">\</text:span><text:span text:style-name="T12">database</text:span><text:span text:style-name="T13">\</text:span><text:span text:style-name="T12">migrators</text:span><text:span text:style-name="T10">;</text:span></text:p>
      <text:p text:style-name="Code"/>
      <text:p text:style-name="Code"><text:span text:style-name="T9">use</text:span> <text:span text:style-name="T12">PDO</text:span><text:span text:style-name="T10">;</text:span></text:p>
      <text:p text:style-name="Code"><text:span text:style-name="T9">use</text:span> app<text:span text:style-name="T10">\</text:span>interfaces<text:span text:style-name="T10">\</text:span><text:span text:style-name="T12">DatabaseMigratorInterface</text:span><text:span text:style-name="T10">;</text:span></text:p>
      <text:p text:style-name="Code"/>
      <text:p text:style-name="Code"><text:span text:style-name="T14">class</text:span> <text:span text:style-name="T12">V49ToV50Migrator</text:span> <text:span text:style-name="T9">implements</text:span> <text:span text:style-name="T12">DatabaseMigratorInterface</text:span></text:p>
      <text:p text:style-name="Code">{</text:p>
      <text:p text:style-name="Code"><text:span text:style-name="T9"><text:tab/>public</text:span> <text:span text:style-name="T14">function</text:span> <text:span text:style-name="T15">upgrade</text:span><text:span text:style-name="T10">(</text:span><text:span text:style-name="T12">PDO</text:span> <text:span text:style-name="T10">$</text:span><text:span text:style-name="T14">pdo</text:span><text:span text:style-name="T10">,</text:span> <text:span text:style-name="T9">int</text:span> <text:span text:style-name="T10">$</text:span><text:span text:style-name="T14">currentVersion</text:span><text:span text:style-name="T10">):</text:span> <text:span text:style-name="T9">int</text:span></text:p>
      <text:p text:style-name="Code"><text:tab/>{</text:p>
      <text:p text:style-name="Code"><text:span text:style-name="T10"><text:tab/><text:tab/>$</text:span><text:span text:style-name="T14">pdo</text:span><text:span text:style-name="T10">-&gt;</text:span><text:span text:style-name="T15">exec</text:span><text:span text:style-name="T10">(&lt;&lt;&lt;SQL</text:span></text:p>
      <text:p text:style-name="Code"><text:span text:style-name="T9">CREATE</text:span> <text:span text:style-name="T9">TABLE</text:span> <text:span text:style-name="T15">IF</text:span> <text:span text:style-name="T9">NOT</text:span> <text:span text:style-name="T9">EXISTS</text:span> LoanItem (</text:p>
      <text:p text:style-name="Code"><text:tab/>Id <text:span text:style-name="T14">INTEGER</text:span> <text:span text:style-name="T9">PRIMARY KEY</text:span> AUTOINCREMENT,</text:p>
      <text:p text:style-name="Code"><text:span text:style-name="T9"><text:tab/>Name</text:span> <text:span text:style-name="T14">TEXT</text:span> <text:span text:style-name="T9">NOT NULL</text:span>,</text:p>
      <text:p text:style-name="Code"><text:span text:style-name="T9"><text:tab/>Description</text:span> <text:span text:style-name="T14">TEXT</text:span> <text:span text:style-name="T9">NOT NULL</text:span> <text:span text:style-name="T9">DEFAULT</text:span> <text:span text:style-name="T10">''</text:span>,</text:p>
      <text:p text:style-name="Code"><text:span text:style-name="T9"><text:tab/>Type</text:span> <text:span text:style-name="T14">TEXT</text:span> <text:span text:style-name="T9">NOT NULL</text:span> <text:span text:style-name="T9">DEFAULT</text:span> <text:span text:style-name="T10">'</text:span><text:span text:style-name="T16">both</text:span><text:span text:style-name="T10">'</text:span> <text:span text:style-name="T9">CHECK</text:span>(<text:span text:style-name="T9">Type</text:span> <text:span text:style-name="T9">IN</text:span> (<text:span text:style-name="T10">'</text:span><text:span text:style-name="T16">loan</text:span><text:span text:style-name="T10">'</text:span>,<text:span text:style-name="T10">'</text:span><text:span text:style-name="T16">reservation</text:span><text:span text:style-name="T10">'</text:span>,<text:span text:style-name="T10">'</text:span><text:span text:style-name="T16">both</text:span><text:span text:style-name="T10">'</text:span>)),</text:p>
      <text:p text:style-name="Code"><text:tab/>Quantity <text:span text:style-name="T14">INTEGER</text:span> <text:span text:style-name="T9">NOT NULL</text:span> <text:span text:style-name="T9">DEFAULT</text:span> <text:span text:style-name="T11">1</text:span>,</text:p>
      <text:p text:style-name="Code"><text:tab/>IsActive <text:span text:style-name="T14">INTEGER</text:span> <text:span text:style-name="T9">NOT NULL</text:span> <text:span text:style-name="T9">DEFAULT</text:span> <text:span text:style-name="T11">1</text:span>,</text:p>
      <text:p text:style-name="Code"><text:tab/>CreatedAt <text:span text:style-name="T14">TEXT</text:span> <text:span text:style-name="T9">NOT NULL</text:span> <text:span text:style-name="T9">DEFAULT</text:span> (<text:span text:style-name="T9">datetime</text:span>(<text:span text:style-name="T10">'</text:span><text:span text:style-name="T16">now</text:span><text:span text:style-name="T10">'</text:span>)),</text:p>
      <text:p text:style-name="Code"><text:tab/>UpdatedAt <text:span text:style-name="T14">TEXT</text:span> <text:span text:style-name="T9">NOT NULL</text:span> <text:span text:style-name="T9">DEFAULT</text:span> (<text:span text:style-name="T9">datetime</text:span>(<text:span text:style-name="T10">'</text:span><text:span text:style-name="T16">now</text:span><text:span text:style-name="T10">'</text:span>))</text:p>
      <text:p text:style-name="Code">);</text:p>
      <text:p text:style-name="Code">SQL);</text:p>
      <text:p text:style-name="Code"/>
      <text:p text:style-name="Code"><text:span text:style-name="T10"><text:tab/><text:tab/>$</text:span><text:span text:style-name="T14">pdo</text:span><text:span text:style-name="T10">-&gt;</text:span><text:span text:style-name="T15">exec</text:span><text:span text:style-name="T10">(&lt;&lt;&lt;SQL</text:span></text:p>
      <text:p text:style-name="Code"/>
      <text:p text:style-name="Code"><text:span text:style-name="T10">$</text:span><text:span text:style-name="T14">pdo</text:span><text:span text:style-name="T10">-&gt;</text:span><text:span text:style-name="T15">exec</text:span><text:span text:style-name="T10">(&lt;&lt;&lt;SQL</text:span></text:p>
      <text:p text:style-name="Code"><text:span text:style-name="T9">INSERT INTO</text:span> Authorization (Id, <text:span text:style-name="T9">Name</text:span>) <text:span text:style-name="T9">VALUES</text:span> (<text:span text:style-name="T11">13</text:span>, <text:span text:style-name="T10">'</text:span><text:span text:style-name="T16">LoanDesigner</text:span><text:span text:style-name="T10">'</text:span>);</text:p>
      <text:p text:style-name="Code"><text:span text:style-name="T9">INSERT INTO</text:span> Authorization (Id, <text:span text:style-name="T9">Name</text:span>) <text:span text:style-name="T9">VALUES</text:span> (<text:span text:style-name="T11">14</text:span>, <text:span text:style-name="T10">'</text:span><text:span text:style-name="T16">LoanManager</text:span><text:span text:style-name="T10">'</text:span>);</text:p>
      <text:p text:style-name="Code">SQL);</text:p>
      <text:p text:style-name="Code"/>
      <text:p text:style-name="Code"><text:span text:style-name="T10">$</text:span><text:span text:style-name="T14">pdo</text:span><text:span text:style-name="T10">-&gt;</text:span><text:span text:style-name="T15">exec</text:span><text:span text:style-name="T10">(&lt;&lt;&lt;SQL</text:span></text:p>
      <text:p text:style-name="Code"><text:span text:style-name="T9">INSERT INTO</text:span> Languages (<text:span text:style-name="T9">Name</text:span>, en_US, fr_FR, pl_PL) <text:span text:style-name="T9">VALUES</text:span></text:p>
      <text:p text:style-name="Code">(<text:span text:style-name="T10">'</text:span><text:span text:style-name="T16">loan.nav.designer</text:span><text:span text:style-name="T10">'</text:span>, <text:span text:style-name="T10">'</text:span><text:span text:style-name="T16">Material Catalog</text:span><text:span text:style-name="T10">'</text:span>, <text:span text:style-name="T10">'</text:span><text:span text:style-name="T16">Catalogue du matériel</text:span><text:span text:style-name="T10">'</text:span>, <text:span text:style-name="T10">'</text:span><text:span text:style-name="T16">Katalog materiałów</text:span><text:span text:style-name="T10">'</text:span>),</text:p>
      <text:p text:style-name="Code">(<text:span text:style-name="T10">'</text:span><text:span text:style-name="T16">loan.nav.manager</text:span><text:span text:style-name="T10">'</text:span>, <text:span text:style-name="T10">'</text:span><text:span text:style-name="T16">Loan Management</text:span><text:span text:style-name="T10">'</text:span>, <text:span text:style-name="T10">'</text:span><text:span text:style-name="T16">Gestion des prêts</text:span><text:span text:style-name="T10">'</text:span>, <text:span text:style-name="T10">'</text:span><text:span text:style-name="T16">Zarządzanie pożyczkami</text:span><text:span text:style-name="T10">'</text:span>),</text:p>
      <text:p text:style-name="Code">(<text:span text:style-name="T10">'</text:span><text:span text:style-name="T16">loan.nav.user</text:span><text:span text:style-name="T10">'</text:span>, <text:span text:style-name="T10">'</text:span><text:span text:style-name="T16">My Reservations</text:span><text:span text:style-name="T10">'</text:span>, <text:span text:style-name="T10">'</text:span><text:span text:style-name="T16">Mes réservations</text:span><text:span text:style-name="T10">'</text:span>, <text:span text:style-name="T10">'</text:span><text:span text:style-name="T16">Moje rezerwacje</text:span><text:span text:style-name="T10">'</text:span>),</text:p>
      <text:p text:style-name="Code">(<text:span text:style-name="T10">'</text:span><text:span text:style-name="T16">loan.nav.calendar</text:span><text:span text:style-name="T10">'</text:span>, <text:span text:style-name="T10">'</text:span><text:span text:style-name="T16">Calendar</text:span><text:span text:style-name="T10">'</text:span>, <text:span text:style-name="T10">'</text:span><text:span text:style-name="T16">Calendrier</text:span><text:span text:style-name="T10">'</text:span>, <text:span text:style-name="T10">'</text:span><text:span text:style-name="T16">Kalendarz</text:span><text:span text:style-name="T10">'</text:span>),</text:p>
      <text:p text:style-name="Code"/>
      <text:p text:style-name="Code">(<text:span text:style-name="T10">'</text:span><text:span text:style-name="T16">Help_LoanDesigner</text:span><text:span text:style-name="T10">'</text:span>,</text:p>
      <text:p text:style-name="Code"><text:span text:style-name="T10">'</text:span><text:span text:style-name="T16">&lt;div class="container my-5"&gt;</text:span></text:p>
      <text:p text:style-name="Code">&lt;header class="mb-5 border-bottom pb-3"&gt;</text:p>
      <text:p text:style-name="Code">&lt;h1 class="display-5 fw-bold text-primary"&gt;Contextual Help: Material Loan &amp;amp; Reservation&lt;/h1&gt;</text:p>
      <text:p text:style-name="Code"><text:span text:style-name="T16">&lt;p class="lead"&gt;Manage your club</text:span><text:span text:style-name="T10">''</text:span><text:span text:style-name="T16">s equipment: lend items to take away or reserve them for on-site use.&lt;/p&gt;</text:span></text:p>
      <text:p text:style-name="Code">&lt;/header&gt;</text:p>
      <text:p text:style-name="Code"/>
      <text:p text:style-name="Code">&lt;section class="mb-5"&gt;</text:p>
      <text:p text:style-name="Code">&lt;div class="card shadow-sm"&gt;</text:p>
      <text:p text:style-name="Code">&lt;div class="card-body"&gt;</text:p>
      <text:p text:style-name="Code">&lt;h2 class="card-title h4 mb-4"&gt;The 3 ro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eates and manages the material catalogue: name, description, type (loan / reservation / both) and total available quantity.&lt;/p&gt;&lt;/div&gt;</text:p>
      <text:p text:style-name="Code">&lt;/div&gt;</text:p>
      <text:p text:style-name="Code"><text:soft-page-break/>&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Handles loans of items to take away: records who lends what to whom, for how long, and registers return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ser&lt;/strong&gt;</text:p>
      <text:p text:style-name="Code">&lt;p class="text-muted small"&gt;Books items for on-site use: chooses a date, a time slot and a quantity. No return step require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Material catalogue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Item type&lt;/strong&gt;</text:p>
      <text:p text:style-name="Code">&lt;p class="text-muted small"&gt;Each item is tagged &lt;em&gt;Loan (take away)&lt;/em&gt;, &lt;em&gt;Reservation (on-site)&lt;/em&gt; or &lt;em&gt;Both&lt;/em&gt;. This controls where it appears in the Manager and User views.&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Total quantity&lt;/strong&gt;</text:p>
      <text:p text:style-name="Code">&lt;p class="text-muted small"&gt;Defines the maximum number of units available simultaneously. The system prevents overbooking automatically.&lt;/p&gt;&lt;/div&gt;</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ve / Inactive&lt;/strong&gt;</text:p>
      <text:p text:style-name="Code">&lt;p class="text-muted small"&gt;An inactive item no longer appears in loan or reservation forms, but its history is preserv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text:soft-page-break/>&lt;div&gt;&lt;strong&gt;Deletion&lt;/strong&gt;</text:p>
      <text:p text:style-name="Code">&lt;p class="text-muted small"&gt;An item cannot be deleted if it has active loans or reservations. Deactivate it instea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Loan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eating a loan&lt;/strong&gt;</text:p>
      <text:p text:style-name="Code">&lt;p class="text-muted small"&gt;Record who lends (lender), who borrows (borrower), the loan date, the expected return date and the quantity. Real-time availability is shown before saving.&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gistering a return&lt;/strong&gt;</text:p>
      <text:p text:style-name="Code">&lt;p class="text-muted small"&gt;Click &lt;strong&gt;Register return&lt;/strong&gt; &lt;i class="bi bi-check2-circle"&gt;&lt;/i&gt; on an active loan. Enter the actual return date and the person who received the item.&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Overdue loans&lt;/strong&gt;</text:p>
      <text:p text:style-name="Code">&lt;p class="text-muted small"&gt;Loans past their due date are automatically flagged &lt;em&gt;Overdue&lt;/em&gt; &lt;i class="bi bi-exclamation-triangle-fill text-danger"&gt;&lt;/i&gt;. They remain visible and can still be returned.&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Status filter&lt;/strong&gt;</text:p>
      <text:p text:style-name="Code">&lt;p class="text-muted small"&gt;Filter the list by status: &lt;em&gt;Active&lt;/em&gt;, &lt;em&gt;Overdue&lt;/em&gt;, &lt;em&gt;Returned&lt;/em&gt; or &lt;em&gt;Cancelled&lt;/em&gt;.&lt;/p&gt;&lt;/div&gt;</text:p>
      <text:p text:style-name="Code">&lt;/div&gt;</text:p>
      <text:p text:style-name="Code">&lt;/div&gt;</text:p>
      <text:p text:style-name="Code">&lt;/div&gt;</text:p>
      <text:p text:style-name="Code">&lt;/div&gt;</text:p>
      <text:p text:style-name="Code">&lt;/div&gt;</text:p>
      <text:p text:style-name="Code"><text:soft-page-break/>&lt;/section&gt;</text:p>
      <text:p text:style-name="Code">&lt;section class="mb-5"&gt;</text:p>
      <text:p text:style-name="Code">&lt;div class="card shadow-sm"&gt;</text:p>
      <text:p text:style-name="Code">&lt;div class="card-body"&gt;</text:p>
      <text:p text:style-name="Code">&lt;h2 class="card-title h4 mb-4"&gt;Reservations &lt;span class="badge bg-warning text-dark ms-2 fs-6"&gt;Use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eating a reservation&lt;/strong&gt;</text:p>
      <text:p text:style-name="Code">&lt;p class="text-muted small"&gt;Choose an item, a date, a start time, an end time and a quantity. The system checks availability in real time for the selected slot.&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No return required&lt;/strong&gt;</text:p>
      <text:p text:style-name="Code">&lt;p class="text-muted small"&gt;On-site reservations have no return step. Simply cancel a reservation if it is no longer need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Manager view&lt;/strong&gt;</text:p>
      <text:p text:style-name="Code"><text:span text:style-name="T16">&lt;p class="text-muted small"&gt;Managers see all users</text:span><text:span text:style-name="T10">''</text:span><text:span text:style-name="T16"> reservations and can cancel any of them. Standard users only see their own.&lt;/p&gt;&lt;/div&gt;</text:span></text:p>
      <text:p text:style-name="Code">&lt;/div&gt;</text:p>
      <text:p text:style-name="Code">&lt;/div&gt;</text:p>
      <text:p text:style-name="Code">&lt;/div&gt;</text:p>
      <text:p text:style-name="Code">&lt;/div&gt;</text:p>
      <text:p text:style-name="Code">&lt;/div&gt;</text:p>
      <text:p text:style-name="Code">&lt;/section&gt;</text:p>
      <text:p text:style-name="Code">&lt;hr class="my-5"&gt;</text:p>
      <text:p text:style-name="Code">&lt;section&gt;</text:p>
      <text:p text:style-name="Code">&lt;h2 class="h4 mb-4"&gt;Calendar&lt;/h2&gt;</text:p>
      <text:p text:style-name="Code">&lt;div class="list-group"&gt;</text:p>
      <text:p text:style-name="Code">&lt;div class="list-group-item d-flex align-items-center"&gt;</text:p>
      <text:p text:style-name="Code">&lt;span class="badge bg-primary fs-6 me-3"&gt;&amp;nbsp;&amp;nbsp;&lt;/span&gt;</text:p>
      <text:p text:style-name="Code">&lt;span&gt;&lt;strong&gt;Blue – Active loan:&lt;/strong&gt; item currently out on loan.&lt;/span&gt;</text:p>
      <text:p text:style-name="Code">&lt;/div&gt;</text:p>
      <text:p text:style-name="Code">&lt;div class="list-group-item d-flex align-items-center"&gt;</text:p>
      <text:p text:style-name="Code">&lt;span class="badge bg-success fs-6 me-3"&gt;&amp;nbsp;&amp;nbsp;&lt;/span&gt;</text:p>
      <text:p text:style-name="Code">&lt;span&gt;&lt;strong&gt;Green – Returned loan:&lt;/strong&gt; item successfully returned.&lt;/span&gt;</text:p>
      <text:p text:style-name="Code">&lt;/div&gt;</text:p>
      <text:p text:style-name="Code">&lt;div class="list-group-item d-flex align-items-center"&gt;</text:p>
      <text:p text:style-name="Code">&lt;span class="badge bg-danger fs-6 me-3"&gt;&amp;nbsp;&amp;nbsp;&lt;/span&gt;</text:p>
      <text:p text:style-name="Code">&lt;span&gt;&lt;strong&gt;Red – Overdue loan:&lt;/strong&gt; item not returned by the due date.&lt;/span&gt;</text:p>
      <text:p text:style-name="Code">&lt;/div&gt;</text:p>
      <text:p text:style-name="Code">&lt;div class="list-group-item d-flex align-items-center"&gt;</text:p>
      <text:p text:style-name="Code">&lt;span class="badge fs-6 me-3" style="background:#fd7e14"&gt;&amp;nbsp;&amp;nbsp;&lt;/span&gt;</text:p>
      <text:p text:style-name="Code">&lt;span&gt;&lt;strong&gt;Orange – Reservation:&lt;/strong&gt; on-site time slot booked.&lt;/span&gt;</text:p>
      <text:p text:style-name="Code">&lt;/div&gt;</text:p>
      <text:p text:style-name="Code"><text:soft-page-break/>&lt;div class="list-group-item d-flex align-items-center bg-light"&gt;</text:p>
      <text:p text:style-name="Code">&lt;i class="bi bi-shield-lock-fill fs-3 text-primary me-3"&gt;&lt;/i&gt;</text:p>
      <text:p text:style-name="Code">&lt;span&gt;&lt;strong&gt;Permissions:&lt;/strong&gt; &lt;strong&gt;LoanDesigner&lt;/strong&gt; manages the catalogue. &lt;strong&gt;LoanManager&lt;/strong&gt; manages loans and can view all reservations. Any connected member can book an on-site reservation and view the calendar.&lt;/span&gt;</text:p>
      <text:p text:style-name="Code">&lt;/div&gt;</text:p>
      <text:p text:style-name="Code">&lt;/div&gt;</text:p>
      <text:p text:style-name="Code">&lt;/section&gt;</text:p>
      <text:p text:style-name="Code"><text:span text:style-name="T16">&lt;/div&gt;</text:span><text:span text:style-name="T10">'</text:span>,</text:p>
      <text:p text:style-name="Code"/>
      <text:p text:style-name="Code"><text:span text:style-name="T10">'</text:span><text:span text:style-name="T16">&lt;div class="container my-5"&gt;</text:span></text:p>
      <text:p text:style-name="Code">&lt;header class="mb-5 border-bottom pb-3"&gt;</text:p>
      <text:p text:style-name="Code">&lt;h1 class="display-5 fw-bold text-primary"&gt;Aide Contextuelle : Prêt et Réservation de Matériel&lt;/h1&gt;</text:p>
      <text:p text:style-name="Code">&lt;p class="lead"&gt;Gérez le matériel du club : prêtez des articles à emporter ou réservez-les pour une utilisation sur place.&lt;/p&gt;</text:p>
      <text:p text:style-name="Code">&lt;/header&gt;</text:p>
      <text:p text:style-name="Code"/>
      <text:p text:style-name="Code">&lt;section class="mb-5"&gt;</text:p>
      <text:p text:style-name="Code">&lt;div class="card shadow-sm"&gt;</text:p>
      <text:p text:style-name="Code">&lt;div class="card-body"&gt;</text:p>
      <text:p text:style-name="Code">&lt;h2 class="card-title h4 mb-4"&gt;Les 3 rô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ée et gère le catalogue du matériel : nom, description, type (prêt / réservation / les deux) et quantité totale disponible.&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Gère les prêts à emporter : enregistre qui prête quoi à qui, pour combien de temps, et gère les retour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tilisateur&lt;/strong&gt;</text:p>
      <text:p text:style-name="Code">&lt;p class="text-muted small"&gt;Réserve du matériel pour une utilisation sur place : choisit une date, un créneau horaire et une quantité. Aucune remise à gérer.&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Catalogue du matériel &lt;span class="badge bg-primary ms-2 fs-6"&gt;Designer&lt;/span&gt;&lt;/h2&gt;</text:p>
      <text:p text:style-name="Code"><text:soft-page-break/>&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e de matériel&lt;/strong&gt;</text:p>
      <text:p text:style-name="Code">&lt;p class="text-muted small"&gt;Chaque article est classé &lt;em&gt;Prêt (à emporter)&lt;/em&gt;, &lt;em&gt;Réservation (sur place)&lt;/em&gt; ou &lt;em&gt;Les deux&lt;/em&gt;. Ce paramètre détermine où il apparaît dans les vues Manager et Utilisateur.&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Quantité totale&lt;/strong&gt;</text:p>
      <text:p text:style-name="Code"><text:span text:style-name="T16">&lt;p class="text-muted small"&gt;Définit le nombre maximum d</text:span><text:span text:style-name="T10">''</text:span><text:span text:style-name="T16">unités disponibles simultanément. Le système empêche automatiquement le survol de stock.&lt;/p&gt;&lt;/div&gt;</text:span></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f / Inactif&lt;/strong&gt;</text:p>
      <text:p text:style-name="Code"><text:span text:style-name="T16">&lt;p class="text-muted small"&gt;Un article inactif n</text:span><text:span text:style-name="T10">''</text:span><text:span text:style-name="T16">apparaît plus dans les formulaires de prêt ou de réservation, mais son historique est conservé.&lt;/p&gt;&lt;/div&gt;</text:span></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Suppression&lt;/strong&gt;</text:p>
      <text:p text:style-name="Code"><text:span text:style-name="T16">&lt;p class="text-muted small"&gt;Un article ne peut pas être supprimé s</text:span><text:span text:style-name="T10">''</text:span><text:span text:style-name="T16">il possède des prêts ou réservations actifs. Désactivez-le à la place.&lt;/p&gt;&lt;/div&gt;</text:span></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rêt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éer un prêt&lt;/strong&gt;</text:p>
      <text:p text:style-name="Code"><text:span text:style-name="T16">&lt;p class="text-muted small"&gt;Enregistrez qui prête (prêteur), qui emprunte (emprunteur), la date de prêt, la date de retour prévue et la quantité. La disponibilité est vérifiée en temps réel avant l</text:span><text:span text:style-name="T10">''</text:span><text:span text:style-name="T16">enregistrement.&lt;/p&gt;&lt;/div&gt;</text:span></text:p>
      <text:p text:style-name="Code">&lt;/div&gt;</text:p>
      <text:p text:style-name="Code">&lt;/div&gt;</text:p>
      <text:p text:style-name="Code"><text:soft-page-break/>&lt;div class="col-md-6"&gt;</text:p>
      <text:p text:style-name="Code">&lt;div class="d-flex align-items-start mb-3"&gt;</text:p>
      <text:p text:style-name="Code">&lt;div class="bg-success text-white rounded p-2 me-3"&gt;&lt;i class="bi bi-check2-circle"&gt;&lt;/i&gt;&lt;/div&gt;</text:p>
      <text:p text:style-name="Code">&lt;div&gt;&lt;strong&gt;Enregistrer un retour&lt;/strong&gt;</text:p>
      <text:p text:style-name="Code">&lt;p class="text-muted small"&gt;Cliquez sur &lt;strong&gt;Enregistrer le retour&lt;/strong&gt; &lt;i class="bi bi-check2-circle"&gt;&lt;/i&gt; sur un prêt actif. Saisissez la date de retour effective et la personne qui récupère le matériel.&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Prêts en retard&lt;/strong&gt;</text:p>
      <text:p text:style-name="Code">&lt;p class="text-muted small"&gt;Les prêts dont la date de retour prévue est dépassée passent automatiquement en statut &lt;em&gt;En retard&lt;/em&gt; &lt;i class="bi bi-exclamation-triangle-fill text-danger"&gt;&lt;/i&gt;. Ils restent visibles et peuvent toujours être clôturés.&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e par statut&lt;/strong&gt;</text:p>
      <text:p text:style-name="Code">&lt;p class="text-muted small"&gt;Filtrez la liste par statut : &lt;em&gt;En cours&lt;/em&gt;, &lt;em&gt;En retard&lt;/em&gt;, &lt;em&gt;Rendu&lt;/em&gt; ou &lt;em&gt;Annulé&lt;/em&gt;.&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éservations &lt;span class="badge bg-warning text-dark ms-2 fs-6"&gt;Utilisateu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éer une réservation&lt;/strong&gt;</text:p>
      <text:p text:style-name="Code">&lt;p class="text-muted small"&gt;Choisissez un matériel, une date, une heure de début, une heure de fin et une quantité. La disponibilité est vérifiée en temps réel pour le créneau sélectionné.&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Pas de retour à gérer&lt;/strong&gt;</text:p>
      <text:p text:style-name="Code"><text:span text:style-name="T16">&lt;p class="text-muted small"&gt;Les réservations sur place n</text:span><text:span text:style-name="T10">''</text:span><text:span text:style-name="T16">ont pas d</text:span><text:span text:style-name="T10">''</text:span><text:span text:style-name="T16">étape de remise. Il suffit d</text:span><text:span text:style-name="T10">''</text:span><text:span text:style-name="T16">annuler une réservation si elle n</text:span><text:span text:style-name="T10">''</text:span><text:span text:style-name="T16">est plus nécessaire.&lt;/p&gt;&lt;/div&gt;</text:span></text:p>
      <text:p text:style-name="Code">&lt;/div&gt;</text:p>
      <text:p text:style-name="Code"><text:soft-page-break/>&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Vue Manager&lt;/strong&gt;</text:p>
      <text:p text:style-name="Code"><text:span text:style-name="T16">&lt;p class="text-muted small"&gt;Les managers voient les réservations de tous les utilisateurs et peuvent en annuler n</text:span><text:span text:style-name="T10">''</text:span><text:span text:style-name="T16">importe laquelle. Les utilisateurs simples ne voient que les leurs.&lt;/p&gt;&lt;/div&gt;</text:span></text:p>
      <text:p text:style-name="Code">&lt;/div&gt;</text:p>
      <text:p text:style-name="Code">&lt;/div&gt;</text:p>
      <text:p text:style-name="Code">&lt;/div&gt;</text:p>
      <text:p text:style-name="Code">&lt;/div&gt;</text:p>
      <text:p text:style-name="Code">&lt;/div&gt;</text:p>
      <text:p text:style-name="Code">&lt;/section&gt;</text:p>
      <text:p text:style-name="Code"/>
      <text:p text:style-name="Code">&lt;hr class="my-5"&gt;</text:p>
      <text:p text:style-name="Code"/>
      <text:p text:style-name="Code">&lt;section&gt;</text:p>
      <text:p text:style-name="Code">&lt;h2 class="h4 mb-4"&gt;Calendrier&lt;/h2&gt;</text:p>
      <text:p text:style-name="Code">&lt;div class="list-group"&gt;</text:p>
      <text:p text:style-name="Code">&lt;div class="list-group-item d-flex align-items-center"&gt;</text:p>
      <text:p text:style-name="Code">&lt;span class="badge bg-primary fs-6 me-3"&gt;&amp;nbsp;&amp;nbsp;&lt;/span&gt;</text:p>
      <text:p text:style-name="Code">&lt;span&gt;&lt;strong&gt;Bleu – Prêt actif :&lt;/strong&gt; matériel actuellement sorti en prêt.&lt;/span&gt;</text:p>
      <text:p text:style-name="Code">&lt;/div&gt;</text:p>
      <text:p text:style-name="Code">&lt;div class="list-group-item d-flex align-items-center"&gt;</text:p>
      <text:p text:style-name="Code">&lt;span class="badge bg-success fs-6 me-3"&gt;&amp;nbsp;&amp;nbsp;&lt;/span&gt;</text:p>
      <text:p text:style-name="Code">&lt;span&gt;&lt;strong&gt;Vert – Prêt rendu :&lt;/strong&gt; matériel retourné avec succès.&lt;/span&gt;</text:p>
      <text:p text:style-name="Code">&lt;/div&gt;</text:p>
      <text:p text:style-name="Code">&lt;div class="list-group-item d-flex align-items-center"&gt;</text:p>
      <text:p text:style-name="Code">&lt;span class="badge bg-danger fs-6 me-3"&gt;&amp;nbsp;&amp;nbsp;&lt;/span&gt;</text:p>
      <text:p text:style-name="Code">&lt;span&gt;&lt;strong&gt;Rouge – Prêt en retard :&lt;/strong&gt; matériel non rendu à la date prévue.&lt;/span&gt;</text:p>
      <text:p text:style-name="Code">&lt;/div&gt;</text:p>
      <text:p text:style-name="Code">&lt;div class="list-group-item d-flex align-items-center"&gt;</text:p>
      <text:p text:style-name="Code">&lt;span class="badge fs-6 me-3" style="background:#fd7e14"&gt;&amp;nbsp;&amp;nbsp;&lt;/span&gt;</text:p>
      <text:p text:style-name="Code">&lt;span&gt;&lt;strong&gt;Orange – Réservation :&lt;/strong&gt; créneau sur place réservé.&lt;/span&gt;</text:p>
      <text:p text:style-name="Code">&lt;/div&gt;</text:p>
      <text:p text:style-name="Code">&lt;div class="list-group-item d-flex align-items-center bg-light"&gt;</text:p>
      <text:p text:style-name="Code">&lt;i class="bi bi-shield-lock-fill fs-3 text-primary me-3"&gt;&lt;/i&gt;</text:p>
      <text:p text:style-name="Code">&lt;span&gt;&lt;strong&gt;Permissions :&lt;/strong&gt; &lt;strong&gt;LoanDesigner&lt;/strong&gt; gère le catalogue. &lt;strong&gt;LoanManager&lt;/strong&gt; gère les prêts et peut consulter toutes les réservations. Tout membre connecté peut créer une réservation sur place et consulter le calendrier.&lt;/span&gt;</text:p>
      <text:p text:style-name="Code">&lt;/div&gt;</text:p>
      <text:p text:style-name="Code">&lt;/div&gt;</text:p>
      <text:p text:style-name="Code">&lt;/section&gt;</text:p>
      <text:p text:style-name="Code"><text:span text:style-name="T16">&lt;/div&gt;</text:span><text:span text:style-name="T10">'</text:span>,</text:p>
      <text:p text:style-name="Code"/>
      <text:p text:style-name="Code"><text:span text:style-name="T10">'</text:span><text:span text:style-name="T16">&lt;div class="container my-5"&gt;</text:span></text:p>
      <text:p text:style-name="Code">&lt;header class="mb-5 border-bottom pb-3"&gt;</text:p>
      <text:p text:style-name="Code">&lt;h1 class="display-5 fw-bold text-primary"&gt;Pomoc kontekstowa: Pożyczki i Rezerwacje Sprzętu&lt;/h1&gt;</text:p>
      <text:p text:style-name="Code">&lt;p class="lead"&gt;Zarządzaj sprzętem klubu: pożyczaj przedmioty do zabrania lub rezerwuj je do użytku na miejscu.&lt;/p&gt;</text:p>
      <text:p text:style-name="Code">&lt;/header&gt;</text:p>
      <text:p text:style-name="Code"/>
      <text:p text:style-name="Code"><text:soft-page-break/>&lt;section class="mb-5"&gt;</text:p>
      <text:p text:style-name="Code">&lt;div class="card shadow-sm"&gt;</text:p>
      <text:p text:style-name="Code">&lt;div class="card-body"&gt;</text:p>
      <text:p text:style-name="Code">&lt;h2 class="card-title h4 mb-4"&gt;3 role&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Tworzy katalog sprzętu i nim zarządza: nazwa, opis, typ (pożyczka / rezerwacja / oba) oraz łączna dostępna ilość.&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Zarządza pożyczkami sprzętu do zabrania: rejestruje kto pożycza co komu, na jak długo oraz obsługuje zwro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żytkownik&lt;/strong&gt;</text:p>
      <text:p text:style-name="Code">&lt;p class="text-muted small"&gt;Rezerwuje sprzęt do użytku na miejscu: wybiera datę, przedział czasowy i ilość. Nie ma etapu zwrotu.&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Katalog sprzętu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 przedmiotu&lt;/strong&gt;</text:p>
      <text:p text:style-name="Code">&lt;p class="text-muted small"&gt;Każdy przedmiot jest oznaczony jako &lt;em&gt;Pożyczka (do zabrania)&lt;/em&gt;, &lt;em&gt;Rezerwacja (na miejscu)&lt;/em&gt; lub &lt;em&gt;Oba&lt;/em&gt;. Decyduje to o tym, gdzie pojawia się w widokach Managera i Użytkownika.&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Łączna ilość&lt;/strong&gt;</text:p>
      <text:p text:style-name="Code">&lt;p class="text-muted small"&gt;Określa maksymalną liczbę jednostek dostępnych jednocześnie. System automatycznie zapobiega nadrezerwacji.&lt;/p&gt;&lt;/div&gt;</text:p>
      <text:p text:style-name="Code">&lt;/div&gt;</text:p>
      <text:p text:style-name="Code"><text:soft-page-break/>&lt;/div&gt;</text:p>
      <text:p text:style-name="Code">&lt;div class="col-md-6"&gt;</text:p>
      <text:p text:style-name="Code">&lt;div class="d-flex align-items-start"&gt;</text:p>
      <text:p text:style-name="Code">&lt;div class="bg-primary text-white rounded p-2 me-3"&gt;&lt;i class="bi bi-toggle-on"&gt;&lt;/i&gt;&lt;/div&gt;</text:p>
      <text:p text:style-name="Code">&lt;div&gt;&lt;strong&gt;Aktywny / Nieaktywny&lt;/strong&gt;</text:p>
      <text:p text:style-name="Code">&lt;p class="text-muted small"&gt;Nieaktywny przedmiot nie pojawia się w formularzach pożyczek ani rezerwacji, ale jego historia jest zachowana.&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Usuwanie&lt;/strong&gt;</text:p>
      <text:p text:style-name="Code">&lt;p class="text-muted small"&gt;Przedmiotu nie można usunąć, jeśli ma aktywne pożyczki lub rezerwacje. Zamiast tego należy go dezaktywować.&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ożyczki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Tworzenie pożyczki&lt;/strong&gt;</text:p>
      <text:p text:style-name="Code">&lt;p class="text-muted small"&gt;Zarejestruj kto pożycza (pożyczkodawca), kto bierze (pożyczkobiorca), datę pożyczki, planowany termin zwrotu i ilość. Dostępność jest sprawdzana w czasie rzeczywistym przed zapisem.&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jestrowanie zwrotu&lt;/strong&gt;</text:p>
      <text:p text:style-name="Code">&lt;p class="text-muted small"&gt;Kliknij &lt;strong&gt;Zarejestruj zwrot&lt;/strong&gt; &lt;i class="bi bi-check2-circle"&gt;&lt;/i&gt; przy aktywnej pożyczce. Podaj faktyczną datę zwrotu i osobę, która odebrała sprzęt.&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Pożyczki przeterminowane&lt;/strong&gt;</text:p>
      <text:p text:style-name="Code">&lt;p class="text-muted small"&gt;Pożyczki po terminie zwrotu automatycznie zmieniają status na &lt;em&gt;Przeterminowane&lt;/em&gt; &lt;i class="bi bi-exclamation-triangle-fill text-danger"&gt;&lt;/i&gt;. Pozostają widoczne i nadal można je zamknąć.&lt;/p&gt;&lt;/div&gt;</text:p>
      <text:p text:style-name="Code"><text:soft-page-break/>&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 statusu&lt;/strong&gt;</text:p>
      <text:p text:style-name="Code">&lt;p class="text-muted small"&gt;Filtruj listę według statusu: &lt;em&gt;Aktywna&lt;/em&gt;, &lt;em&gt;Przeterminowana&lt;/em&gt;, &lt;em&gt;Zwrócona&lt;/em&gt; lub &lt;em&gt;Anulowana&lt;/em&gt;.&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ezerwacje &lt;span class="badge bg-warning text-dark ms-2 fs-6"&gt;Użytkownik&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Tworzenie rezerwacji&lt;/strong&gt;</text:p>
      <text:p text:style-name="Code">&lt;p class="text-muted small"&gt;Wybierz przedmiot, datę, godzinę rozpoczęcia, godzinę zakończenia i ilość. System sprawdza dostępność w czasie rzeczywistym dla wybranego przedziału.&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Brak etapu zwrotu&lt;/strong&gt;</text:p>
      <text:p text:style-name="Code">&lt;p class="text-muted small"&gt;Rezerwacje na miejscu nie wymagają zwrotu. Wystarczy anulować rezerwację, gdy nie jest już potrzebna.&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Widok Managera&lt;/strong&gt;</text:p>
      <text:p text:style-name="Code">&lt;p class="text-muted small"&gt;Managerowie widzą rezerwacje wszystkich użytkowników i mogą anulować dowolną z nich. Zwykli użytkownicy widzą tylko swoje.&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hr class="my-5"&gt;</text:p>
      <text:p text:style-name="Code"/>
      <text:p text:style-name="Code">&lt;section&gt;</text:p>
      <text:p text:style-name="Code"><text:soft-page-break/>&lt;h2 class="h4 mb-4"&gt;Kalendarz&lt;/h2&gt;</text:p>
      <text:p text:style-name="Code">&lt;div class="list-group"&gt;</text:p>
      <text:p text:style-name="Code">&lt;div class="list-group-item d-flex align-items-center"&gt;</text:p>
      <text:p text:style-name="Code">&lt;span class="badge bg-primary fs-6 me-3"&gt;&amp;nbsp;&amp;nbsp;&lt;/span&gt;</text:p>
      <text:p text:style-name="Code">&lt;span&gt;&lt;strong&gt;Niebieski – Aktywna pożyczka:&lt;/strong&gt; sprzęt aktualnie wypożyczony.&lt;/span&gt;</text:p>
      <text:p text:style-name="Code">&lt;/div&gt;</text:p>
      <text:p text:style-name="Code">&lt;div class="list-group-item d-flex align-items-center"&gt;</text:p>
      <text:p text:style-name="Code">&lt;span class="badge bg-success fs-6 me-3"&gt;&amp;nbsp;&amp;nbsp;&lt;/span&gt;</text:p>
      <text:p text:style-name="Code">&lt;span&gt;&lt;strong&gt;Zielony – Zwrócona pożyczka:&lt;/strong&gt; sprzęt pomyślnie zwrócony.&lt;/span&gt;</text:p>
      <text:p text:style-name="Code">&lt;/div&gt;</text:p>
      <text:p text:style-name="Code">&lt;div class="list-group-item d-flex align-items-center"&gt;</text:p>
      <text:p text:style-name="Code">&lt;span class="badge bg-danger fs-6 me-3"&gt;&amp;nbsp;&amp;nbsp;&lt;/span&gt;</text:p>
      <text:p text:style-name="Code">&lt;span&gt;&lt;strong&gt;Czerwony – Pożyczka przeterminowana:&lt;/strong&gt; sprzęt nie zwrócony w terminie.&lt;/span&gt;</text:p>
      <text:p text:style-name="Code">&lt;/div&gt;</text:p>
      <text:p text:style-name="Code">&lt;div class="list-group-item d-flex align-items-center"&gt;</text:p>
      <text:p text:style-name="Code">&lt;span class="badge fs-6 me-3" style="background:#fd7e14"&gt;&amp;nbsp;&amp;nbsp;&lt;/span&gt;</text:p>
      <text:p text:style-name="Code">&lt;span&gt;&lt;strong&gt;Pomarańczowy – Rezerwacja:&lt;/strong&gt; zarezerwowany przedział na miejscu.&lt;/span&gt;</text:p>
      <text:p text:style-name="Code">&lt;/div&gt;</text:p>
      <text:p text:style-name="Code">&lt;div class="list-group-item d-flex align-items-center bg-light"&gt;</text:p>
      <text:p text:style-name="Code">&lt;i class="bi bi-shield-lock-fill fs-3 text-primary me-3"&gt;&lt;/i&gt;</text:p>
      <text:p text:style-name="Code">&lt;span&gt;&lt;strong&gt;Uprawnienia:&lt;/strong&gt; &lt;strong&gt;LoanDesigner&lt;/strong&gt; zarządza katalogiem. &lt;strong&gt;LoanManager&lt;/strong&gt; zarządza pożyczkami i może przeglądać wszystkie rezerwacje. Każdy zalogowany członek może tworzyć rezerwacje na miejscu i przeglądać kalendarz.&lt;/span&gt;</text:p>
      <text:p text:style-name="Code">&lt;/div&gt;</text:p>
      <text:p text:style-name="Code">&lt;/div&gt;</text:p>
      <text:p text:style-name="Code">&lt;/section&gt;</text:p>
      <text:p text:style-name="Code"><text:span text:style-name="T16">&lt;/div&gt;</text:span><text:span text:style-name="T10">'</text:span>);</text:p>
      <text:p text:style-name="Code">SQL);</text:p>
      <text:p text:style-name="Code"/>
      <text:p text:style-name="Code"><text:span text:style-name="T9">return</text:span> <text:span text:style-name="T11">50</text:span><text:span text:style-name="T10">;</text:span></text:p>
      <text:p text:style-name="Code">}</text:p>
      <text:p text:style-name="Code">}</text:p>
      <text:h text:style-name="Heading_20_3" text:outline-level="3">Dans les vues</text:h>
      <text:p text:style-name="Code">{<text:span text:style-name="T9">layout </text:span><text:span text:style-name="T16">'../../Common/views/layout.latte'</text:span>}</text:p>
      <text:p text:style-name="Code"/>
      <text:p text:style-name="Code">{<text:span text:style-name="T9">block </text:span>navbar}</text:p>
      <text:p text:style-name="Code">{<text:span text:style-name="T9">include </text:span><text:span text:style-name="T16">'../../Webmaster/views/navbar/_userLeft.latte'</text:span>}</text:p>
      <text:p text:style-name="Code">{<text:span text:style-name="T9">/block</text:span>}</text:p>
      <text:p text:style-name="Code"/>
      <text:p text:style-name="Code">{<text:span text:style-name="T9">block </text:span>content}</text:p>
      <text:p text:style-name="Code"/>
      <text:p text:style-name="Code">{<text:span text:style-name="T9">include </text:span><text:span text:style-name="T16">'navTab.latte'</text:span>}</text:p>
      <text:p text:style-name="Code"/>
      <text:p text:style-name="Code"><text:span text:style-name="T17">&lt;</text:span><text:span text:style-name="T9">div</text:span><text:span text:style-name="T17"> </text:span><text:span text:style-name="T18">class</text:span><text:span text:style-name="T10">="</text:span><text:span text:style-name="T16">d-flex justify-content-between align-items-center mb-3</text:span><text:span text:style-name="T10">"</text:span><text:span text:style-name="T17">&gt;</text:span></text:p>
      <text:p text:style-name="Code"><text:span text:style-name="T17">&lt;</text:span><text:span text:style-name="T9">h2</text:span><text:span text:style-name="T17"> </text:span><text:span text:style-name="T18">class</text:span><text:span text:style-name="T10">="</text:span><text:span text:style-name="T16">h4 mb-0</text:span><text:span text:style-name="T10">"</text:span><text:span text:style-name="T17">&gt;</text:span></text:p>
      <text:p text:style-name="Code"><text:span text:style-name="T17">&lt;</text:span><text:span text:style-name="T9">i</text:span><text:span text:style-name="T17"> </text:span><text:span text:style-name="T18">class</text:span><text:span text:style-name="T10">="</text:span><text:span text:style-name="T16">bi bi-calendar-check me-2 text-warning</text:span><text:span text:style-name="T10">"</text:span><text:span text:style-name="T17">&gt;&lt;/</text:span><text:span text:style-name="T9">i</text:span><text:span text:style-name="T17">&gt;</text:span></text:p>
      <text:p text:style-name="Code">{<text:span text:style-name="T9">=</text:span>'loan.reservation.title'<text:span text:style-name="T9">|translate</text:span>}</text:p>
      <text:p text:style-name="Code"><text:span text:style-name="T17">&lt;/</text:span><text:span text:style-name="T9">h2</text:span><text:span text:style-name="T17">&gt;</text:span></text:p>
      <text:p text:style-name="Code"><text:span text:style-name="T17">&lt;</text:span><text:span text:style-name="T9">button</text:span><text:span text:style-name="T17"> </text:span><text:span text:style-name="T18">class</text:span><text:span text:style-name="T10">="</text:span><text:span text:style-name="T16">btn btn-primary btn-sm</text:span><text:span text:style-name="T10">"</text:span><text:span text:style-name="T17"> </text:span><text:span text:style-name="T18">id</text:span><text:span text:style-name="T10">="</text:span><text:span text:style-name="T16">btnAddReservation</text:span><text:span text:style-name="T10">"</text:span><text:span text:style-name="T17">&gt;</text:span></text:p>
      <text:p text:style-name="Code"><text:span text:style-name="T17">&lt;</text:span><text:span text:style-name="T9">i</text:span><text:span text:style-name="T17"> </text:span><text:span text:style-name="T18">class</text:span><text:span text:style-name="T10">="</text:span><text:span text:style-name="T16">bi bi-plus-lg</text:span><text:span text:style-name="T10">"</text:span><text:span text:style-name="T17">&gt;&lt;/</text:span><text:span text:style-name="T9">i</text:span><text:span text:style-name="T17">&gt;</text:span></text:p>
      <text:p text:style-name="Code"><text:span text:style-name="T17">&lt;/</text:span><text:span text:style-name="T9">button</text:span><text:span text:style-name="T17">&gt;</text:span></text:p>
      <text:p text:style-name="Code"><text:span text:style-name="T17">&lt;/</text:span><text:span text:style-name="T9">div</text:span><text:span text:style-name="T17">&gt;</text:span></text:p>
      <text:p text:style-name="Code"><text:soft-page-break/></text:p>
      <text:p text:style-name="Code"><text:span text:style-name="T17">&lt;</text:span><text:span text:style-name="T9">div</text:span><text:span text:style-name="T17"> </text:span><text:span text:style-name="T18">id</text:span><text:span text:style-name="T10">="</text:span><text:span text:style-name="T16">resAlert</text:span><text:span text:style-name="T10">"</text:span><text:span text:style-name="T17"> </text:span><text:span text:style-name="T18">class</text:span><text:span text:style-name="T10">="</text:span><text:span text:style-name="T16">alert d-none</text:span><text:span text:style-name="T10">"</text:span><text:span text:style-name="T17"> </text:span><text:span text:style-name="T18">role</text:span><text:span text:style-name="T10">="</text:span><text:span text:style-name="T16">alert</text:span><text:span text:style-name="T10">"</text:span><text:span text:style-name="T17">&gt;&lt;/</text:span><text:span text:style-name="T9">div</text:span><text:span text:style-name="T17">&gt;</text:span></text:p>
      <text:p text:style-name="Code"/>
      <text:p text:style-name="Code"><text:span text:style-name="T17">&lt;</text:span><text:span text:style-name="T9">div</text:span><text:span text:style-name="T17"> </text:span><text:span text:style-name="T18">class</text:span><text:span text:style-name="T10">="</text:span><text:span text:style-name="T16">card shadow-sm</text:span><text:span text:style-name="T10">"</text:span><text:span text:style-name="T17">&gt;</text:span></text:p>
      <text:p text:style-name="Code"><text:span text:style-name="T17">&lt;</text:span><text:span text:style-name="T9">div</text:span><text:span text:style-name="T17"> </text:span><text:span text:style-name="T18">class</text:span><text:span text:style-name="T10">="</text:span><text:span text:style-name="T16">card-body p-0</text:span><text:span text:style-name="T10">"</text:span><text:span text:style-name="T17">&gt;</text:span></text:p>
      <text:p text:style-name="Code"><text:span text:style-name="T17">&lt;</text:span><text:span text:style-name="T9">table</text:span><text:span text:style-name="T17"> </text:span><text:span text:style-name="T18">class</text:span><text:span text:style-name="T10">="</text:span><text:span text:style-name="T16">table table-hover table-striped mb-0</text:span><text:span text:style-name="T10">"</text:span><text:span text:style-name="T17"> </text:span><text:span text:style-name="T18">id</text:span><text:span text:style-name="T10">="</text:span><text:span text:style-name="T16">tblReservations</text:span><text:span text:style-name="T10">"</text:span><text:span text:style-name="T17">&gt;</text:span></text:p>
      <text:p text:style-name="Code"><text:span text:style-name="T17">&lt;</text:span><text:span text:style-name="T9">thead</text:span><text:span text:style-name="T17"> </text:span><text:span text:style-name="T18">class</text:span><text:span text:style-name="T10">="</text:span><text:span text:style-name="T16">table-dark</text:span><text:span text:style-name="T10">"</text:span><text:span text:style-name="T17">&gt;</text:span></text:p>
      <text:p text:style-name="Code"><text:span text:style-name="T17">&lt;</text:span><text:span text:style-name="T9">tr</text:span><text:span text:style-name="T17">&gt;</text:span></text:p>
      <text:p text:style-name="Code"><text:span text:style-name="T17">&lt;</text:span><text:span text:style-name="T9">th</text:span><text:span text:style-name="T17">&gt;</text:span>{<text:span text:style-name="T9">=</text:span>'loan.reservation.item'<text:span text:style-name="T9">|translate</text:span>}<text:span text:style-name="T17">&lt;/</text:span><text:span text:style-name="T9">th</text:span><text:span text:style-name="T17">&gt;</text:span></text:p>
      <text:p text:style-name="Code">{<text:span text:style-name="T9">if </text:span><text:span text:style-name="T14">$isManager</text:span>}<text:span text:style-name="T17">&lt;</text:span><text:span text:style-name="T9">th</text:span><text:span text:style-name="T17">&gt;</text:span>Utilisateur<text:span text:style-name="T17">&lt;/</text:span><text:span text:style-name="T9">th</text:span><text:span text:style-name="T17">&gt;</text:span>{<text:span text:style-name="T9">/if</text:span>}</text:p>
      <text:p text:style-name="Code"><text:span text:style-name="T17">&lt;</text:span><text:span text:style-name="T9">th</text:span><text:span text:style-name="T17">&gt;</text:span>{<text:span text:style-name="T9">=</text:span>'loan.reservation.date'<text:span text:style-name="T9">|translate</text:span>}<text:span text:style-name="T17">&lt;/</text:span><text:span text:style-name="T9">th</text:span><text:span text:style-name="T17">&gt;</text:span></text:p>
      <text:p text:style-name="Code"><text:span text:style-name="T17">&lt;</text:span><text:span text:style-name="T9">th</text:span><text:span text:style-name="T17">&gt;</text:span>{<text:span text:style-name="T9">=</text:span>'loan.reservation.start'<text:span text:style-name="T9">|translate</text:span>}<text:span text:style-name="T17">&lt;/</text:span><text:span text:style-name="T9">th</text:span><text:span text:style-name="T17">&gt;</text:span></text:p>
      <text:p text:style-name="Code"><text:span text:style-name="T17">&lt;</text:span><text:span text:style-name="T9">th</text:span><text:span text:style-name="T17">&gt;</text:span>{<text:span text:style-name="T9">=</text:span>'loan.reservation.end'<text:span text:style-name="T9">|translate</text:span>}<text:span text:style-name="T17">&lt;/</text:span><text:span text:style-name="T9">th</text:span><text:span text:style-name="T17">&gt;</text:span></text:p>
      <text:p text:style-name="Code"><text:span text:style-name="T17">&lt;</text:span><text:span text:style-name="T9">th</text:span><text:span text:style-name="T17"> </text:span><text:span text:style-name="T18">class</text:span><text:span text:style-name="T10">="</text:span><text:span text:style-name="T16">text-center</text:span><text:span text:style-name="T10">"</text:span><text:span text:style-name="T17">&gt;</text:span>{<text:span text:style-name="T9">=</text:span>'loan.reservation.quantity'<text:span text:style-name="T9">|translate</text:span>}<text:span text:style-name="T17">&lt;/</text:span><text:span text:style-name="T9">th</text:span><text:span text:style-name="T17">&gt;</text:span></text:p>
      <text:p text:style-name="Code"><text:span text:style-name="T17">&lt;</text:span><text:span text:style-name="T9">th</text:span><text:span text:style-name="T17">&gt;</text:span>{<text:span text:style-name="T9">=</text:span>'loan.reservation.status'<text:span text:style-name="T9">|translate</text:span>}<text:span text:style-name="T17">&lt;/</text:span><text:span text:style-name="T9">th</text:span><text:span text:style-name="T17">&gt;</text:span></text:p>
      <text:p text:style-name="Code"><text:span text:style-name="T17">&lt;</text:span><text:span text:style-name="T9">th</text:span><text:span text:style-name="T17"> </text:span><text:span text:style-name="T18">class</text:span><text:span text:style-name="T10">="</text:span><text:span text:style-name="T16">text-end</text:span><text:span text:style-name="T10">"</text:span><text:span text:style-name="T17">&gt;&lt;/</text:span><text:span text:style-name="T9">th</text:span><text:span text:style-name="T17">&gt;</text:span></text:p>
      <text:p text:style-name="Code"><text:span text:style-name="T17">&lt;/</text:span><text:span text:style-name="T9">tr</text:span><text:span text:style-name="T17">&gt;</text:span></text:p>
      <text:p text:style-name="Code"><text:span text:style-name="T17">&lt;/</text:span><text:span text:style-name="T9">thead</text:span><text:span text:style-name="T17">&gt;</text:span></text:p>
      <text:p text:style-name="Code"><text:span text:style-name="T17">&lt;</text:span><text:span text:style-name="T9">tbody</text:span><text:span text:style-name="T17">&gt;</text:span></text:p>
      <text:p text:style-name="Code">{<text:span text:style-name="T9">foreach </text:span><text:span text:style-name="T14">$reservations </text:span><text:span text:style-name="T10">as </text:span><text:span text:style-name="T14">$res</text:span>}</text:p>
      <text:p text:style-name="Code"><text:span text:style-name="T17">&lt;</text:span><text:span text:style-name="T9">tr</text:span><text:span text:style-name="T17"> </text:span><text:span text:style-name="T18">data-id</text:span><text:span text:style-name="T10">="</text:span><text:span text:style-name="T16">{</text:span><text:span text:style-name="T14">$res</text:span><text:span text:style-name="T16">['Id']}</text:span><text:span text:style-name="T10">"</text:span><text:span text:style-name="T17"> </text:span><text:span text:style-name="T18">data-status</text:span><text:span text:style-name="T10">="</text:span><text:span text:style-name="T16">{</text:span><text:span text:style-name="T14">$res</text:span><text:span text:style-name="T16">['Status']}</text:span><text:span text:style-name="T10">"</text:span><text:span text:style-name="T17">&gt;</text:span></text:p>
      <text:p text:style-name="Code"><text:span text:style-name="T17">&lt;</text:span><text:span text:style-name="T9">td</text:span><text:span text:style-name="T17"> </text:span><text:span text:style-name="T18">class</text:span><text:span text:style-name="T10">="</text:span><text:span text:style-name="T16">fw-semibold</text:span><text:span text:style-name="T10">"</text:span><text:span text:style-name="T17">&gt;</text:span>{<text:span text:style-name="T14">$res</text:span><text:span text:style-name="T10">[</text:span><text:span text:style-name="T16">'ItemName'</text:span><text:span text:style-name="T10">]</text:span>}<text:span text:style-name="T17">&lt;/</text:span><text:span text:style-name="T9">td</text:span><text:span text:style-name="T17">&gt;</text:span></text:p>
      <text:p text:style-name="Code">{<text:span text:style-name="T9">if </text:span><text:span text:style-name="T14">$isManager</text:span>}<text:span text:style-name="T17">&lt;</text:span><text:span text:style-name="T9">td</text:span><text:span text:style-name="T17"> </text:span><text:span text:style-name="T18">class</text:span><text:span text:style-name="T10">="</text:span><text:span text:style-name="T16">text-muted small</text:span><text:span text:style-name="T10">"</text:span><text:span text:style-name="T17">&gt;</text:span>{<text:span text:style-name="T14">$res</text:span><text:span text:style-name="T10">[</text:span><text:span text:style-name="T16">'UserName'</text:span><text:span text:style-name="T10">]</text:span>}<text:span text:style-name="T17">&lt;/</text:span><text:span text:style-name="T9">td</text:span><text:span text:style-name="T17">&gt;</text:span>{<text:span text:style-name="T9">/if</text:span>}</text:p>
      <text:p text:style-name="Code"><text:span text:style-name="T17">&lt;</text:span><text:span text:style-name="T9">td</text:span><text:span text:style-name="T17">&gt;</text:span>{<text:span text:style-name="T14">$res</text:span><text:span text:style-name="T10">[</text:span><text:span text:style-name="T16">'ReservationDate'</text:span><text:span text:style-name="T10">]</text:span>}<text:span text:style-name="T17">&lt;/</text:span><text:span text:style-name="T9">td</text:span><text:span text:style-name="T17">&gt;</text:span></text:p>
      <text:p text:style-name="Code"><text:span text:style-name="T17">&lt;</text:span><text:span text:style-name="T9">td</text:span><text:span text:style-name="T17">&gt;</text:span>{<text:span text:style-name="T14">$res</text:span><text:span text:style-name="T10">[</text:span><text:span text:style-name="T16">'StartTime'</text:span><text:span text:style-name="T10">]</text:span>}<text:span text:style-name="T17">&lt;/</text:span><text:span text:style-name="T9">td</text:span><text:span text:style-name="T17">&gt;</text:span></text:p>
      <text:p text:style-name="Code"><text:span text:style-name="T17">&lt;</text:span><text:span text:style-name="T9">td</text:span><text:span text:style-name="T17">&gt;</text:span>{<text:span text:style-name="T14">$res</text:span><text:span text:style-name="T10">[</text:span><text:span text:style-name="T16">'EndTime'</text:span><text:span text:style-name="T10">]</text:span>}<text:span text:style-name="T17">&lt;/</text:span><text:span text:style-name="T9">td</text:span><text:span text:style-name="T17">&gt;</text:span></text:p>
      <text:p text:style-name="Code"><text:span text:style-name="T17">&lt;</text:span><text:span text:style-name="T9">td</text:span><text:span text:style-name="T17"> </text:span><text:span text:style-name="T18">class</text:span><text:span text:style-name="T10">="</text:span><text:span text:style-name="T16">text-center</text:span><text:span text:style-name="T10">"</text:span><text:span text:style-name="T17">&gt;</text:span>{<text:span text:style-name="T14">$res</text:span><text:span text:style-name="T10">[</text:span><text:span text:style-name="T16">'QuantityReserved'</text:span><text:span text:style-name="T10">]</text:span>}<text:span text:style-name="T17">&lt;/</text:span><text:span text:style-name="T9">td</text:span><text:span text:style-name="T17">&gt;</text:span></text:p>
      <text:p text:style-name="Code"><text:span text:style-name="T17">&lt;</text:span><text:span text:style-name="T9">td</text:span><text:span text:style-name="T17">&gt;</text:span></text:p>
      <text:p text:style-name="Code">{<text:span text:style-name="T9">if </text:span><text:span text:style-name="T14">$res</text:span><text:span text:style-name="T10">[</text:span><text:span text:style-name="T16">'Status'</text:span><text:span text:style-name="T10">]</text:span> <text:span text:style-name="T10">=== </text:span><text:span text:style-name="T16">'active'</text:span>}</text:p>
      <text:p text:style-name="Code"><text:span text:style-name="T17">&lt;</text:span><text:span text:style-name="T9">span</text:span><text:span text:style-name="T17"> </text:span><text:span text:style-name="T18">class</text:span><text:span text:style-name="T10">="</text:span><text:span text:style-name="T16">badge bg-success</text:span><text:span text:style-name="T10">"</text:span><text:span text:style-name="T17">&gt;</text:span></text:p>
      <text:p text:style-name="Code">{<text:span text:style-name="T9">=</text:span>'loan.reservation.status.active'<text:span text:style-name="T9">|translate</text:span>}</text:p>
      <text:p text:style-name="Code"><text:span text:style-name="T17">&lt;/</text:span><text:span text:style-name="T9">span</text:span><text:span text:style-name="T17">&gt;</text:span></text:p>
      <text:p text:style-name="Code">{<text:span text:style-name="T9">else</text:span>}</text:p>
      <text:p text:style-name="Code"><text:span text:style-name="T17">&lt;</text:span><text:span text:style-name="T9">span</text:span><text:span text:style-name="T17"> </text:span><text:span text:style-name="T18">class</text:span><text:span text:style-name="T10">="</text:span><text:span text:style-name="T16">badge bg-secondary</text:span><text:span text:style-name="T10">"</text:span><text:span text:style-name="T17">&gt;</text:span></text:p>
      <text:p text:style-name="Code">{<text:span text:style-name="T9">=</text:span>'loan.reservation.status.cancelled'<text:span text:style-name="T9">|translate</text:span>}</text:p>
      <text:p text:style-name="Code"><text:span text:style-name="T17">&lt;/</text:span><text:span text:style-name="T9">span</text:span><text:span text:style-name="T17">&gt;</text:span></text:p>
      <text:p text:style-name="Code">{<text:span text:style-name="T9">/if</text:span>}</text:p>
      <text:p text:style-name="Code"><text:span text:style-name="T17">&lt;/</text:span><text:span text:style-name="T9">td</text:span><text:span text:style-name="T17">&gt;</text:span></text:p>
      <text:p text:style-name="Code"><text:span text:style-name="T17">&lt;</text:span><text:span text:style-name="T9">td</text:span><text:span text:style-name="T17"> </text:span><text:span text:style-name="T18">class</text:span><text:span text:style-name="T10">="</text:span><text:span text:style-name="T16">text-end text-nowrap</text:span><text:span text:style-name="T10">"</text:span><text:span text:style-name="T17">&gt;</text:span></text:p>
      <text:p text:style-name="Code">{<text:span text:style-name="T9">if </text:span><text:span text:style-name="T14">$res</text:span><text:span text:style-name="T10">[</text:span><text:span text:style-name="T16">'Status'</text:span><text:span text:style-name="T10">]</text:span> <text:span text:style-name="T10">=== </text:span><text:span text:style-name="T16">'active'</text:span>}</text:p>
      <text:p text:style-name="Code"><text:span text:style-name="T17">&lt;</text:span><text:span text:style-name="T9">button</text:span><text:span text:style-name="T17"> </text:span><text:span text:style-name="T18">class</text:span><text:span text:style-name="T10">="</text:span><text:span text:style-name="T16">btn btn-sm btn-warning btn-edit-res me-1</text:span><text:span text:style-name="T10">"</text:span></text:p>
      <text:p text:style-name="Code"><text:span text:style-name="T18">data-id</text:span><text:span text:style-name="T10">="</text:span><text:span text:style-name="T16">{</text:span><text:span text:style-name="T14">$res</text:span><text:span text:style-name="T16">['Id']}</text:span><text:span text:style-name="T10">"</text:span><text:span text:style-name="T17">&gt;</text:span></text:p>
      <text:p text:style-name="Code"><text:span text:style-name="T17">&lt;</text:span><text:span text:style-name="T9">i</text:span><text:span text:style-name="T17"> </text:span><text:span text:style-name="T18">class</text:span><text:span text:style-name="T10">="</text:span><text:span text:style-name="T16">bi bi-pencil</text:span><text:span text:style-name="T10">"</text:span><text:span text:style-name="T17">&gt;&lt;/</text:span><text:span text:style-name="T9">i</text:span><text:span text:style-name="T17">&gt;</text:span></text:p>
      <text:p text:style-name="Code"><text:span text:style-name="T17">&lt;/</text:span><text:span text:style-name="T9">button</text:span><text:span text:style-name="T17">&gt;</text:span></text:p>
      <text:p text:style-name="Code"><text:span text:style-name="T17">&lt;</text:span><text:span text:style-name="T9">button</text:span><text:span text:style-name="T17"> </text:span><text:span text:style-name="T18">class</text:span><text:span text:style-name="T10">="</text:span><text:span text:style-name="T16">btn btn-sm btn-danger btn-cancel-res</text:span><text:span text:style-name="T10">"</text:span></text:p>
      <text:p text:style-name="Code"><text:span text:style-name="T18">data-id</text:span><text:span text:style-name="T10">="</text:span><text:span text:style-name="T16">{</text:span><text:span text:style-name="T14">$res</text:span><text:span text:style-name="T16">['Id']}</text:span><text:span text:style-name="T10">"</text:span><text:span text:style-name="T17">&gt;</text:span></text:p>
      <text:p text:style-name="Code"><text:span text:style-name="T17">&lt;</text:span><text:span text:style-name="T9">i</text:span><text:span text:style-name="T17"> </text:span><text:span text:style-name="T18">class</text:span><text:span text:style-name="T10">="</text:span><text:span text:style-name="T16">bi bi-trash</text:span><text:span text:style-name="T10">"</text:span><text:span text:style-name="T17">&gt;&lt;/</text:span><text:span text:style-name="T9">i</text:span><text:span text:style-name="T17">&gt;</text:span></text:p>
      <text:p text:style-name="Code"><text:span text:style-name="T17">&lt;/</text:span><text:span text:style-name="T9">button</text:span><text:span text:style-name="T17">&gt;</text:span></text:p>
      <text:p text:style-name="Code">{<text:span text:style-name="T9">/if</text:span>}</text:p>
      <text:p text:style-name="Code"><text:span text:style-name="T17">&lt;/</text:span><text:span text:style-name="T9">td</text:span><text:span text:style-name="T17">&gt;</text:span></text:p>
      <text:p text:style-name="Code"><text:span text:style-name="T17">&lt;/</text:span><text:span text:style-name="T9">tr</text:span><text:span text:style-name="T17">&gt;</text:span></text:p>
      <text:p text:style-name="Code">{<text:span text:style-name="T9">else</text:span>}</text:p>
      <text:p text:style-name="Code"><text:span text:style-name="T17">&lt;</text:span><text:span text:style-name="T9">tr</text:span><text:span text:style-name="T17">&gt;</text:span></text:p>
      <text:p text:style-name="Code"><text:span text:style-name="T17">&lt;</text:span><text:span text:style-name="T9">td</text:span><text:span text:style-name="T17"> </text:span><text:span text:style-name="T18">colspan</text:span><text:span text:style-name="T10">="</text:span><text:span text:style-name="T16">{</text:span><text:span text:style-name="T9">if </text:span><text:span text:style-name="T14">$isManager</text:span><text:span text:style-name="T16">}8{</text:span><text:span text:style-name="T9">else</text:span><text:span text:style-name="T16">}7{</text:span><text:span text:style-name="T9">/if</text:span><text:span text:style-name="T16">}</text:span><text:span text:style-name="T10">"</text:span><text:span text:style-name="T17"> </text:span><text:span text:style-name="T18">class</text:span><text:span text:style-name="T10">="</text:span><text:span text:style-name="T16">text-center text-muted py-4</text:span><text:span text:style-name="T10">"</text:span><text:span text:style-name="T17">&gt;</text:span></text:p>
      <text:p text:style-name="Code">{<text:span text:style-name="T9">=</text:span>'loan.reservation.no_reservations'<text:span text:style-name="T9">|translate</text:span>}</text:p>
      <text:p text:style-name="Code"><text:span text:style-name="T17">&lt;/</text:span><text:span text:style-name="T9">td</text:span><text:span text:style-name="T17">&gt;</text:span></text:p>
      <text:p text:style-name="Code"><text:span text:style-name="T17">&lt;/</text:span><text:span text:style-name="T9">tr</text:span><text:span text:style-name="T17">&gt;</text:span></text:p>
      <text:p text:style-name="Code"><text:soft-page-break/>{<text:span text:style-name="T9">/foreach</text:span>}</text:p>
      <text:p text:style-name="Code"><text:span text:style-name="T17">&lt;/</text:span><text:span text:style-name="T9">tbody</text:span><text:span text:style-name="T17">&gt;</text:span></text:p>
      <text:p text:style-name="Code"><text:span text:style-name="T17">&lt;/</text:span><text:span text:style-name="T9">table</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gt;</text:span></text:p>
      <text:p text:style-name="Code"/>
      <text:p text:style-name="Code">{* ── Modal réservation ────────────────────────────────────────────── *}</text:p>
      <text:p text:style-name="Code"><text:span text:style-name="T17">&lt;</text:span><text:span text:style-name="T9">div</text:span><text:span text:style-name="T17"> </text:span><text:span text:style-name="T18">class</text:span><text:span text:style-name="T10">="</text:span><text:span text:style-name="T16">modal fade</text:span><text:span text:style-name="T10">"</text:span><text:span text:style-name="T17"> </text:span><text:span text:style-name="T18">id</text:span><text:span text:style-name="T10">="</text:span><text:span text:style-name="T16">modalRes</text:span><text:span text:style-name="T10">"</text:span><text:span text:style-name="T17"> </text:span><text:span text:style-name="T18">tabindex</text:span><text:span text:style-name="T10">="</text:span><text:span text:style-name="T16">-1</text:span><text:span text:style-name="T10">"</text:span><text:span text:style-name="T17"> </text:span><text:span text:style-name="T18">aria-labelledby</text:span><text:span text:style-name="T10">="</text:span><text:span text:style-name="T16">modalResLabel</text:span><text:span text:style-name="T10">"</text:span><text:span text:style-name="T17"> </text:span><text:span text:style-name="T18">aria-hidden</text:span><text:span text:style-name="T10">="</text:span><text:span text:style-name="T16">true</text:span><text:span text:style-name="T10">"</text:span><text:span text:style-name="T17">&gt;</text:span></text:p>
      <text:p text:style-name="Code"><text:span text:style-name="T17">&lt;</text:span><text:span text:style-name="T9">div</text:span><text:span text:style-name="T17"> </text:span><text:span text:style-name="T18">class</text:span><text:span text:style-name="T10">="</text:span><text:span text:style-name="T16">modal-dialog modal-lg</text:span><text:span text:style-name="T10">"</text:span><text:span text:style-name="T17">&gt;</text:span></text:p>
      <text:p text:style-name="Code"><text:span text:style-name="T17">&lt;</text:span><text:span text:style-name="T9">div</text:span><text:span text:style-name="T17"> </text:span><text:span text:style-name="T18">class</text:span><text:span text:style-name="T10">="</text:span><text:span text:style-name="T16">modal-content</text:span><text:span text:style-name="T10">"</text:span><text:span text:style-name="T17">&gt;</text:span></text:p>
      <text:p text:style-name="Code"><text:span text:style-name="T17">&lt;</text:span><text:span text:style-name="T9">div</text:span><text:span text:style-name="T17"> </text:span><text:span text:style-name="T18">class</text:span><text:span text:style-name="T10">="</text:span><text:span text:style-name="T16">modal-header</text:span><text:span text:style-name="T10">"</text:span><text:span text:style-name="T17">&gt;</text:span></text:p>
      <text:p text:style-name="Code"><text:span text:style-name="T17">&lt;</text:span><text:span text:style-name="T9">h5</text:span><text:span text:style-name="T17"> </text:span><text:span text:style-name="T18">class</text:span><text:span text:style-name="T10">="</text:span><text:span text:style-name="T16">modal-title</text:span><text:span text:style-name="T10">"</text:span><text:span text:style-name="T17"> </text:span><text:span text:style-name="T18">id</text:span><text:span text:style-name="T10">="</text:span><text:span text:style-name="T16">modalResLabel</text:span><text:span text:style-name="T10">"</text:span><text:span text:style-name="T17">&gt;&lt;/</text:span><text:span text:style-name="T9">h5</text:span><text:span text:style-name="T17">&gt;</text:span></text:p>
      <text:p text:style-name="Code"><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close</text:span><text:span text:style-name="T10">"</text:span><text:span text:style-name="T17"> </text:span><text:span text:style-name="T18">data-bs-dismiss</text:span><text:span text:style-name="T10">="</text:span><text:span text:style-name="T16">modal</text:span><text:span text:style-name="T10">"</text:span><text:span text:style-name="T17">&gt;&lt;/</text:span><text:span text:style-name="T9">button</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 </text:span><text:span text:style-name="T18">class</text:span><text:span text:style-name="T10">="</text:span><text:span text:style-name="T16">modal-body</text:span><text:span text:style-name="T10">"</text:span><text:span text:style-name="T17">&gt;</text:span></text:p>
      <text:p text:style-name="Code"><text:span text:style-name="T17">&lt;</text:span><text:span text:style-name="T9">input</text:span><text:span text:style-name="T17"> </text:span><text:span text:style-name="T18">type</text:span><text:span text:style-name="T10">="</text:span><text:span text:style-name="T16">hidden</text:span><text:span text:style-name="T10">"</text:span><text:span text:style-name="T17"> </text:span><text:span text:style-name="T18">id</text:span><text:span text:style-name="T10">="</text:span><text:span text:style-name="T16">resId</text:span><text:span text:style-name="T10">"</text:span><text:span text:style-name="T17">&gt;</text:span></text:p>
      <text:p text:style-name="Code"><text:span text:style-name="T17">&lt;</text:span><text:span text:style-name="T9">div</text:span><text:span text:style-name="T17"> </text:span><text:span text:style-name="T18">class</text:span><text:span text:style-name="T10">="</text:span><text:span text:style-name="T16">row g-3</text:span><text:span text:style-name="T10">"</text:span><text:span text:style-name="T17">&gt;</text:span></text:p>
      <text:p text:style-name="Code"><text:span text:style-name="T17">&lt;</text:span><text:span text:style-name="T9">div</text:span><text:span text:style-name="T17"> </text:span><text:span text:style-name="T18">class</text:span><text:span text:style-name="T10">="</text:span><text:span text:style-name="T16">col-md-7</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 fw-semibold</text:span><text:span text:style-name="T10">"</text:span><text:span text:style-name="T17"> </text:span><text:span text:style-name="T18">for</text:span><text:span text:style-name="T10">="</text:span><text:span text:style-name="T16">resItem</text:span><text:span text:style-name="T10">"</text:span><text:span text:style-name="T17">&gt;</text:span></text:p>
      <text:p text:style-name="Code">{<text:span text:style-name="T9">=</text:span>'loan.reservation.item'<text:span text:style-name="T9">|translate</text:span>} <text:span text:style-name="T17">&lt;</text:span><text:span text:style-name="T9">span</text:span><text:span text:style-name="T17"> </text:span><text:span text:style-name="T18">class</text:span><text:span text:style-name="T10">="</text:span><text:span text:style-name="T16">text-danger</text:span><text:span text:style-name="T10">"</text:span><text:span text:style-name="T17">&gt;</text:span>*<text:span text:style-name="T17">&lt;/</text:span><text:span text:style-name="T9">span</text:span><text:span text:style-name="T17">&gt;</text:span></text:p>
      <text:p text:style-name="Code"><text:span text:style-name="T17">&lt;/</text:span><text:span text:style-name="T9">label</text:span><text:span text:style-name="T17">&gt;</text:span></text:p>
      <text:p text:style-name="Code"><text:span text:style-name="T17">&lt;</text:span><text:span text:style-name="T9">select</text:span><text:span text:style-name="T17"> </text:span><text:span text:style-name="T18">class</text:span><text:span text:style-name="T10">="</text:span><text:span text:style-name="T16">form-select</text:span><text:span text:style-name="T10">"</text:span><text:span text:style-name="T17"> </text:span><text:span text:style-name="T18">id</text:span><text:span text:style-name="T10">="</text:span><text:span text:style-name="T16">resItem</text:span><text:span text:style-name="T10">"</text:span><text:span text:style-name="T17"> </text:span><text:span text:style-name="T18">required</text:span><text:span text:style-name="T17">&gt;</text:span></text:p>
      <text:p text:style-name="Code"><text:span text:style-name="T17">&lt;</text:span><text:span text:style-name="T9">option</text:span><text:span text:style-name="T17"> </text:span><text:span text:style-name="T18">value</text:span><text:span text:style-name="T10">=""</text:span><text:span text:style-name="T17">&gt;</text:span>–<text:span text:style-name="T17">&lt;/</text:span><text:span text:style-name="T9">option</text:span><text:span text:style-name="T17">&gt;</text:span></text:p>
      <text:p text:style-name="Code">{<text:span text:style-name="T9">foreach </text:span><text:span text:style-name="T14">$reservationItems </text:span><text:span text:style-name="T10">as </text:span><text:span text:style-name="T14">$item</text:span>}</text:p>
      <text:p text:style-name="Code"><text:span text:style-name="T17">&lt;</text:span><text:span text:style-name="T9">option</text:span><text:span text:style-name="T17"> </text:span><text:span text:style-name="T18">value</text:span><text:span text:style-name="T10">="</text:span><text:span text:style-name="T16">{</text:span><text:span text:style-name="T14">$item</text:span><text:span text:style-name="T16">['Id']}</text:span><text:span text:style-name="T10">"</text:span><text:span text:style-name="T17"> </text:span><text:span text:style-name="T18">data-qty</text:span><text:span text:style-name="T10">="</text:span><text:span text:style-name="T16">{</text:span><text:span text:style-name="T14">$item</text:span><text:span text:style-name="T16">['Quantity']}</text:span><text:span text:style-name="T10">"</text:span><text:span text:style-name="T17">&gt;</text:span>{<text:span text:style-name="T14">$item</text:span><text:span text:style-name="T10">[</text:span><text:span text:style-name="T16">'Name'</text:span><text:span text:style-name="T10">]</text:span>}<text:span text:style-name="T17">&lt;/</text:span><text:span text:style-name="T9">option</text:span><text:span text:style-name="T17">&gt;</text:span></text:p>
      <text:p text:style-name="Code">{<text:span text:style-name="T9">/foreach</text:span>}</text:p>
      <text:p text:style-name="Code"><text:span text:style-name="T17">&lt;/</text:span><text:span text:style-name="T9">select</text:span><text:span text:style-name="T17">&gt;</text:span></text:p>
      <text:p text:style-name="Code"><text:span text:style-name="T17">&lt;</text:span><text:span text:style-name="T9">div</text:span><text:span text:style-name="T17"> </text:span><text:span text:style-name="T18">class</text:span><text:span text:style-name="T10">="</text:span><text:span text:style-name="T16">form-text</text:span><text:span text:style-name="T10">"</text:span><text:span text:style-name="T17"> </text:span><text:span text:style-name="T18">id</text:span><text:span text:style-name="T10">="</text:span><text:span text:style-name="T16">resItemAvail</text:span><text:span text:style-name="T10">"</text:span><text:span text:style-name="T17">&gt;&lt;/</text:span><text:span text:style-name="T9">div</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 </text:span><text:span text:style-name="T18">class</text:span><text:span text:style-name="T10">="</text:span><text:span text:style-name="T16">col-md-3</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 fw-semibold</text:span><text:span text:style-name="T10">"</text:span><text:span text:style-name="T17"> </text:span><text:span text:style-name="T18">for</text:span><text:span text:style-name="T10">="</text:span><text:span text:style-name="T16">resQty</text:span><text:span text:style-name="T10">"</text:span><text:span text:style-name="T17">&gt;</text:span></text:p>
      <text:p text:style-name="Code">{<text:span text:style-name="T9">=</text:span>'loan.reservation.quantity'<text:span text:style-name="T9">|translate</text:span>}</text:p>
      <text:p text:style-name="Code"><text:span text:style-name="T17">&lt;/</text:span><text:span text:style-name="T9">label</text:span><text:span text:style-name="T17">&gt;</text:span></text:p>
      <text:p text:style-name="Code"><text:span text:style-name="T17">&lt;</text:span><text:span text:style-name="T9">input</text:span><text:span text:style-name="T17"> </text:span><text:span text:style-name="T18">type</text:span><text:span text:style-name="T10">="</text:span><text:span text:style-name="T16">number</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resQty</text:span><text:span text:style-name="T10">"</text:span><text:span text:style-name="T17"> </text:span><text:span text:style-name="T18">min</text:span><text:span text:style-name="T10">="</text:span><text:span text:style-name="T16">1</text:span><text:span text:style-name="T10">"</text:span><text:span text:style-name="T17"> </text:span><text:span text:style-name="T18">value</text:span><text:span text:style-name="T10">="</text:span><text:span text:style-name="T16">1</text:span><text:span text:style-name="T10">"</text:span><text:span text:style-name="T17">&gt;</text:span></text:p>
      <text:p text:style-name="Code"><text:span text:style-name="T17">&lt;/</text:span><text:span text:style-name="T9">div</text:span><text:span text:style-name="T17">&gt;</text:span></text:p>
      <text:p text:style-name="Code">{<text:span text:style-name="T9">if </text:span><text:span text:style-name="T14">$isManager</text:span>}</text:p>
      <text:p text:style-name="Code"><text:span text:style-name="T17">&lt;</text:span><text:span text:style-name="T9">div</text:span><text:span text:style-name="T17"> </text:span><text:span text:style-name="T18">class</text:span><text:span text:style-name="T10">="</text:span><text:span text:style-name="T16">col-md-6</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 fw-semibold</text:span><text:span text:style-name="T10">"</text:span><text:span text:style-name="T17"> </text:span><text:span text:style-name="T18">for</text:span><text:span text:style-name="T10">="</text:span><text:span text:style-name="T16">resUser</text:span><text:span text:style-name="T10">"</text:span><text:span text:style-name="T17">&gt;</text:span>Utilisateur <text:span text:style-name="T17">&lt;</text:span><text:span text:style-name="T9">span</text:span><text:span text:style-name="T17"> </text:span><text:span text:style-name="T18">class</text:span><text:span text:style-name="T10">="</text:span><text:span text:style-name="T16">text-danger</text:span><text:span text:style-name="T10">"</text:span><text:span text:style-name="T17">&gt;</text:span>*<text:span text:style-name="T17">&lt;/</text:span><text:span text:style-name="T9">span</text:span><text:span text:style-name="T17">&gt;&lt;/</text:span><text:span text:style-name="T9">label</text:span><text:span text:style-name="T17">&gt;</text:span></text:p>
      <text:p text:style-name="Code"><text:span text:style-name="T17">&lt;</text:span><text:span text:style-name="T9">select</text:span><text:span text:style-name="T17"> </text:span><text:span text:style-name="T18">class</text:span><text:span text:style-name="T10">="</text:span><text:span text:style-name="T16">form-select</text:span><text:span text:style-name="T10">"</text:span><text:span text:style-name="T17"> </text:span><text:span text:style-name="T18">id</text:span><text:span text:style-name="T10">="</text:span><text:span text:style-name="T16">resUser</text:span><text:span text:style-name="T10">"</text:span><text:span text:style-name="T17">&gt;</text:span></text:p>
      <text:p text:style-name="Code"><text:span text:style-name="T17">&lt;</text:span><text:span text:style-name="T9">option</text:span><text:span text:style-name="T17"> </text:span><text:span text:style-name="T18">value</text:span><text:span text:style-name="T10">=""</text:span><text:span text:style-name="T17">&gt;</text:span>–<text:span text:style-name="T17">&lt;/</text:span><text:span text:style-name="T9">option</text:span><text:span text:style-name="T17">&gt;</text:span></text:p>
      <text:p text:style-name="Code">{<text:span text:style-name="T9">foreach </text:span><text:span text:style-name="T14">$persons </text:span><text:span text:style-name="T10">as </text:span><text:span text:style-name="T14">$p</text:span>}</text:p>
      <text:p text:style-name="Code"><text:span text:style-name="T17">&lt;</text:span><text:span text:style-name="T9">option</text:span><text:span text:style-name="T17"> </text:span><text:span text:style-name="T18">value</text:span><text:span text:style-name="T10">="</text:span><text:span text:style-name="T16">{</text:span><text:span text:style-name="T14">$p</text:span><text:span text:style-name="T16">['Id']}</text:span><text:span text:style-name="T10">"</text:span><text:span text:style-name="T17">&gt;</text:span>{<text:span text:style-name="T14">$p</text:span><text:span text:style-name="T10">[</text:span><text:span text:style-name="T16">'FullName'</text:span><text:span text:style-name="T10">]</text:span>}<text:span text:style-name="T17">&lt;/</text:span><text:span text:style-name="T9">option</text:span><text:span text:style-name="T17">&gt;</text:span></text:p>
      <text:p text:style-name="Code">{<text:span text:style-name="T9">/foreach</text:span>}</text:p>
      <text:p text:style-name="Code"><text:span text:style-name="T17">&lt;/</text:span><text:span text:style-name="T9">select</text:span><text:span text:style-name="T17">&gt;</text:span></text:p>
      <text:p text:style-name="Code"><text:span text:style-name="T17">&lt;/</text:span><text:span text:style-name="T9">div</text:span><text:span text:style-name="T17">&gt;</text:span></text:p>
      <text:p text:style-name="Code">{<text:span text:style-name="T9">/if</text:span>}</text:p>
      <text:p text:style-name="Code"><text:span text:style-name="T17">&lt;</text:span><text:span text:style-name="T9">div</text:span><text:span text:style-name="T17"> </text:span><text:span text:style-name="T18">class</text:span><text:span text:style-name="T10">="</text:span><text:span text:style-name="T16">col-md-6</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 fw-semibold</text:span><text:span text:style-name="T10">"</text:span><text:span text:style-name="T17"> </text:span><text:span text:style-name="T18">for</text:span><text:span text:style-name="T10">="</text:span><text:span text:style-name="T16">resDate</text:span><text:span text:style-name="T10">"</text:span><text:span text:style-name="T17">&gt;</text:span></text:p>
      <text:p text:style-name="Code">{<text:span text:style-name="T9">=</text:span>'loan.reservation.date'<text:span text:style-name="T9">|translate</text:span>} <text:span text:style-name="T17">&lt;</text:span><text:span text:style-name="T9">span</text:span><text:span text:style-name="T17"> </text:span><text:span text:style-name="T18">class</text:span><text:span text:style-name="T10">="</text:span><text:span text:style-name="T16">text-danger</text:span><text:span text:style-name="T10">"</text:span><text:span text:style-name="T17">&gt;</text:span>*<text:span text:style-name="T17">&lt;/</text:span><text:span text:style-name="T9">span</text:span><text:span text:style-name="T17">&gt;</text:span></text:p>
      <text:p text:style-name="Code"><text:span text:style-name="T17">&lt;/</text:span><text:span text:style-name="T9">label</text:span><text:span text:style-name="T17">&gt;</text:span></text:p>
      <text:p text:style-name="Code"><text:span text:style-name="T17">&lt;</text:span><text:span text:style-name="T9">input</text:span><text:span text:style-name="T17"> </text:span><text:span text:style-name="T18">type</text:span><text:span text:style-name="T10">="</text:span><text:span text:style-name="T16">date</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resDate</text:span><text:span text:style-name="T10">"</text:span><text:span text:style-name="T17"> </text:span><text:span text:style-name="T18">required</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 </text:span><text:span text:style-name="T18">class</text:span><text:span text:style-name="T10">="</text:span><text:span text:style-name="T16">col-md-3</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 fw-semibold</text:span><text:span text:style-name="T10">"</text:span><text:span text:style-name="T17"> </text:span><text:span text:style-name="T18">for</text:span><text:span text:style-name="T10">="</text:span><text:span text:style-name="T16">resStart</text:span><text:span text:style-name="T10">"</text:span><text:span text:style-name="T17">&gt;</text:span></text:p>
      <text:p text:style-name="Code">{<text:span text:style-name="T9">=</text:span>'loan.reservation.start'<text:span text:style-name="T9">|translate</text:span>}</text:p>
      <text:p text:style-name="Code"><text:soft-page-break/><text:span text:style-name="T17">&lt;/</text:span><text:span text:style-name="T9">label</text:span><text:span text:style-name="T17">&gt;</text:span></text:p>
      <text:p text:style-name="Code"><text:span text:style-name="T17">&lt;</text:span><text:span text:style-name="T9">input</text:span><text:span text:style-name="T17"> </text:span><text:span text:style-name="T18">type</text:span><text:span text:style-name="T10">="</text:span><text:span text:style-name="T16">time</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resStart</text:span><text:span text:style-name="T10">"</text:span><text:span text:style-name="T17"> </text:span><text:span text:style-name="T18">value</text:span><text:span text:style-name="T10">="</text:span><text:span text:style-name="T16">09:00</text:span><text:span text:style-name="T10">"</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 </text:span><text:span text:style-name="T18">class</text:span><text:span text:style-name="T10">="</text:span><text:span text:style-name="T16">col-md-3</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 fw-semibold</text:span><text:span text:style-name="T10">"</text:span><text:span text:style-name="T17"> </text:span><text:span text:style-name="T18">for</text:span><text:span text:style-name="T10">="</text:span><text:span text:style-name="T16">resEnd</text:span><text:span text:style-name="T10">"</text:span><text:span text:style-name="T17">&gt;</text:span></text:p>
      <text:p text:style-name="Code">{<text:span text:style-name="T9">=</text:span>'loan.reservation.end'<text:span text:style-name="T9">|translate</text:span>}</text:p>
      <text:p text:style-name="Code"><text:span text:style-name="T17">&lt;/</text:span><text:span text:style-name="T9">label</text:span><text:span text:style-name="T17">&gt;</text:span></text:p>
      <text:p text:style-name="Code"><text:span text:style-name="T17">&lt;</text:span><text:span text:style-name="T9">input</text:span><text:span text:style-name="T17"> </text:span><text:span text:style-name="T18">type</text:span><text:span text:style-name="T10">="</text:span><text:span text:style-name="T16">time</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resEnd</text:span><text:span text:style-name="T10">"</text:span><text:span text:style-name="T17"> </text:span><text:span text:style-name="T18">value</text:span><text:span text:style-name="T10">="</text:span><text:span text:style-name="T16">17:00</text:span><text:span text:style-name="T10">"</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 </text:span><text:span text:style-name="T18">class</text:span><text:span text:style-name="T10">="</text:span><text:span text:style-name="T16">col-12</text:span><text:span text:style-name="T10">"</text:span><text:span text:style-name="T17">&gt;</text:span></text:p>
      <text:p text:style-name="Code"><text:span text:style-name="T17">&lt;</text:span><text:span text:style-name="T9">label</text:span><text:span text:style-name="T17"> </text:span><text:span text:style-name="T18">class</text:span><text:span text:style-name="T10">="</text:span><text:span text:style-name="T16">form-label</text:span><text:span text:style-name="T10">"</text:span><text:span text:style-name="T17"> </text:span><text:span text:style-name="T18">for</text:span><text:span text:style-name="T10">="</text:span><text:span text:style-name="T16">resNotes</text:span><text:span text:style-name="T10">"</text:span><text:span text:style-name="T17">&gt;</text:span></text:p>
      <text:p text:style-name="Code">{<text:span text:style-name="T9">=</text:span>'loan.reservation.notes'<text:span text:style-name="T9">|translate</text:span>}</text:p>
      <text:p text:style-name="Code"><text:span text:style-name="T17">&lt;/</text:span><text:span text:style-name="T9">label</text:span><text:span text:style-name="T17">&gt;</text:span></text:p>
      <text:p text:style-name="Code"><text:span text:style-name="T17">&lt;</text:span><text:span text:style-name="T9">textarea</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resNotes</text:span><text:span text:style-name="T10">"</text:span><text:span text:style-name="T17"> </text:span><text:span text:style-name="T18">rows</text:span><text:span text:style-name="T10">="</text:span><text:span text:style-name="T16">2</text:span><text:span text:style-name="T10">"</text:span><text:span text:style-name="T17">&gt;&lt;/</text:span><text:span text:style-name="T9">textarea</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 </text:span><text:span text:style-name="T18">class</text:span><text:span text:style-name="T10">="</text:span><text:span text:style-name="T16">modal-footer</text:span><text:span text:style-name="T10">"</text:span><text:span text:style-name="T17">&gt;</text:span></text:p>
      <text:p text:style-name="Code"><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secondary</text:span><text:span text:style-name="T10">"</text:span><text:span text:style-name="T17"> </text:span><text:span text:style-name="T18">data-bs-dismiss</text:span><text:span text:style-name="T10">="</text:span><text:span text:style-name="T16">modal</text:span><text:span text:style-name="T10">"</text:span><text:span text:style-name="T17">&gt;</text:span></text:p>
      <text:p text:style-name="Code">{<text:span text:style-name="T9">=</text:span>'cancel'<text:span text:style-name="T9">|translate</text:span>}</text:p>
      <text:p text:style-name="Code"><text:span text:style-name="T17">&lt;/</text:span><text:span text:style-name="T9">button</text:span><text:span text:style-name="T17">&gt;</text:span></text:p>
      <text:p text:style-name="Code"><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warning text-white</text:span><text:span text:style-name="T10">"</text:span><text:span text:style-name="T17"> </text:span><text:span text:style-name="T18">id</text:span><text:span text:style-name="T10">="</text:span><text:span text:style-name="T16">btnSaveRes</text:span><text:span text:style-name="T10">"</text:span><text:span text:style-name="T17">&gt;</text:span></text:p>
      <text:p text:style-name="Code"><text:span text:style-name="T17">&lt;</text:span><text:span text:style-name="T9">span</text:span><text:span text:style-name="T17"> </text:span><text:span text:style-name="T18">class</text:span><text:span text:style-name="T10">="</text:span><text:span text:style-name="T16">spinner-border spinner-border-sm d-none me-1</text:span><text:span text:style-name="T10">"</text:span><text:span text:style-name="T17"> </text:span><text:span text:style-name="T18">id</text:span><text:span text:style-name="T10">="</text:span><text:span text:style-name="T16">saveResSpinner</text:span><text:span text:style-name="T10">"</text:span><text:span text:style-name="T17">&gt;&lt;/</text:span><text:span text:style-name="T9">span</text:span><text:span text:style-name="T17">&gt;</text:span></text:p>
      <text:p text:style-name="Code">{<text:span text:style-name="T9">=</text:span>'save'<text:span text:style-name="T9">|translate</text:span>}</text:p>
      <text:p text:style-name="Code"><text:span text:style-name="T17">&lt;/</text:span><text:span text:style-name="T9">button</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gt;</text:span></text:p>
      <text:p text:style-name="Code"><text:span text:style-name="T17">&lt;/</text:span><text:span text:style-name="T9">div</text:span><text:span text:style-name="T17">&gt;</text:span></text:p>
      <text:p text:style-name="Code"/>
      <text:p text:style-name="Code">{<text:span text:style-name="T9">block </text:span>scripts}</text:p>
      <text:p text:style-name="Code"><text:span text:style-name="T17">&lt;</text:span><text:span text:style-name="T9">script</text:span><text:span text:style-name="T17">&gt;</text:span></text:p>
      <text:p text:style-name="Code"><text:span text:style-name="T14"><text:tab/>window</text:span><text:span text:style-name="T10">.</text:span><text:span text:style-name="T14">isManager</text:span> <text:span text:style-name="T10">=</text:span> <text:span text:style-name="T10">{</text:span>=<text:span text:style-name="T15">json_encode</text:span><text:span text:style-name="T10">(</text:span><text:span text:style-name="T14">$isLoanManager</text:span><text:span text:style-name="T10">)</text:span>|noescape<text:span text:style-name="T10">};</text:span></text:p>
      <text:p text:style-name="Code"><text:span text:style-name="T14"><text:tab/>window</text:span><text:span text:style-name="T10">.</text:span><text:span text:style-name="T14">currentUserId</text:span> <text:span text:style-name="T10">=</text:span> <text:span text:style-name="T10">{</text:span><text:span text:style-name="T14">$currentUserId</text:span><text:span text:style-name="T10">};</text:span></text:p>
      <text:p text:style-name="Code"><text:span text:style-name="T14"><text:tab/>window</text:span><text:span text:style-name="T10">.</text:span><text:span text:style-name="T14">resPersons</text:span> <text:span text:style-name="T10">=</text:span> <text:span text:style-name="T10">{</text:span>=<text:span text:style-name="T15">json_encode</text:span><text:span text:style-name="T10">(</text:span><text:span text:style-name="T14">$persons</text:span><text:span text:style-name="T10">)</text:span>|noescape<text:span text:style-name="T10">};</text:span></text:p>
      <text:p text:style-name="Code"><text:span text:style-name="T14"><text:tab/>window</text:span><text:span text:style-name="T10">.</text:span><text:span text:style-name="T14">resItems</text:span> <text:span text:style-name="T10">=</text:span> <text:span text:style-name="T10">{</text:span>=<text:span text:style-name="T15">json_encode</text:span><text:span text:style-name="T10">(</text:span><text:span text:style-name="T14">$reservationItems</text:span><text:span text:style-name="T10">)</text:span>|noescape<text:span text:style-name="T10">};</text:span></text:p>
      <text:p text:style-name="Code"><text:span text:style-name="T14"><text:tab/>window</text:span><text:span text:style-name="T10">.</text:span><text:span text:style-name="T14">i18n</text:span> <text:span text:style-name="T10">=</text:span> <text:span text:style-name="T10">{</text:span>=<text:span text:style-name="T15">json_encode</text:span><text:span text:style-name="T10">(</text:span><text:span text:style-name="T14">$translations</text:span><text:span text:style-name="T10">)</text:span>|noescape<text:span text:style-name="T10">};</text:span></text:p>
      <text:p text:style-name="Code"><text:span text:style-name="T14"><text:tab/>window</text:span><text:span text:style-name="T10">.</text:span><text:span text:style-name="T15">t</text:span> <text:span text:style-name="T10">=</text:span> <text:span text:style-name="T14">function</text:span><text:span text:style-name="T10">(</text:span><text:span text:style-name="T14">key</text:span><text:span text:style-name="T10">)</text:span> <text:span text:style-name="T10">{</text:span></text:p>
      <text:p text:style-name="Code"><text:span text:style-name="T9"><text:tab/><text:tab/>return</text:span> <text:span text:style-name="T14">window</text:span><text:span text:style-name="T10">.</text:span><text:span text:style-name="T14">i18n</text:span><text:span text:style-name="T10">?.</text:span>[<text:span text:style-name="T14">key</text:span>] <text:span text:style-name="T10">??</text:span> <text:span text:style-name="T14">key</text:span><text:span text:style-name="T10">;</text:span></text:p>
      <text:p text:style-name="Code"><text:tab/>};</text:p>
      <text:p text:style-name="Code"><text:span text:style-name="T17">&lt;/</text:span><text:span text:style-name="T9">script</text:span><text:span text:style-name="T17">&gt;</text:span></text:p>
      <text:p text:style-name="Code"><text:span text:style-name="T17">&lt;</text:span><text:span text:style-name="T9">script</text:span><text:span text:style-name="T17"> </text:span><text:span text:style-name="T18">type</text:span><text:span text:style-name="T10">="</text:span><text:span text:style-name="T16">module</text:span><text:span text:style-name="T10">"</text:span><text:span text:style-name="T17"> </text:span><text:span text:style-name="T18">src</text:span><text:span text:style-name="T10">="</text:span><text:span text:style-name="T16">/app/modules/Loan/js/user.js</text:span><text:span text:style-name="T10">"</text:span><text:span text:style-name="T17">&gt;&lt;/</text:span><text:span text:style-name="T9">script</text:span><text:span text:style-name="T17">&gt;</text:span></text:p>
      <text:p text:style-name="Code">{<text:span text:style-name="T9">/block</text:span>}</text:p>
      <text:h text:style-name="Heading_20_3" text:outline-level="3">Dans les JS</text:h>
      <text:p text:style-name="Code"><text:span text:style-name="T14">const</text:span> <text:span text:style-name="T14">modalRes</text:span> <text:span text:style-name="T10">=</text:span> <text:span text:style-name="T10">new</text:span> <text:span text:style-name="T14">bootstrap</text:span><text:span text:style-name="T10">.</text:span><text:span text:style-name="T15">Modal</text:span>(<text:span text:style-name="T14">document</text:span><text:span text:style-name="T10">.</text:span><text:span text:style-name="T15">getElementById</text:span>(<text:span text:style-name="T10">'</text:span><text:span text:style-name="T16">modalRes</text:span><text:span text:style-name="T10">'</text:span>))<text:span text:style-name="T10">;</text:span></text:p>
      <text:p text:style-name="Code"><text:span text:style-name="T14">const</text:span> <text:span text:style-name="T14">alertEl</text:span> <text:span text:style-name="T10">=</text:span> <text:span text:style-name="T14">document</text:span><text:span text:style-name="T10">.</text:span><text:span text:style-name="T15">getElementById</text:span>(<text:span text:style-name="T10">'</text:span><text:span text:style-name="T16">resAlert</text:span><text:span text:style-name="T10">'</text:span>)<text:span text:style-name="T10">;</text:span></text:p>
      <text:p text:style-name="Code"/>
      <text:p text:style-name="Code"><text:span text:style-name="T14">function</text:span> <text:span text:style-name="T15">showAlert</text:span><text:span text:style-name="T10">(</text:span><text:span text:style-name="T14">msg</text:span><text:span text:style-name="T10">,</text:span> <text:span text:style-name="T14">type</text:span> <text:span text:style-name="T10">=</text:span> <text:span text:style-name="T10">'</text:span><text:span text:style-name="T16">danger</text:span><text:span text:style-name="T10">')</text:span> <text:span text:style-name="T10">{</text:span></text:p>
      <text:p text:style-name="Code"><text:span text:style-name="T14">alertEl</text:span><text:span text:style-name="T10">.</text:span><text:span text:style-name="T14">textContent</text:span> <text:span text:style-name="T10">=</text:span> <text:span text:style-name="T14">msg</text:span><text:span text:style-name="T10">;</text:span></text:p>
      <text:p text:style-name="Code"><text:span text:style-name="T14">alertEl</text:span><text:span text:style-name="T10">.</text:span><text:span text:style-name="T14">className</text:span> <text:span text:style-name="T10">=</text:span> <text:span text:style-name="T10">`</text:span><text:span text:style-name="T16">alert alert-</text:span><text:span text:style-name="T10">${</text:span><text:span text:style-name="T14">type</text:span><text:span text:style-name="T10">}</text:span><text:span text:style-name="T16"> alert-dismissible fade show</text:span><text:span text:style-name="T10">`;</text:span></text:p>
      <text:p text:style-name="Code"><text:span text:style-name="T14">alertEl</text:span><text:span text:style-name="T10">.</text:span><text:span text:style-name="T14">innerHTML</text:span> <text:span text:style-name="T10">+=</text:span> <text:span text:style-name="T10">'</text:span><text:span text:style-name="T16">&lt;button type="button" class="btn-close" data-bs-dismiss="alert"&gt;&lt;/button&gt;</text:span><text:span text:style-name="T10">';</text:span></text:p>
      <text:p text:style-name="Code">}</text:p>
      <text:p text:style-name="Code"/>
      <text:p text:style-name="Code"><text:span text:style-name="T9">async</text:span> <text:span text:style-name="T14">function</text:span> <text:span text:style-name="T15">api</text:span><text:span text:style-name="T10">(</text:span><text:span text:style-name="T14">url</text:span><text:span text:style-name="T10">,</text:span> <text:span text:style-name="T14">method</text:span> <text:span text:style-name="T10">=</text:span> <text:span text:style-name="T10">'</text:span><text:span text:style-name="T16">GET</text:span><text:span text:style-name="T10">',</text:span> <text:span text:style-name="T14">body</text:span> <text:span text:style-name="T10">=</text:span> <text:span text:style-name="T11">null</text:span><text:span text:style-name="T10">)</text:span> <text:span text:style-name="T10">{</text:span></text:p>
      <text:p text:style-name="Code"><text:soft-page-break/><text:span text:style-name="T14">const</text:span> <text:span text:style-name="T14">opts</text:span> <text:span text:style-name="T10">=</text:span> <text:span text:style-name="T10">{</text:span> <text:span text:style-name="T14">method</text:span><text:span text:style-name="T10">,</text:span> <text:span text:style-name="T14">headers</text:span><text:span text:style-name="T10">:</text:span> <text:span text:style-name="T10">{</text:span> <text:span text:style-name="T10">'</text:span><text:span text:style-name="T16">Content-Type</text:span><text:span text:style-name="T10">':</text:span> <text:span text:style-name="T10">'</text:span><text:span text:style-name="T16">application/json</text:span><text:span text:style-name="T10">'</text:span> <text:span text:style-name="T10">}</text:span> <text:span text:style-name="T10">};</text:span></text:p>
      <text:p text:style-name="Code"><text:span text:style-name="T9">if</text:span> (<text:span text:style-name="T14">body</text:span>) <text:span text:style-name="T14">opts</text:span><text:span text:style-name="T10">.</text:span><text:span text:style-name="T14">body</text:span> <text:span text:style-name="T10">=</text:span> <text:span text:style-name="T14">JSON</text:span><text:span text:style-name="T10">.</text:span><text:span text:style-name="T15">stringify</text:span>(<text:span text:style-name="T14">body</text:span>)<text:span text:style-name="T10">;</text:span></text:p>
      <text:p text:style-name="Code"><text:span text:style-name="T14">const</text:span> <text:span text:style-name="T14">res</text:span> <text:span text:style-name="T10">=</text:span> <text:span text:style-name="T9">await</text:span> <text:span text:style-name="T15">fetch</text:span>(<text:span text:style-name="T14">url</text:span><text:span text:style-name="T10">,</text:span> <text:span text:style-name="T14">opts</text:span>)<text:span text:style-name="T10">;</text:span></text:p>
      <text:p text:style-name="Code"><text:span text:style-name="T14">const</text:span> <text:span text:style-name="T14">json</text:span> <text:span text:style-name="T10">=</text:span> <text:span text:style-name="T9">await</text:span> <text:span text:style-name="T14">res</text:span><text:span text:style-name="T10">.</text:span><text:span text:style-name="T15">json</text:span>()<text:span text:style-name="T10">;</text:span></text:p>
      <text:p text:style-name="Code"><text:span text:style-name="T9">if</text:span> (<text:span text:style-name="T10">!</text:span><text:span text:style-name="T14">json</text:span><text:span text:style-name="T10">.</text:span><text:span text:style-name="T14">success</text:span>) <text:span text:style-name="T9">throw</text:span> <text:span text:style-name="T10">new</text:span> <text:span text:style-name="T12">Error</text:span>(<text:span text:style-name="T14">json</text:span><text:span text:style-name="T10">.</text:span><text:span text:style-name="T14">message</text:span> <text:span text:style-name="T10">??</text:span> <text:span text:style-name="T14">window</text:span><text:span text:style-name="T10">.</text:span><text:span text:style-name="T15">t</text:span>(<text:span text:style-name="T10">'</text:span><text:span text:style-name="T16">msg.error</text:span><text:span text:style-name="T10">'</text:span>))<text:span text:style-name="T10">;</text:span></text:p>
      <text:p text:style-name="Code"><text:span text:style-name="T9">return</text:span> <text:span text:style-name="T14">json</text:span><text:span text:style-name="T10">.</text:span><text:span text:style-name="T14">data</text:span><text:span text:style-name="T10">;</text:span></text:p>
      <text:p text:style-name="Code">}</text:p>
      <text:p text:style-name="Code"/>
      <text:p text:style-name="Code"><text:span text:style-name="T9">async</text:span> <text:span text:style-name="T14">function</text:span> <text:span text:style-name="T15">checkResAvailability</text:span><text:span text:style-name="T10">()</text:span> <text:span text:style-name="T10">{</text:span></text:p>
      <text:p text:style-name="Code"><text:span text:style-name="T14">const</text:span> <text:span text:style-name="T14">itemId</text:span> <text:span text:style-name="T10">=</text:span> <text:span text:style-name="T14">document</text:span><text:span text:style-name="T10">.</text:span><text:span text:style-name="T15">getElementById</text:span>(<text:span text:style-name="T10">'</text:span><text:span text:style-name="T16">resItem</text:span><text:span text:style-name="T10">'</text:span>)<text:span text:style-name="T10">.</text:span><text:span text:style-name="T14">value</text:span><text:span text:style-name="T10">;</text:span></text:p>
      <text:p text:style-name="Code"><text:span text:style-name="T14">const</text:span> <text:span text:style-name="T14">date</text:span> <text:span text:style-name="T10">=</text:span> <text:span text:style-name="T14">document</text:span><text:span text:style-name="T10">.</text:span><text:span text:style-name="T15">getElementById</text:span>(<text:span text:style-name="T10">'</text:span><text:span text:style-name="T16">resDate</text:span><text:span text:style-name="T10">'</text:span>)<text:span text:style-name="T10">.</text:span><text:span text:style-name="T14">value</text:span><text:span text:style-name="T10">;</text:span></text:p>
      <text:p text:style-name="Code"><text:span text:style-name="T14">const</text:span> <text:span text:style-name="T14">start</text:span> <text:span text:style-name="T10">=</text:span> <text:span text:style-name="T14">document</text:span><text:span text:style-name="T10">.</text:span><text:span text:style-name="T15">getElementById</text:span>(<text:span text:style-name="T10">'</text:span><text:span text:style-name="T16">resStart</text:span><text:span text:style-name="T10">'</text:span>)<text:span text:style-name="T10">.</text:span><text:span text:style-name="T14">value</text:span><text:span text:style-name="T10">;</text:span></text:p>
      <text:p text:style-name="Code"><text:span text:style-name="T14">const</text:span> <text:span text:style-name="T14">end</text:span> <text:span text:style-name="T10">=</text:span> <text:span text:style-name="T14">document</text:span><text:span text:style-name="T10">.</text:span><text:span text:style-name="T15">getElementById</text:span>(<text:span text:style-name="T10">'</text:span><text:span text:style-name="T16">resEnd</text:span><text:span text:style-name="T10">'</text:span>)<text:span text:style-name="T10">.</text:span><text:span text:style-name="T14">value</text:span><text:span text:style-name="T10">;</text:span></text:p>
      <text:p text:style-name="Code"><text:span text:style-name="T14">const</text:span> <text:span text:style-name="T14">el</text:span> <text:span text:style-name="T10">=</text:span> <text:span text:style-name="T14">document</text:span><text:span text:style-name="T10">.</text:span><text:span text:style-name="T15">getElementById</text:span>(<text:span text:style-name="T10">'</text:span><text:span text:style-name="T16">resItemAvail</text:span><text:span text:style-name="T10">'</text:span>)<text:span text:style-name="T10">;</text:span></text:p>
      <text:p text:style-name="Code"><text:span text:style-name="T9">if</text:span> (<text:span text:style-name="T10">!</text:span><text:span text:style-name="T14">itemId</text:span> <text:span text:style-name="T10">||</text:span> <text:span text:style-name="T10">!</text:span><text:span text:style-name="T14">date</text:span> <text:span text:style-name="T10">||</text:span> <text:span text:style-name="T10">!</text:span><text:span text:style-name="T14">start</text:span> <text:span text:style-name="T10">||</text:span> <text:span text:style-name="T10">!</text:span><text:span text:style-name="T14">end</text:span>) <text:span text:style-name="T10">{</text:span> <text:span text:style-name="T14">el</text:span><text:span text:style-name="T10">.</text:span><text:span text:style-name="T14">textContent</text:span> <text:span text:style-name="T10">=</text:span> <text:span text:style-name="T10">'';</text:span> <text:span text:style-name="T9">return</text:span><text:span text:style-name="T10">;</text:span> <text:span text:style-name="T10">}</text:span></text:p>
      <text:p text:style-name="Code"/>
      <text:p text:style-name="Code"><text:span text:style-name="T9">try</text:span> <text:span text:style-name="T10">{</text:span></text:p>
      <text:p text:style-name="Code"><text:span text:style-name="T14">const</text:span> <text:span text:style-name="T14">excludeId</text:span> <text:span text:style-name="T10">=</text:span> <text:span text:style-name="T14">document</text:span><text:span text:style-name="T10">.</text:span><text:span text:style-name="T15">getElementById</text:span>(<text:span text:style-name="T10">'</text:span><text:span text:style-name="T16">resId</text:span><text:span text:style-name="T10">'</text:span>)<text:span text:style-name="T10">.</text:span><text:span text:style-name="T14">value</text:span> <text:span text:style-name="T10">||</text:span> <text:span text:style-name="T10">'';</text:span></text:p>
      <text:p text:style-name="Code"><text:span text:style-name="T14">let</text:span> <text:span text:style-name="T14">url</text:span> <text:span text:style-name="T10">=</text:span> <text:span text:style-name="T10">`</text:span><text:span text:style-name="T16">/api/loan/availability/</text:span><text:span text:style-name="T10">${</text:span><text:span text:style-name="T14">itemId</text:span><text:span text:style-name="T10">}</text:span><text:span text:style-name="T16">?type=reservation&amp;date=</text:span><text:span text:style-name="T10">${</text:span><text:span text:style-name="T14">date</text:span><text:span text:style-name="T10">}</text:span><text:span text:style-name="T16">&amp;start=</text:span><text:span text:style-name="T10">${</text:span><text:span text:style-name="T14">start</text:span><text:span text:style-name="T10">}</text:span><text:span text:style-name="T16">&amp;end=</text:span><text:span text:style-name="T10">${</text:span><text:span text:style-name="T14">end</text:span><text:span text:style-name="T10">}`;</text:span></text:p>
      <text:p text:style-name="Code"><text:span text:style-name="T9">if</text:span> (<text:span text:style-name="T14">excludeId</text:span>) <text:span text:style-name="T14">url</text:span> <text:span text:style-name="T10">+=</text:span> <text:span text:style-name="T10">`</text:span><text:span text:style-name="T16">&amp;excludeId=</text:span><text:span text:style-name="T10">${</text:span><text:span text:style-name="T14">excludeId</text:span><text:span text:style-name="T10">}`;</text:span></text:p>
      <text:p text:style-name="Code"><text:span text:style-name="T14">const</text:span> <text:span text:style-name="T14">data</text:span> <text:span text:style-name="T10">=</text:span> <text:span text:style-name="T9">await</text:span> <text:span text:style-name="T15">api</text:span>(<text:span text:style-name="T14">url</text:span>)<text:span text:style-name="T10">;</text:span></text:p>
      <text:p text:style-name="Code"><text:span text:style-name="T14">el</text:span><text:span text:style-name="T10">.</text:span><text:span text:style-name="T14">textContent</text:span> <text:span text:style-name="T10">=</text:span> <text:span text:style-name="T10">`${</text:span><text:span text:style-name="T14">window</text:span><text:span text:style-name="T10">.</text:span><text:span text:style-name="T15">t</text:span>(<text:span text:style-name="T10">'</text:span><text:span text:style-name="T16">availability.available</text:span><text:span text:style-name="T10">'</text:span>)<text:span text:style-name="T10">}</text:span><text:span text:style-name="T16"> : </text:span><text:span text:style-name="T10">${</text:span><text:span text:style-name="T14">data</text:span><text:span text:style-name="T10">.</text:span><text:span text:style-name="T14">available</text:span><text:span text:style-name="T10">}`;</text:span></text:p>
      <text:p text:style-name="Code"><text:span text:style-name="T14">el</text:span><text:span text:style-name="T10">.</text:span><text:span text:style-name="T14">className</text:span> <text:span text:style-name="T10">=</text:span> <text:span text:style-name="T10">`</text:span><text:span text:style-name="T16">form-text </text:span><text:span text:style-name="T10">${</text:span><text:span text:style-name="T14">data</text:span><text:span text:style-name="T10">.</text:span><text:span text:style-name="T14">available</text:span> <text:span text:style-name="T10">&gt;</text:span> <text:span text:style-name="T11">0</text:span> <text:span text:style-name="T10">?</text:span> <text:span text:style-name="T10">'</text:span><text:span text:style-name="T16">text-success</text:span><text:span text:style-name="T10">'</text:span> <text:span text:style-name="T10">:</text:span> <text:span text:style-name="T10">'</text:span><text:span text:style-name="T16">text-danger</text:span><text:span text:style-name="T10">'}`;</text:span></text:p>
      <text:p text:style-name="Code"><text:span text:style-name="T10">}</text:span> <text:span text:style-name="T9">catch</text:span> (<text:span text:style-name="T14">_</text:span>) <text:span text:style-name="T10">{</text:span> <text:span text:style-name="T14">el</text:span><text:span text:style-name="T10">.</text:span><text:span text:style-name="T14">textContent</text:span> <text:span text:style-name="T10">=</text:span> <text:span text:style-name="T10">'';</text:span> <text:span text:style-name="T10">}</text:span></text:p>
      <text:p text:style-name="Code">}</text:p>
      <text:p text:style-name="Code"/>
      <text:p text:style-name="Code">[<text:span text:style-name="T10">'</text:span><text:span text:style-name="T16">resItem</text:span><text:span text:style-name="T10">','</text:span><text:span text:style-name="T16">resDate</text:span><text:span text:style-name="T10">','</text:span><text:span text:style-name="T16">resStart</text:span><text:span text:style-name="T10">','</text:span><text:span text:style-name="T16">resEnd</text:span><text:span text:style-name="T10">'</text:span>]<text:span text:style-name="T10">.</text:span><text:span text:style-name="T15">forEach</text:span>(<text:span text:style-name="T14">id</text:span> <text:span text:style-name="T14">=&gt;</text:span></text:p>
      <text:p text:style-name="Code"><text:span text:style-name="T14">document</text:span><text:span text:style-name="T10">.</text:span><text:span text:style-name="T15">getElementById</text:span>(<text:span text:style-name="T14">id</text:span>)<text:span text:style-name="T10">.</text:span><text:span text:style-name="T15">addEventListener</text:span>(<text:span text:style-name="T10">'</text:span><text:span text:style-name="T16">change</text:span><text:span text:style-name="T10">',</text:span> <text:span text:style-name="T15">checkResAvailability</text:span>)</text:p>
      <text:p text:style-name="Code">)<text:span text:style-name="T10">;</text:span></text:p>
      <text:p text:style-name="Code"/>
      <text:p text:style-name="Code"><text:span text:style-name="T14">function</text:span> <text:span text:style-name="T15">openAdd</text:span><text:span text:style-name="T10">()</text:span> <text:span text:style-name="T10">{</text:span></text:p>
      <text:p text:style-name="Code"><text:span text:style-name="T14">document</text:span><text:span text:style-name="T10">.</text:span><text:span text:style-name="T15">getElementById</text:span>(<text:span text:style-name="T10">'</text:span><text:span text:style-name="T16">modalResLabel</text:span><text:span text:style-name="T10">'</text:span>)<text:span text:style-name="T10">.</text:span><text:span text:style-name="T14">textContent</text:span> <text:span text:style-name="T10">=</text:span> <text:span text:style-name="T14">window</text:span><text:span text:style-name="T10">.</text:span><text:span text:style-name="T15">t</text:span>(<text:span text:style-name="T10">'</text:span><text:span text:style-name="T16">reservation.add</text:span><text:span text:style-name="T10">'</text:span>)<text:span text:style-name="T10">;</text:span></text:p>
      <text:p text:style-name="Code"><text:span text:style-name="T14">document</text:span><text:span text:style-name="T10">.</text:span><text:span text:style-name="T15">getElementById</text:span>(<text:span text:style-name="T10">'</text:span><text:span text:style-name="T16">resId</text:span><text:span text:style-name="T10">'</text:span>)<text:span text:style-name="T10">.</text:span><text:span text:style-name="T14">value</text:span> <text:span text:style-name="T10">=</text:span> <text:span text:style-name="T10">'';</text:span></text:p>
      <text:p text:style-name="Code"><text:span text:style-name="T14">document</text:span><text:span text:style-name="T10">.</text:span><text:span text:style-name="T15">getElementById</text:span>(<text:span text:style-name="T10">'</text:span><text:span text:style-name="T16">resItem</text:span><text:span text:style-name="T10">'</text:span>)<text:span text:style-name="T10">.</text:span><text:span text:style-name="T14">value</text:span> <text:span text:style-name="T10">=</text:span> <text:span text:style-name="T10">'';</text:span></text:p>
      <text:p text:style-name="Code"><text:span text:style-name="T14">document</text:span><text:span text:style-name="T10">.</text:span><text:span text:style-name="T15">getElementById</text:span>(<text:span text:style-name="T10">'</text:span><text:span text:style-name="T16">resQty</text:span><text:span text:style-name="T10">'</text:span>)<text:span text:style-name="T10">.</text:span><text:span text:style-name="T14">value</text:span> <text:span text:style-name="T10">=</text:span> <text:span text:style-name="T11">1</text:span><text:span text:style-name="T10">;</text:span></text:p>
      <text:p text:style-name="Code"><text:span text:style-name="T14">document</text:span><text:span text:style-name="T10">.</text:span><text:span text:style-name="T15">getElementById</text:span>(<text:span text:style-name="T10">'</text:span><text:span text:style-name="T16">resDate</text:span><text:span text:style-name="T10">'</text:span>)<text:span text:style-name="T10">.</text:span><text:span text:style-name="T14">value</text:span> <text:span text:style-name="T10">=</text:span> <text:span text:style-name="T10">new</text:span> <text:span text:style-name="T12">Date</text:span>()<text:span text:style-name="T10">.</text:span><text:span text:style-name="T15">toISOString</text:span>()<text:span text:style-name="T10">.</text:span><text:span text:style-name="T15">slice</text:span>(<text:span text:style-name="T11">0</text:span><text:span text:style-name="T10">,</text:span> <text:span text:style-name="T11">10</text:span>)<text:span text:style-name="T10">;</text:span></text:p>
      <text:p text:style-name="Code"><text:span text:style-name="T14">document</text:span><text:span text:style-name="T10">.</text:span><text:span text:style-name="T15">getElementById</text:span>(<text:span text:style-name="T10">'</text:span><text:span text:style-name="T16">resStart</text:span><text:span text:style-name="T10">'</text:span>)<text:span text:style-name="T10">.</text:span><text:span text:style-name="T14">value</text:span> <text:span text:style-name="T10">=</text:span> <text:span text:style-name="T10">'</text:span><text:span text:style-name="T16">09:00</text:span><text:span text:style-name="T10">';</text:span></text:p>
      <text:p text:style-name="Code"><text:span text:style-name="T14">document</text:span><text:span text:style-name="T10">.</text:span><text:span text:style-name="T15">getElementById</text:span>(<text:span text:style-name="T10">'</text:span><text:span text:style-name="T16">resEnd</text:span><text:span text:style-name="T10">'</text:span>)<text:span text:style-name="T10">.</text:span><text:span text:style-name="T14">value</text:span> <text:span text:style-name="T10">=</text:span> <text:span text:style-name="T10">'</text:span><text:span text:style-name="T16">17:00</text:span><text:span text:style-name="T10">';</text:span></text:p>
      <text:p text:style-name="Code"><text:span text:style-name="T14">document</text:span><text:span text:style-name="T10">.</text:span><text:span text:style-name="T15">getElementById</text:span>(<text:span text:style-name="T10">'</text:span><text:span text:style-name="T16">resNotes</text:span><text:span text:style-name="T10">'</text:span>)<text:span text:style-name="T10">.</text:span><text:span text:style-name="T14">value</text:span> <text:span text:style-name="T10">=</text:span> <text:span text:style-name="T10">'';</text:span></text:p>
      <text:p text:style-name="Code"><text:span text:style-name="T14">document</text:span><text:span text:style-name="T10">.</text:span><text:span text:style-name="T15">getElementById</text:span>(<text:span text:style-name="T10">'</text:span><text:span text:style-name="T16">resItemAvail</text:span><text:span text:style-name="T10">'</text:span>)<text:span text:style-name="T10">.</text:span><text:span text:style-name="T14">textContent</text:span> <text:span text:style-name="T10">=</text:span> <text:span text:style-name="T10">'';</text:span></text:p>
      <text:p text:style-name="Code"/>
      <text:p text:style-name="Code"><text:span text:style-name="T9">if</text:span> (<text:span text:style-name="T14">window</text:span><text:span text:style-name="T10">.</text:span><text:span text:style-name="T14">isManager</text:span>) <text:span text:style-name="T10">{</text:span></text:p>
      <text:p text:style-name="Code"><text:span text:style-name="T14">const</text:span> <text:span text:style-name="T14">sel</text:span> <text:span text:style-name="T10">=</text:span> <text:span text:style-name="T14">document</text:span><text:span text:style-name="T10">.</text:span><text:span text:style-name="T15">getElementById</text:span>(<text:span text:style-name="T10">'</text:span><text:span text:style-name="T16">resUser</text:span><text:span text:style-name="T10">'</text:span>)<text:span text:style-name="T10">;</text:span></text:p>
      <text:p text:style-name="Code"><text:span text:style-name="T9">if</text:span> (<text:span text:style-name="T14">sel</text:span>) <text:span text:style-name="T14">sel</text:span><text:span text:style-name="T10">.</text:span><text:span text:style-name="T14">value</text:span> <text:span text:style-name="T10">=</text:span> <text:span text:style-name="T10">'';</text:span></text:p>
      <text:p text:style-name="Code">}</text:p>
      <text:p text:style-name="Code"><text:span text:style-name="T14">modalRes</text:span><text:span text:style-name="T10">.</text:span><text:span text:style-name="T15">show</text:span>()<text:span text:style-name="T10">;</text:span></text:p>
      <text:p text:style-name="Code">}</text:p>
      <text:p text:style-name="Code"/>
      <text:p text:style-name="Code"><text:span text:style-name="T9">async</text:span> <text:span text:style-name="T14">function</text:span> <text:span text:style-name="T15">openEdit</text:span><text:span text:style-name="T10">(</text:span><text:span text:style-name="T14">id</text:span><text:span text:style-name="T10">)</text:span> <text:span text:style-name="T10">{</text:span></text:p>
      <text:p text:style-name="Code"><text:span text:style-name="T9">try</text:span> <text:span text:style-name="T10">{</text:span></text:p>
      <text:p text:style-name="Code"><text:span text:style-name="T14">const</text:span> <text:span text:style-name="T14">res</text:span> <text:span text:style-name="T10">=</text:span> <text:span text:style-name="T9">await</text:span> <text:span text:style-name="T15">api</text:span>(<text:span text:style-name="T10">`</text:span><text:span text:style-name="T16">/api/loan/reservation/</text:span><text:span text:style-name="T10">${</text:span><text:span text:style-name="T14">id</text:span><text:span text:style-name="T10">}`</text:span>)<text:span text:style-name="T10">;</text:span></text:p>
      <text:p text:style-name="Code"><text:span text:style-name="T14">document</text:span><text:span text:style-name="T10">.</text:span><text:span text:style-name="T15">getElementById</text:span>(<text:span text:style-name="T10">'</text:span><text:span text:style-name="T16">modalResLabel</text:span><text:span text:style-name="T10">'</text:span>)<text:span text:style-name="T10">.</text:span><text:span text:style-name="T14">textContent</text:span> <text:span text:style-name="T10">=</text:span> <text:span text:style-name="T14">window</text:span><text:span text:style-name="T10">.</text:span><text:span text:style-name="T15">t</text:span>(<text:span text:style-name="T10">'</text:span><text:span text:style-name="T16">reservation.title</text:span><text:span text:style-name="T10">'</text:span>)<text:span text:style-name="T10">;</text:span></text:p>
      <text:p text:style-name="Code"><text:span text:style-name="T14">document</text:span><text:span text:style-name="T10">.</text:span><text:span text:style-name="T15">getElementById</text:span>(<text:span text:style-name="T10">'</text:span><text:span text:style-name="T16">resId</text:span><text:span text:style-name="T10">'</text:span>)<text:span text:style-name="T10">.</text:span><text:span text:style-name="T14">value</text:span> <text:span text:style-name="T10">=</text:span> <text:span text:style-name="T14">res</text:span><text:span text:style-name="T10">.</text:span><text:span text:style-name="T14">Id</text:span><text:span text:style-name="T10">;</text:span></text:p>
      <text:p text:style-name="Code"><text:span text:style-name="T14">document</text:span><text:span text:style-name="T10">.</text:span><text:span text:style-name="T15">getElementById</text:span>(<text:span text:style-name="T10">'</text:span><text:span text:style-name="T16">resItem</text:span><text:span text:style-name="T10">'</text:span>)<text:span text:style-name="T10">.</text:span><text:span text:style-name="T14">value</text:span> <text:span text:style-name="T10">=</text:span> <text:span text:style-name="T14">res</text:span><text:span text:style-name="T10">.</text:span><text:span text:style-name="T14">ItemId</text:span><text:span text:style-name="T10">;</text:span></text:p>
      <text:p text:style-name="Code"><text:span text:style-name="T14">document</text:span><text:span text:style-name="T10">.</text:span><text:span text:style-name="T15">getElementById</text:span>(<text:span text:style-name="T10">'</text:span><text:span text:style-name="T16">resQty</text:span><text:span text:style-name="T10">'</text:span>)<text:span text:style-name="T10">.</text:span><text:span text:style-name="T14">value</text:span> <text:span text:style-name="T10">=</text:span> <text:span text:style-name="T14">res</text:span><text:span text:style-name="T10">.</text:span><text:span text:style-name="T14">QuantityReserved</text:span><text:span text:style-name="T10">;</text:span></text:p>
      <text:p text:style-name="Code"><text:span text:style-name="T14">document</text:span><text:span text:style-name="T10">.</text:span><text:span text:style-name="T15">getElementById</text:span>(<text:span text:style-name="T10">'</text:span><text:span text:style-name="T16">resDate</text:span><text:span text:style-name="T10">'</text:span>)<text:span text:style-name="T10">.</text:span><text:span text:style-name="T14">value</text:span> <text:span text:style-name="T10">=</text:span> <text:span text:style-name="T14">res</text:span><text:span text:style-name="T10">.</text:span><text:span text:style-name="T14">ReservationDate</text:span><text:span text:style-name="T10">;</text:span></text:p>
      <text:p text:style-name="Code"><text:soft-page-break/><text:span text:style-name="T14">document</text:span><text:span text:style-name="T10">.</text:span><text:span text:style-name="T15">getElementById</text:span>(<text:span text:style-name="T10">'</text:span><text:span text:style-name="T16">resStart</text:span><text:span text:style-name="T10">'</text:span>)<text:span text:style-name="T10">.</text:span><text:span text:style-name="T14">value</text:span> <text:span text:style-name="T10">=</text:span> <text:span text:style-name="T14">res</text:span><text:span text:style-name="T10">.</text:span><text:span text:style-name="T14">StartTime</text:span><text:span text:style-name="T10">;</text:span></text:p>
      <text:p text:style-name="Code"><text:span text:style-name="T14">document</text:span><text:span text:style-name="T10">.</text:span><text:span text:style-name="T15">getElementById</text:span>(<text:span text:style-name="T10">'</text:span><text:span text:style-name="T16">resEnd</text:span><text:span text:style-name="T10">'</text:span>)<text:span text:style-name="T10">.</text:span><text:span text:style-name="T14">value</text:span> <text:span text:style-name="T10">=</text:span> <text:span text:style-name="T14">res</text:span><text:span text:style-name="T10">.</text:span><text:span text:style-name="T14">EndTime</text:span><text:span text:style-name="T10">;</text:span></text:p>
      <text:p text:style-name="Code"><text:span text:style-name="T14">document</text:span><text:span text:style-name="T10">.</text:span><text:span text:style-name="T15">getElementById</text:span>(<text:span text:style-name="T10">'</text:span><text:span text:style-name="T16">resNotes</text:span><text:span text:style-name="T10">'</text:span>)<text:span text:style-name="T10">.</text:span><text:span text:style-name="T14">value</text:span> <text:span text:style-name="T10">=</text:span> <text:span text:style-name="T14">res</text:span><text:span text:style-name="T10">.</text:span><text:span text:style-name="T14">Notes</text:span><text:span text:style-name="T10">;</text:span></text:p>
      <text:p text:style-name="Code"/>
      <text:p text:style-name="Code"><text:span text:style-name="T9">if</text:span> (<text:span text:style-name="T14">window</text:span><text:span text:style-name="T10">.</text:span><text:span text:style-name="T14">isManager</text:span>) <text:span text:style-name="T10">{</text:span></text:p>
      <text:p text:style-name="Code"><text:span text:style-name="T14">const</text:span> <text:span text:style-name="T14">sel</text:span> <text:span text:style-name="T10">=</text:span> <text:span text:style-name="T14">document</text:span><text:span text:style-name="T10">.</text:span><text:span text:style-name="T15">getElementById</text:span>(<text:span text:style-name="T10">'</text:span><text:span text:style-name="T16">resUser</text:span><text:span text:style-name="T10">'</text:span>)<text:span text:style-name="T10">;</text:span></text:p>
      <text:p text:style-name="Code"><text:span text:style-name="T9">if</text:span> (<text:span text:style-name="T14">sel</text:span>) <text:span text:style-name="T14">sel</text:span><text:span text:style-name="T10">.</text:span><text:span text:style-name="T14">value</text:span> <text:span text:style-name="T10">=</text:span> <text:span text:style-name="T14">res</text:span><text:span text:style-name="T10">.</text:span><text:span text:style-name="T14">UserId</text:span><text:span text:style-name="T10">;</text:span></text:p>
      <text:p text:style-name="Code">}</text:p>
      <text:p text:style-name="Code"><text:span text:style-name="T9">await</text:span> <text:span text:style-name="T15">checkResAvailability</text:span>()<text:span text:style-name="T10">;</text:span></text:p>
      <text:p text:style-name="Code"><text:span text:style-name="T14">modalRes</text:span><text:span text:style-name="T10">.</text:span><text:span text:style-name="T15">show</text:span>()<text:span text:style-name="T10">;</text:span></text:p>
      <text:p text:style-name="Code"><text:span text:style-name="T10">}</text:span> <text:span text:style-name="T9">catch</text:span> (<text:span text:style-name="T14">e</text:span>) <text:span text:style-name="T10">{</text:span></text:p>
      <text:p text:style-name="Code"><text:span text:style-name="T15">showAlert</text:span>(<text:span text:style-name="T14">e</text:span><text:span text:style-name="T10">.</text:span><text:span text:style-name="T14">message</text:span>)<text:span text:style-name="T10">;</text:span></text:p>
      <text:p text:style-name="Code">}</text:p>
      <text:p text:style-name="Code">}</text:p>
      <text:p text:style-name="Code"/>
      <text:p text:style-name="Code"><text:span text:style-name="T14">document</text:span><text:span text:style-name="T10">.</text:span><text:span text:style-name="T15">getElementById</text:span>(<text:span text:style-name="T10">'</text:span><text:span text:style-name="T16">btnSaveRes</text:span><text:span text:style-name="T10">'</text:span>)<text:span text:style-name="T10">.</text:span><text:span text:style-name="T15">addEventListener</text:span>(<text:span text:style-name="T10">'</text:span><text:span text:style-name="T16">click</text:span><text:span text:style-name="T10">',</text:span> <text:span text:style-name="T9">async</text:span> <text:span text:style-name="T10">()</text:span> <text:span text:style-name="T14">=&gt;</text:span> <text:span text:style-name="T10">{</text:span></text:p>
      <text:p text:style-name="Code"><text:span text:style-name="T14">const</text:span> <text:span text:style-name="T14">itemId</text:span> <text:span text:style-name="T10">=</text:span> <text:span text:style-name="T14">document</text:span><text:span text:style-name="T10">.</text:span><text:span text:style-name="T15">getElementById</text:span>(<text:span text:style-name="T10">'</text:span><text:span text:style-name="T16">resItem</text:span><text:span text:style-name="T10">'</text:span>)<text:span text:style-name="T10">.</text:span><text:span text:style-name="T14">value</text:span><text:span text:style-name="T10">;</text:span></text:p>
      <text:p text:style-name="Code"><text:span text:style-name="T14">const</text:span> <text:span text:style-name="T14">date</text:span> <text:span text:style-name="T10">=</text:span> <text:span text:style-name="T14">document</text:span><text:span text:style-name="T10">.</text:span><text:span text:style-name="T15">getElementById</text:span>(<text:span text:style-name="T10">'</text:span><text:span text:style-name="T16">resDate</text:span><text:span text:style-name="T10">'</text:span>)<text:span text:style-name="T10">.</text:span><text:span text:style-name="T14">value</text:span><text:span text:style-name="T10">;</text:span></text:p>
      <text:p text:style-name="Code"><text:span text:style-name="T14">const</text:span> <text:span text:style-name="T14">start</text:span> <text:span text:style-name="T10">=</text:span> <text:span text:style-name="T14">document</text:span><text:span text:style-name="T10">.</text:span><text:span text:style-name="T15">getElementById</text:span>(<text:span text:style-name="T10">'</text:span><text:span text:style-name="T16">resStart</text:span><text:span text:style-name="T10">'</text:span>)<text:span text:style-name="T10">.</text:span><text:span text:style-name="T14">value</text:span><text:span text:style-name="T10">;</text:span></text:p>
      <text:p text:style-name="Code"><text:span text:style-name="T14">const</text:span> <text:span text:style-name="T14">end</text:span> <text:span text:style-name="T10">=</text:span> <text:span text:style-name="T14">document</text:span><text:span text:style-name="T10">.</text:span><text:span text:style-name="T15">getElementById</text:span>(<text:span text:style-name="T10">'</text:span><text:span text:style-name="T16">resEnd</text:span><text:span text:style-name="T10">'</text:span>)<text:span text:style-name="T10">.</text:span><text:span text:style-name="T14">value</text:span><text:span text:style-name="T10">;</text:span></text:p>
      <text:p text:style-name="Code"><text:span text:style-name="T14">const</text:span> <text:span text:style-name="T14">qty</text:span> <text:span text:style-name="T10">=</text:span> <text:span text:style-name="T14">document</text:span><text:span text:style-name="T10">.</text:span><text:span text:style-name="T15">getElementById</text:span>(<text:span text:style-name="T10">'</text:span><text:span text:style-name="T16">resQty</text:span><text:span text:style-name="T10">'</text:span>)<text:span text:style-name="T10">.</text:span><text:span text:style-name="T14">value</text:span><text:span text:style-name="T10">;</text:span></text:p>
      <text:p text:style-name="Code"/>
      <text:p text:style-name="Code"><text:span text:style-name="T9">if</text:span> (<text:span text:style-name="T10">!</text:span><text:span text:style-name="T14">itemId</text:span> <text:span text:style-name="T10">||</text:span> <text:span text:style-name="T10">!</text:span><text:span text:style-name="T14">date</text:span> <text:span text:style-name="T10">||</text:span> <text:span text:style-name="T10">!</text:span><text:span text:style-name="T14">start</text:span> <text:span text:style-name="T10">||</text:span> <text:span text:style-name="T10">!</text:span><text:span text:style-name="T14">end</text:span>) <text:span text:style-name="T10">{</text:span></text:p>
      <text:p text:style-name="Code"><text:span text:style-name="T15">showAlert</text:span>(<text:span text:style-name="T10">'</text:span><text:span text:style-name="T16">Tous les champs obligatoires doivent être remplis.</text:span><text:span text:style-name="T10">'</text:span>)<text:span text:style-name="T10">;</text:span></text:p>
      <text:p text:style-name="Code"><text:span text:style-name="T9">return</text:span><text:span text:style-name="T10">;</text:span></text:p>
      <text:p text:style-name="Code">}</text:p>
      <text:p text:style-name="Code"><text:span text:style-name="T9">if</text:span> (<text:span text:style-name="T14">start</text:span> <text:span text:style-name="T10">&gt;=</text:span> <text:span text:style-name="T14">end</text:span>) <text:span text:style-name="T10">{</text:span></text:p>
      <text:p text:style-name="Code"><text:span text:style-name="T15">showAlert</text:span>(<text:span text:style-name="T10">"</text:span><text:span text:style-name="T16">L'heure de fin doit être après l'heure de début.</text:span><text:span text:style-name="T10">"</text:span>)<text:span text:style-name="T10">;</text:span></text:p>
      <text:p text:style-name="Code"><text:span text:style-name="T9">return</text:span><text:span text:style-name="T10">;</text:span></text:p>
      <text:p text:style-name="Code">}</text:p>
      <text:p text:style-name="Code"/>
      <text:p text:style-name="Code"><text:span text:style-name="T14">const</text:span> <text:span text:style-name="T14">body</text:span> <text:span text:style-name="T10">=</text:span> <text:span text:style-name="T10">{</text:span></text:p>
      <text:p text:style-name="Code"><text:span text:style-name="T14">id</text:span><text:span text:style-name="T10">:</text:span> <text:span text:style-name="T14">document</text:span><text:span text:style-name="T10">.</text:span><text:span text:style-name="T15">getElementById</text:span>(<text:span text:style-name="T10">'</text:span><text:span text:style-name="T16">resId</text:span><text:span text:style-name="T10">'</text:span>)<text:span text:style-name="T10">.</text:span><text:span text:style-name="T14">value</text:span> <text:span text:style-name="T10">||</text:span> <text:span text:style-name="T11">0</text:span><text:span text:style-name="T10">,</text:span></text:p>
      <text:p text:style-name="Code"><text:span text:style-name="T14">itemId</text:span><text:span text:style-name="T10">,</text:span> <text:span text:style-name="T14">quantity</text:span><text:span text:style-name="T10">:</text:span> <text:span text:style-name="T14">qty</text:span><text:span text:style-name="T10">,</text:span></text:p>
      <text:p text:style-name="Code"><text:span text:style-name="T14">reservationDate</text:span><text:span text:style-name="T10">:</text:span> <text:span text:style-name="T14">date</text:span><text:span text:style-name="T10">,</text:span></text:p>
      <text:p text:style-name="Code"><text:span text:style-name="T14">startTime</text:span><text:span text:style-name="T10">:</text:span> <text:span text:style-name="T14">start</text:span><text:span text:style-name="T10">,</text:span></text:p>
      <text:p text:style-name="Code"><text:span text:style-name="T14">endTime</text:span><text:span text:style-name="T10">:</text:span> <text:span text:style-name="T14">end</text:span><text:span text:style-name="T10">,</text:span></text:p>
      <text:p text:style-name="Code"><text:span text:style-name="T14">notes</text:span><text:span text:style-name="T10">:</text:span> <text:span text:style-name="T14">document</text:span><text:span text:style-name="T10">.</text:span><text:span text:style-name="T15">getElementById</text:span>(<text:span text:style-name="T10">'</text:span><text:span text:style-name="T16">resNotes</text:span><text:span text:style-name="T10">'</text:span>)<text:span text:style-name="T10">.</text:span><text:span text:style-name="T14">value</text:span><text:span text:style-name="T10">,</text:span></text:p>
      <text:p text:style-name="Code">};</text:p>
      <text:p text:style-name="Code"/>
      <text:p text:style-name="Code"><text:span text:style-name="T9">if</text:span> (<text:span text:style-name="T14">window</text:span><text:span text:style-name="T10">.</text:span><text:span text:style-name="T14">isManager</text:span>) <text:span text:style-name="T10">{</text:span></text:p>
      <text:p text:style-name="Code"><text:span text:style-name="T14">const</text:span> <text:span text:style-name="T14">sel</text:span> <text:span text:style-name="T10">=</text:span> <text:span text:style-name="T14">document</text:span><text:span text:style-name="T10">.</text:span><text:span text:style-name="T15">getElementById</text:span>(<text:span text:style-name="T10">'</text:span><text:span text:style-name="T16">resUser</text:span><text:span text:style-name="T10">'</text:span>)<text:span text:style-name="T10">;</text:span></text:p>
      <text:p text:style-name="Code"><text:span text:style-name="T9">if</text:span> (<text:span text:style-name="T14">sel</text:span>) <text:span text:style-name="T14">body</text:span><text:span text:style-name="T10">.</text:span><text:span text:style-name="T14">userId</text:span> <text:span text:style-name="T10">=</text:span> <text:span text:style-name="T14">sel</text:span><text:span text:style-name="T10">.</text:span><text:span text:style-name="T14">value</text:span><text:span text:style-name="T10">;</text:span></text:p>
      <text:p text:style-name="Code">}</text:p>
      <text:p text:style-name="Code"/>
      <text:p text:style-name="Code"><text:span text:style-name="T14">const</text:span> <text:span text:style-name="T14">spinner</text:span> <text:span text:style-name="T10">=</text:span> <text:span text:style-name="T14">document</text:span><text:span text:style-name="T10">.</text:span><text:span text:style-name="T15">getElementById</text:span>(<text:span text:style-name="T10">'</text:span><text:span text:style-name="T16">saveResSpinner</text:span><text:span text:style-name="T10">'</text:span>)<text:span text:style-name="T10">;</text:span></text:p>
      <text:p text:style-name="Code"><text:span text:style-name="T14">spinner</text:span><text:span text:style-name="T10">.</text:span><text:span text:style-name="T14">classList</text:span><text:span text:style-name="T10">.</text:span><text:span text:style-name="T15">remove</text:span>(<text:span text:style-name="T10">'</text:span><text:span text:style-name="T16">d-none</text:span><text:span text:style-name="T10">'</text:span>)<text:span text:style-name="T10">;</text:span></text:p>
      <text:p text:style-name="Code"><text:span text:style-name="T9">try</text:span> <text:span text:style-name="T10">{</text:span></text:p>
      <text:p text:style-name="Code"><text:span text:style-name="T9">await</text:span> <text:span text:style-name="T15">api</text:span>(<text:span text:style-name="T10">'</text:span><text:span text:style-name="T16">/api/loan/reservation/save</text:span><text:span text:style-name="T10">',</text:span> <text:span text:style-name="T10">'</text:span><text:span text:style-name="T16">POST</text:span><text:span text:style-name="T10">',</text:span> <text:span text:style-name="T14">body</text:span>)<text:span text:style-name="T10">;</text:span></text:p>
      <text:p text:style-name="Code"><text:span text:style-name="T14">modalRes</text:span><text:span text:style-name="T10">.</text:span><text:span text:style-name="T15">hide</text:span>()<text:span text:style-name="T10">;</text:span></text:p>
      <text:p text:style-name="Code"><text:span text:style-name="T14">location</text:span><text:span text:style-name="T10">.</text:span><text:span text:style-name="T15">reload</text:span>()<text:span text:style-name="T10">;</text:span></text:p>
      <text:p text:style-name="Code"><text:span text:style-name="T10">}</text:span> <text:span text:style-name="T9">catch</text:span> (<text:span text:style-name="T14">e</text:span>) <text:span text:style-name="T10">{</text:span></text:p>
      <text:p text:style-name="Code"><text:span text:style-name="T15">showAlert</text:span>(<text:span text:style-name="T14">e</text:span><text:span text:style-name="T10">.</text:span><text:span text:style-name="T14">message</text:span>)<text:span text:style-name="T10">;</text:span></text:p>
      <text:p text:style-name="Code"><text:span text:style-name="T10">}</text:span> <text:span text:style-name="T9">finally</text:span> <text:span text:style-name="T10">{</text:span></text:p>
      <text:p text:style-name="Code"><text:span text:style-name="T14">spinner</text:span><text:span text:style-name="T10">.</text:span><text:span text:style-name="T14">classList</text:span><text:span text:style-name="T10">.</text:span><text:span text:style-name="T15">add</text:span>(<text:span text:style-name="T10">'</text:span><text:span text:style-name="T16">d-none</text:span><text:span text:style-name="T10">'</text:span>)<text:span text:style-name="T10">;</text:span></text:p>
      <text:p text:style-name="Code">}</text:p>
      <text:p text:style-name="Code"><text:span text:style-name="T10">}</text:span>)<text:span text:style-name="T10">;</text:span></text:p>
      <text:p text:style-name="Code"><text:soft-page-break/></text:p>
      <text:p text:style-name="Code"><text:span text:style-name="T9">async</text:span> <text:span text:style-name="T14">function</text:span> <text:span text:style-name="T15">cancelReservation</text:span><text:span text:style-name="T10">(</text:span><text:span text:style-name="T14">id</text:span><text:span text:style-name="T10">)</text:span> <text:span text:style-name="T10">{</text:span></text:p>
      <text:p text:style-name="Code"><text:span text:style-name="T9">if</text:span> (<text:span text:style-name="T10">!</text:span><text:span text:style-name="T15">confirm</text:span>(<text:span text:style-name="T14">window</text:span><text:span text:style-name="T10">.</text:span><text:span text:style-name="T15">t</text:span>(<text:span text:style-name="T10">'</text:span><text:span text:style-name="T16">reservation.cancel_confirm</text:span><text:span text:style-name="T10">'</text:span>))) <text:span text:style-name="T9">return</text:span><text:span text:style-name="T10">;</text:span></text:p>
      <text:p text:style-name="Code"><text:span text:style-name="T9">try</text:span> <text:span text:style-name="T10">{</text:span></text:p>
      <text:p text:style-name="Code"><text:span text:style-name="T9">await</text:span> <text:span text:style-name="T15">api</text:span>(<text:span text:style-name="T10">`</text:span><text:span text:style-name="T16">/api/loan/reservation/cancel/</text:span><text:span text:style-name="T10">${</text:span><text:span text:style-name="T14">id</text:span><text:span text:style-name="T10">}`,</text:span> <text:span text:style-name="T10">'</text:span><text:span text:style-name="T16">POST</text:span><text:span text:style-name="T10">'</text:span>)<text:span text:style-name="T10">;</text:span></text:p>
      <text:p text:style-name="Code"><text:span text:style-name="T15">showAlert</text:span>(<text:span text:style-name="T14">window</text:span><text:span text:style-name="T10">.</text:span><text:span text:style-name="T15">t</text:span>(<text:span text:style-name="T10">'</text:span><text:span text:style-name="T16">msg.cancelled</text:span><text:span text:style-name="T10">'</text:span>)<text:span text:style-name="T10">,</text:span> <text:span text:style-name="T10">'</text:span><text:span text:style-name="T16">success</text:span><text:span text:style-name="T10">'</text:span>)<text:span text:style-name="T10">;</text:span></text:p>
      <text:p text:style-name="Code"><text:span text:style-name="T14">location</text:span><text:span text:style-name="T10">.</text:span><text:span text:style-name="T15">reload</text:span>()<text:span text:style-name="T10">;</text:span></text:p>
      <text:p text:style-name="Code"><text:span text:style-name="T10">}</text:span> <text:span text:style-name="T9">catch</text:span> (<text:span text:style-name="T14">e</text:span>) <text:span text:style-name="T10">{</text:span></text:p>
      <text:p text:style-name="Code"><text:span text:style-name="T15">showAlert</text:span>(<text:span text:style-name="T14">e</text:span><text:span text:style-name="T10">.</text:span><text:span text:style-name="T14">message</text:span>)<text:span text:style-name="T10">;</text:span></text:p>
      <text:p text:style-name="Code">}</text:p>
      <text:p text:style-name="Code">}</text:p>
      <text:p text:style-name="Code"/>
      <text:p text:style-name="Code"><text:span text:style-name="T14">document</text:span><text:span text:style-name="T10">.</text:span><text:span text:style-name="T15">getElementById</text:span>(<text:span text:style-name="T10">'</text:span><text:span text:style-name="T16">btnAddReservation</text:span><text:span text:style-name="T10">'</text:span>)<text:span text:style-name="T10">.</text:span><text:span text:style-name="T15">addEventListener</text:span>(<text:span text:style-name="T10">'</text:span><text:span text:style-name="T16">click</text:span><text:span text:style-name="T10">',</text:span> <text:span text:style-name="T14">openAdd</text:span>)<text:span text:style-name="T10">;</text:span></text:p>
      <text:p text:style-name="Code"/>
      <text:p text:style-name="Code"><text:span text:style-name="T14">document</text:span><text:span text:style-name="T10">.</text:span><text:span text:style-name="T15">getElementById</text:span>(<text:span text:style-name="T10">'</text:span><text:span text:style-name="T16">tblReservations</text:span><text:span text:style-name="T10">'</text:span>)<text:span text:style-name="T10">.</text:span><text:span text:style-name="T15">addEventListener</text:span>(<text:span text:style-name="T10">'</text:span><text:span text:style-name="T16">click</text:span><text:span text:style-name="T10">',</text:span> <text:span text:style-name="T14">e</text:span> <text:span text:style-name="T14">=&gt;</text:span> <text:span text:style-name="T10">{</text:span></text:p>
      <text:p text:style-name="Code"><text:span text:style-name="T14">const</text:span> <text:span text:style-name="T14">btnEdit</text:span> <text:span text:style-name="T10">=</text:span> <text:span text:style-name="T14">e</text:span><text:span text:style-name="T10">.</text:span><text:span text:style-name="T14">target</text:span><text:span text:style-name="T10">.</text:span><text:span text:style-name="T15">closest</text:span>(<text:span text:style-name="T10">'</text:span><text:span text:style-name="T16">.btn-edit-res</text:span><text:span text:style-name="T10">'</text:span>)<text:span text:style-name="T10">;</text:span></text:p>
      <text:p text:style-name="Code"><text:span text:style-name="T9">if</text:span> (<text:span text:style-name="T14">btnEdit</text:span>) <text:span text:style-name="T10">{</text:span> <text:span text:style-name="T15">openEdit</text:span>(<text:span text:style-name="T14">btnEdit</text:span><text:span text:style-name="T10">.</text:span><text:span text:style-name="T14">dataset</text:span><text:span text:style-name="T10">.</text:span><text:span text:style-name="T14">id</text:span>)<text:span text:style-name="T10">;</text:span> <text:span text:style-name="T9">return</text:span><text:span text:style-name="T10">;</text:span> <text:span text:style-name="T10">}</text:span></text:p>
      <text:p text:style-name="Code"/>
      <text:p text:style-name="Code"><text:span text:style-name="T14">const</text:span> <text:span text:style-name="T14">btnCancel</text:span> <text:span text:style-name="T10">=</text:span> <text:span text:style-name="T14">e</text:span><text:span text:style-name="T10">.</text:span><text:span text:style-name="T14">target</text:span><text:span text:style-name="T10">.</text:span><text:span text:style-name="T15">closest</text:span>(<text:span text:style-name="T10">'</text:span><text:span text:style-name="T16">.btn-cancel-res</text:span><text:span text:style-name="T10">'</text:span>)<text:span text:style-name="T10">;</text:span></text:p>
      <text:p text:style-name="Code"><text:span text:style-name="T9">if</text:span> (<text:span text:style-name="T14">btnCancel</text:span>) <text:span text:style-name="T10">{</text:span> <text:span text:style-name="T15">cancelReservation</text:span>(<text:span text:style-name="T14">btnCancel</text:span><text:span text:style-name="T10">.</text:span><text:span text:style-name="T14">dataset</text:span><text:span text:style-name="T10">.</text:span><text:span text:style-name="T14">id</text:span>)<text:span text:style-name="T10">;</text:span> <text:span text:style-name="T10">}</text:span></text:p>
      <text:p text:style-name="Code"><text:span text:style-name="T19">}</text:span><text:span text:style-name="T20">)</text:span><text:span text:style-name="T19">;</text:span></text:p>
      <text:h text:style-name="P8" text:outline-level="2">Les controleurs</text:h>
      <text:p text:style-name="P9">Tous les controleurs héritent de <text:span text:style-name="T12">AbstractController</text:span></text:p>
      <text:p text:style-name="Code">&lt;?php</text:p>
      <text:p text:style-name="Code"><text:span text:style-name="T9">declare</text:span><text:span text:style-name="T10">(</text:span><text:span text:style-name="T11">strict_types</text:span><text:span text:style-name="T10">=</text:span><text:span text:style-name="T11">1</text:span><text:span text:style-name="T10">);</text:span></text:p>
      <text:p text:style-name="Code"><text:span text:style-name="T9">namespace</text:span> <text:span text:style-name="T12">app</text:span><text:span text:style-name="T13">\</text:span><text:span text:style-name="T12">modules</text:span><text:span text:style-name="T13">\</text:span><text:span text:style-name="T12">Loan</text:span><text:span text:style-name="T10">;</text:span></text:p>
      <text:p text:style-name="Code"/>
      <text:p text:style-name="Code"><text:span text:style-name="T9">use</text:span> app<text:span text:style-name="T10">\</text:span>helpers<text:span text:style-name="T10">\</text:span><text:span text:style-name="T12">Application</text:span><text:span text:style-name="T10">;</text:span></text:p>
      <text:p text:style-name="Code"><text:span text:style-name="T9">use</text:span> app<text:span text:style-name="T10">\</text:span>helpers<text:span text:style-name="T10">\</text:span><text:span text:style-name="T12">TranslationManager</text:span><text:span text:style-name="T10">;</text:span></text:p>
      <text:p text:style-name="Code"><text:span text:style-name="T9">use</text:span> app<text:span text:style-name="T10">\</text:span>models<text:span text:style-name="T10">\</text:span><text:span text:style-name="T12">LoanDataHelper</text:span><text:span text:style-name="T10">;</text:span></text:p>
      <text:p text:style-name="Code"><text:span text:style-name="T9">use</text:span> app<text:span text:style-name="T10">\</text:span>modules<text:span text:style-name="T10">\</text:span>Common<text:span text:style-name="T10">\</text:span><text:span text:style-name="T12">AbstractController</text:span><text:span text:style-name="T10">;</text:span></text:p>
      <text:p text:style-name="Code"/>
      <text:p text:style-name="Code"><text:span text:style-name="T14">class</text:span> <text:span text:style-name="T12">LoanController</text:span> <text:span text:style-name="T9">extends</text:span> <text:span text:style-name="T12">AbstractController</text:span></text:p>
      <text:p text:style-name="Code">{</text:p>
      <text:p text:style-name="Code"><text:span text:style-name="T9">public</text:span> <text:span text:style-name="T14">function</text:span> <text:span text:style-name="T15">__construct</text:span><text:span text:style-name="T10">(</text:span></text:p>
      <text:p text:style-name="Code"><text:span text:style-name="T12">Application</text:span> <text:span text:style-name="T10">$</text:span><text:span text:style-name="T14">application</text:span><text:span text:style-name="T10">,</text:span></text:p>
      <text:p text:style-name="Code"><text:span text:style-name="T9">private</text:span> <text:span text:style-name="T12">LoanDataHelper</text:span> <text:span text:style-name="T10">$</text:span><text:span text:style-name="T14">loanDataHelper</text:span><text:span text:style-name="T10">,</text:span></text:p>
      <text:p text:style-name="Code"><text:span text:style-name="T10">)</text:span> <text:span text:style-name="T10">{</text:span></text:p>
      <text:p text:style-name="Code"><text:span text:style-name="T14">parent</text:span><text:span text:style-name="T10">::</text:span><text:span text:style-name="T15">__construct</text:span><text:span text:style-name="T10">($</text:span><text:span text:style-name="T14">application</text:span><text:span text:style-name="T10">);</text:span></text:p>
      <text:p text:style-name="Code">}</text:p>
      <text:p text:style-name="Code"/>
      <text:p text:style-name="Code"><text:span text:style-name="T9">private</text:span> <text:span text:style-name="T14">function</text:span> <text:span text:style-name="T15">translations</text:span><text:span text:style-name="T10">():</text:span> <text:span text:style-name="T9">array</text:span></text:p>
      <text:p text:style-name="Code">{</text:p>
      <text:p text:style-name="Code"><text:span text:style-name="T10">$</text:span><text:span text:style-name="T14">keys</text:span> <text:span text:style-name="T10">=</text:span> <text:span text:style-name="T10">[</text:span></text:p>
      <text:p text:style-name="Code"><text:span text:style-name="T10">'</text:span><text:span text:style-name="T16">nav.designer</text:span><text:span text:style-name="T10">',</text:span></text:p>
      <text:p text:style-name="Code"><text:span text:style-name="T10">'</text:span><text:span text:style-name="T16">nav.manager</text:span><text:span text:style-name="T10">',</text:span></text:p>
      <text:p text:style-name="Code"><text:span text:style-name="T10">'</text:span><text:span text:style-name="T16">item.title</text:span><text:span text:style-name="T10">',</text:span></text:p>
      <text:p text:style-name="Code"><text:span text:style-name="T10">'</text:span><text:span text:style-name="T16">item.add</text:span><text:span text:style-name="T10">',</text:span></text:p>
      <text:p text:style-name="Code"><text:span text:style-name="T10">'</text:span><text:span text:style-name="T16">record.title</text:span><text:span text:style-name="T10">',</text:span></text:p>
      <text:p text:style-name="Code"><text:span text:style-name="T10">'</text:span><text:span text:style-name="T16">record.add</text:span><text:span text:style-name="T10">',</text:span></text:p>
      <text:p text:style-name="Code"><text:span text:style-name="T10">'</text:span><text:span text:style-name="T16">reservation.title</text:span><text:span text:style-name="T10">',</text:span></text:p>
      <text:p text:style-name="Code"><text:span text:style-name="T10">'</text:span><text:span text:style-name="T16">reservation.add</text:span><text:span text:style-name="T10">',</text:span></text:p>
      <text:p text:style-name="Code"><text:span text:style-name="T10">'</text:span><text:span text:style-name="T16">calendar.title</text:span><text:span text:style-name="T10">',</text:span></text:p>
      <text:p text:style-name="Code"><text:span text:style-name="T10">'</text:span><text:span text:style-name="T16">calendar.loans</text:span><text:span text:style-name="T10">',</text:span></text:p>
      <text:p text:style-name="Code"><text:soft-page-break/><text:span text:style-name="T10">'</text:span><text:span text:style-name="T16">calendar.reservations</text:span><text:span text:style-name="T10">',</text:span></text:p>
      <text:p text:style-name="Code"><text:span text:style-name="T10">'</text:span><text:span text:style-name="T16">msg.saved</text:span><text:span text:style-name="T10">',</text:span></text:p>
      <text:p text:style-name="Code"><text:span text:style-name="T10">'</text:span><text:span text:style-name="T16">msg.deleted</text:span><text:span text:style-name="T10">',</text:span></text:p>
      <text:p text:style-name="Code"><text:span text:style-name="T10">'</text:span><text:span text:style-name="T16">msg.returned</text:span><text:span text:style-name="T10">',</text:span></text:p>
      <text:p text:style-name="Code"><text:span text:style-name="T10">'</text:span><text:span text:style-name="T16">msg.cancelled</text:span><text:span text:style-name="T10">',</text:span></text:p>
      <text:p text:style-name="Code"><text:span text:style-name="T10">'</text:span><text:span text:style-name="T16">msg.error</text:span><text:span text:style-name="T10">',</text:span></text:p>
      <text:p text:style-name="Code"><text:span text:style-name="T10">'</text:span><text:span text:style-name="T16">msg.qty_exceeded</text:span><text:span text:style-name="T10">',</text:span></text:p>
      <text:p text:style-name="Code">];</text:p>
      <text:p text:style-name="Code"/>
      <text:p text:style-name="Code"><text:span text:style-name="T10">$</text:span><text:span text:style-name="T14">trans</text:span> <text:span text:style-name="T10">=</text:span> <text:span text:style-name="T10">[];</text:span></text:p>
      <text:p text:style-name="Code"><text:span text:style-name="T9">foreach</text:span> <text:span text:style-name="T10">($</text:span><text:span text:style-name="T14">keys</text:span> <text:span text:style-name="T10">as</text:span> <text:span text:style-name="T10">$</text:span><text:span text:style-name="T14">k</text:span><text:span text:style-name="T10">)</text:span> <text:span text:style-name="T10">{</text:span></text:p>
      <text:p text:style-name="Code"><text:span text:style-name="T10">$</text:span><text:span text:style-name="T14">trans</text:span><text:span text:style-name="T10">[$</text:span><text:span text:style-name="T14">k</text:span><text:span text:style-name="T10">]</text:span> <text:span text:style-name="T10">=</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6">loan.</text:span><text:span text:style-name="T10">'</text:span> <text:span text:style-name="T10">.</text:span> <text:span text:style-name="T10">$</text:span><text:span text:style-name="T14">k</text:span><text:span text:style-name="T10">);</text:span></text:p>
      <text:p text:style-name="Code">}</text:p>
      <text:p text:style-name="Code"><text:span text:style-name="T9">return</text:span> <text:span text:style-name="T10">$</text:span><text:span text:style-name="T14">trans</text:span><text:span text:style-name="T10">;</text:span></text:p>
      <text:p text:style-name="Code">}</text:p>
      <text:p text:style-name="Code"/>
      <text:p text:style-name="Code"><text:span text:style-name="T9">public</text:span> <text:span text:style-name="T14">function</text:span> <text:span text:style-name="T15">designer</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text:span text:style-name="T9">return</text:span><text:span text:style-name="T10">;</text:span></text:p>
      <text:p text:style-name="Code">}</text:p>
      <text:p text:style-name="Code"/>
      <text:p text:style-name="Code"><text:span text:style-name="T10">$</text:span><text:span text:style-name="T11">this</text:span><text:span text:style-name="T10">-&gt;</text:span><text:span text:style-name="T14">loanDataHelper</text:span><text:span text:style-name="T10">-&gt;</text:span><text:span text:style-name="T15">updateOverdueLoans</text:span><text:span text:style-name="T10">();</text:span></text:p>
      <text:p text:style-name="Code"/>
      <text:p text:style-name="Code"><text:span text:style-name="T10">$</text:span><text:span text:style-name="T11">this</text:span><text:span text:style-name="T10">-&gt;</text:span><text:span text:style-name="T15">render</text:span><text:span text:style-name="T10">('</text:span><text:span text:style-name="T16">Loan/views/designer.latte</text:span><text:span text:style-name="T10">',</text:span> <text:span text:style-name="T10">$</text:span><text:span text:style-name="T11">this</text:span><text:span text:style-name="T10">-&gt;</text:span><text:span text:style-name="T15">getAllParams</text:span><text:span text:style-name="T10">([</text:span></text:p>
      <text:p text:style-name="Code"><text:span text:style-name="T10">'</text:span><text:span text:style-name="T16">item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llItems</text:span><text:span text:style-name="T10">(),</text:span></text:p>
      <text:p text:style-name="Code"><text:span text:style-name="T10">'</text:span><text:span text:style-name="T16">translations</text:span><text:span text:style-name="T10">'</text:span> <text:span text:style-name="T10">=&gt;</text:span> <text:span text:style-name="T10">$</text:span><text:span text:style-name="T11">this</text:span><text:span text:style-name="T10">-&gt;</text:span><text:span text:style-name="T15">translations</text:span><text:span text:style-name="T10">(),</text:span></text:p>
      <text:p text:style-name="Code"><text:span text:style-name="T10">'</text:span><text:span text:style-name="T16">page</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getPage</text:span><text:span text:style-name="T10">(),</text:span></text:p>
      <text:p text:style-name="Code"><text:span text:style-name="T10">'</text:span><text:span text:style-name="T16">activeTab</text:span><text:span text:style-name="T10">'</text:span> <text:span text:style-name="T10">=&gt;</text:span> <text:span text:style-name="T10">'</text:span><text:span text:style-name="T16">designer</text:span><text:span text:style-name="T10">',</text:span></text:p>
      <text:p text:style-name="Code"><text:span text:style-name="T10">'</text:span><text:span text:style-name="T16">btn_Parent</text:span><text:span text:style-name="T10">'</text:span> <text:span text:style-name="T10">=&gt;</text:span> <text:span text:style-name="T10">"</text:span><text:span text:style-name="T16">/admin</text:span><text:span text:style-name="T10">",</text:span></text:p>
      <text:p text:style-name="Code"><text:span text:style-name="T10">'</text:span><text:span text:style-name="T16">btn_HistoryBack</text:span><text:span text:style-name="T10">'</text:span> <text:span text:style-name="T10">=&gt;</text:span> <text:span text:style-name="T11">true</text:span><text:span text:style-name="T10">,</text:span></text:p>
      <text:p text:style-name="Code">]));</text:p>
      <text:p text:style-name="Code">}</text:p>
      <text:p text:style-name="Code"/>
      <text:p text:style-name="Code"><text:span text:style-name="T9">public</text:span> <text:span text:style-name="T14">function</text:span> <text:span text:style-name="T15">manager</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Manager</text:span><text:span text:style-name="T10">()))</text:span> <text:span text:style-name="T10">{</text:span></text:p>
      <text:p text:style-name="Code"><text:span text:style-name="T9">return</text:span><text:span text:style-name="T10">;</text:span></text:p>
      <text:p text:style-name="Code">}</text:p>
      <text:p text:style-name="Code"/>
      <text:p text:style-name="Code"><text:span text:style-name="T10">$</text:span><text:span text:style-name="T11">this</text:span><text:span text:style-name="T10">-&gt;</text:span><text:span text:style-name="T14">loanDataHelper</text:span><text:span text:style-name="T10">-&gt;</text:span><text:span text:style-name="T15">updateOverdueLoans</text:span><text:span text:style-name="T10">();</text:span></text:p>
      <text:p text:style-name="Code"/>
      <text:p text:style-name="Code"><text:span text:style-name="T10">$</text:span><text:span text:style-name="T11">this</text:span><text:span text:style-name="T10">-&gt;</text:span><text:span text:style-name="T15">render</text:span><text:span text:style-name="T10">('</text:span><text:span text:style-name="T16">Loan/views/manager.latte</text:span><text:span text:style-name="T10">',</text:span> <text:span text:style-name="T10">$</text:span><text:span text:style-name="T11">this</text:span><text:span text:style-name="T10">-&gt;</text:span><text:span text:style-name="T15">getAllParams</text:span><text:span text:style-name="T10">([</text:span></text:p>
      <text:p text:style-name="Code"><text:span text:style-name="T10">'</text:span><text:span text:style-name="T16">loan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llLoans</text:span><text:span text:style-name="T10">(),</text:span></text:p>
      <text:p text:style-name="Code"><text:span text:style-name="T10">'</text:span><text:span text:style-name="T16">loanItem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ctiveItems</text:span><text:span text:style-name="T10">('</text:span><text:span text:style-name="T16">loan</text:span><text:span text:style-name="T10">'),</text:span></text:p>
      <text:p text:style-name="Code"><text:span text:style-name="T10">'</text:span><text:span text:style-name="T16">person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llPersons</text:span><text:span text:style-name="T10">(),</text:span></text:p>
      <text:p text:style-name="Code"><text:span text:style-name="T10">'</text:span><text:span text:style-name="T16">translations</text:span><text:span text:style-name="T10">'</text:span> <text:span text:style-name="T10">=&gt;</text:span> <text:span text:style-name="T10">$</text:span><text:span text:style-name="T11">this</text:span><text:span text:style-name="T10">-&gt;</text:span><text:span text:style-name="T15">translations</text:span><text:span text:style-name="T10">(),</text:span></text:p>
      <text:p text:style-name="Code"><text:span text:style-name="T10">'</text:span><text:span text:style-name="T16">activeTab</text:span><text:span text:style-name="T10">'</text:span> <text:span text:style-name="T10">=&gt;</text:span> <text:span text:style-name="T10">'</text:span><text:span text:style-name="T16">manager</text:span><text:span text:style-name="T10">',</text:span></text:p>
      <text:p text:style-name="Code"><text:span text:style-name="T10">'</text:span><text:span text:style-name="T16">btn_Parent</text:span><text:span text:style-name="T10">'</text:span> <text:span text:style-name="T10">=&gt;</text:span> <text:span text:style-name="T10">"</text:span><text:span text:style-name="T16">/user</text:span><text:span text:style-name="T10">",</text:span></text:p>
      <text:p text:style-name="Code"><text:span text:style-name="T10">'</text:span><text:span text:style-name="T16">btn_HistoryBack</text:span><text:span text:style-name="T10">'</text:span> <text:span text:style-name="T10">=&gt;</text:span> <text:span text:style-name="T11">true</text:span><text:span text:style-name="T10">,</text:span></text:p>
      <text:p text:style-name="Code">]));</text:p>
      <text:p text:style-name="Code">}</text:p>
      <text:p text:style-name="Code"/>
      <text:p text:style-name="Code"><text:span text:style-name="T9">public</text:span> <text:span text:style-name="T14">function</text:span> <text:span text:style-name="T15">reservations</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Connected</text:span><text:span text:style-name="T10">()))</text:span> <text:span text:style-name="T10">{</text:span></text:p>
      <text:p text:style-name="Code"><text:span text:style-name="T9">return</text:span><text:span text:style-name="T10">;</text:span></text:p>
      <text:p text:style-name="Code"><text:soft-page-break/>}</text:p>
      <text:p text:style-name="Code"/>
      <text:p text:style-name="Code"><text:span text:style-name="T10">$</text:span><text:span text:style-name="T14">user</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text:span></text:p>
      <text:p text:style-name="Code"><text:span text:style-name="T10">$</text:span><text:span text:style-name="T14">userId</text:span> <text:span text:style-name="T10">=</text:span> <text:span text:style-name="T10">$</text:span><text:span text:style-name="T14">user</text:span><text:span text:style-name="T10">-&gt;</text:span><text:span text:style-name="T15">isLoanManager</text:span><text:span text:style-name="T10">()</text:span> <text:span text:style-name="T10">?</text:span> <text:span text:style-name="T11">0</text:span> <text:span text:style-name="T10">:</text:span> <text:span text:style-name="T10">$</text:span><text:span text:style-name="T14">user</text:span><text:span text:style-name="T10">-&gt;</text:span><text:span text:style-name="T14">person</text:span><text:span text:style-name="T10">-&gt;</text:span><text:span text:style-name="T14">Id</text:span><text:span text:style-name="T10">;</text:span></text:p>
      <text:p text:style-name="Code"/>
      <text:p text:style-name="Code"><text:span text:style-name="T10">$</text:span><text:span text:style-name="T11">this</text:span><text:span text:style-name="T10">-&gt;</text:span><text:span text:style-name="T15">render</text:span><text:span text:style-name="T10">('</text:span><text:span text:style-name="T16">Loan/views/user.latte</text:span><text:span text:style-name="T10">',</text:span> <text:span text:style-name="T10">$</text:span><text:span text:style-name="T11">this</text:span><text:span text:style-name="T10">-&gt;</text:span><text:span text:style-name="T15">getAllParams</text:span><text:span text:style-name="T10">([</text:span></text:p>
      <text:p text:style-name="Code"><text:span text:style-name="T10">'</text:span><text:span text:style-name="T16">reservation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llReservations</text:span><text:span text:style-name="T10">($</text:span><text:span text:style-name="T14">userId</text:span><text:span text:style-name="T10">),</text:span></text:p>
      <text:p text:style-name="Code"><text:span text:style-name="T10">'</text:span><text:span text:style-name="T16">reservationItem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ctiveItems</text:span><text:span text:style-name="T10">('</text:span><text:span text:style-name="T16">reservation</text:span><text:span text:style-name="T10">'),</text:span></text:p>
      <text:p text:style-name="Code"><text:span text:style-name="T10">'</text:span><text:span text:style-name="T16">persons</text:span><text:span text:style-name="T10">'</text:span> <text:span text:style-name="T10">=&gt;</text:span> <text:span text:style-name="T10">$</text:span><text:span text:style-name="T11">this</text:span><text:span text:style-name="T10">-&gt;</text:span><text:span text:style-name="T14">loanDataHelper</text:span><text:span text:style-name="T10">-&gt;</text:span><text:span text:style-name="T15">getAllPersons</text:span><text:span text:style-name="T10">(),</text:span></text:p>
      <text:p text:style-name="Code"><text:span text:style-name="T10">'</text:span><text:span text:style-name="T16">isManager</text:span><text:span text:style-name="T10">'</text:span> <text:span text:style-name="T10">=&gt;</text:span> <text:span text:style-name="T10">$</text:span><text:span text:style-name="T14">user</text:span><text:span text:style-name="T10">-&gt;</text:span><text:span text:style-name="T15">isLoanManager</text:span><text:span text:style-name="T10">(),</text:span></text:p>
      <text:p text:style-name="Code"><text:span text:style-name="T10">'</text:span><text:span text:style-name="T16">currentUserId</text:span><text:span text:style-name="T10">'</text:span> <text:span text:style-name="T10">=&gt;</text:span> <text:span text:style-name="T10">$</text:span><text:span text:style-name="T14">userId</text:span><text:span text:style-name="T10">,</text:span></text:p>
      <text:p text:style-name="Code"><text:span text:style-name="T10">'</text:span><text:span text:style-name="T16">translations</text:span><text:span text:style-name="T10">'</text:span> <text:span text:style-name="T10">=&gt;</text:span> <text:span text:style-name="T10">$</text:span><text:span text:style-name="T11">this</text:span><text:span text:style-name="T10">-&gt;</text:span><text:span text:style-name="T15">translations</text:span><text:span text:style-name="T10">(),</text:span></text:p>
      <text:p text:style-name="Code"><text:span text:style-name="T10">'</text:span><text:span text:style-name="T16">page</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getPage</text:span><text:span text:style-name="T10">(),</text:span></text:p>
      <text:p text:style-name="Code"><text:span text:style-name="T10">'</text:span><text:span text:style-name="T16">activeTab</text:span><text:span text:style-name="T10">'</text:span> <text:span text:style-name="T10">=&gt;</text:span> <text:span text:style-name="T10">'</text:span><text:span text:style-name="T16">user</text:span><text:span text:style-name="T10">',</text:span></text:p>
      <text:p text:style-name="Code"><text:span text:style-name="T10">'</text:span><text:span text:style-name="T16">btn_Parent</text:span><text:span text:style-name="T10">'</text:span> <text:span text:style-name="T10">=&gt;</text:span> <text:span text:style-name="T10">"</text:span><text:span text:style-name="T16">/user</text:span><text:span text:style-name="T10">",</text:span></text:p>
      <text:p text:style-name="Code"><text:span text:style-name="T10">'</text:span><text:span text:style-name="T16">btn_HistoryBack</text:span><text:span text:style-name="T10">'</text:span> <text:span text:style-name="T10">=&gt;</text:span> <text:span text:style-name="T11">true</text:span><text:span text:style-name="T10">,</text:span></text:p>
      <text:p text:style-name="Code">]));</text:p>
      <text:p text:style-name="Code">}</text:p>
      <text:p text:style-name="Code"/>
      <text:p text:style-name="Code"><text:span text:style-name="T9">public</text:span> <text:span text:style-name="T14">function</text:span> <text:span text:style-name="T15">calendar</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Connected</text:span><text:span text:style-name="T10">()))</text:span> <text:span text:style-name="T10">{</text:span></text:p>
      <text:p text:style-name="Code"><text:span text:style-name="T9">return</text:span><text:span text:style-name="T10">;</text:span></text:p>
      <text:p text:style-name="Code">}</text:p>
      <text:p text:style-name="Code"/>
      <text:p text:style-name="Code"><text:span text:style-name="T10">$</text:span><text:span text:style-name="T11">this</text:span><text:span text:style-name="T10">-&gt;</text:span><text:span text:style-name="T15">render</text:span><text:span text:style-name="T10">('</text:span><text:span text:style-name="T16">Loan/views/calendar.latte</text:span><text:span text:style-name="T10">',</text:span> <text:span text:style-name="T10">$</text:span><text:span text:style-name="T11">this</text:span><text:span text:style-name="T10">-&gt;</text:span><text:span text:style-name="T15">getAllParams</text:span><text:span text:style-name="T10">([</text:span></text:p>
      <text:p text:style-name="Code"><text:span text:style-name="T10">'</text:span><text:span text:style-name="T16">translations</text:span><text:span text:style-name="T10">'</text:span> <text:span text:style-name="T10">=&gt;</text:span> <text:span text:style-name="T10">$</text:span><text:span text:style-name="T11">this</text:span><text:span text:style-name="T10">-&gt;</text:span><text:span text:style-name="T15">translations</text:span><text:span text:style-name="T10">(),</text:span></text:p>
      <text:p text:style-name="Code"><text:span text:style-name="T10">'</text:span><text:span text:style-name="T16">page</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getPage</text:span><text:span text:style-name="T10">(),</text:span></text:p>
      <text:p text:style-name="Code"><text:span text:style-name="T10">'</text:span><text:span text:style-name="T16">activeTab</text:span><text:span text:style-name="T10">'</text:span> <text:span text:style-name="T10">=&gt;</text:span> <text:span text:style-name="T10">'</text:span><text:span text:style-name="T16">calendar</text:span><text:span text:style-name="T10">',</text:span></text:p>
      <text:p text:style-name="Code"><text:span text:style-name="T10">'</text:span><text:span text:style-name="T16">btn_Parent</text:span><text:span text:style-name="T10">'</text:span> <text:span text:style-name="T10">=&gt;</text:span> <text:span text:style-name="T10">"</text:span><text:span text:style-name="T16">/user</text:span><text:span text:style-name="T10">",</text:span></text:p>
      <text:p text:style-name="Code"><text:span text:style-name="T10">'</text:span><text:span text:style-name="T16">btn_HistoryBack</text:span><text:span text:style-name="T10">'</text:span> <text:span text:style-name="T10">=&gt;</text:span> <text:span text:style-name="T11">true</text:span><text:span text:style-name="T10">,</text:span></text:p>
      <text:p text:style-name="Code">]));</text:p>
      <text:p text:style-name="Code">}</text:p>
      <text:p text:style-name="Code"/>
      <text:p text:style-name="Code"><text:span text:style-name="T9">public</text:span> <text:span text:style-name="T14">function</text:span> <text:span text:style-name="T15">designerHelp</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isLoanDesigner</text:span><text:span text:style-name="T10">()</text:span> <text:span text:style-name="T10">??</text:span> <text:span text:style-name="T11">false</text:span><text:span text:style-name="T10">))</text:span> <text:span text:style-name="T10">{</text:span></text:p>
      <text:p text:style-name="Code"><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text:span text:style-name="T10">$</text:span><text:span text:style-name="T14">lang</text:span> <text:span text:style-name="T10">=</text:span> <text:span text:style-name="T12">TranslationManager</text:span><text:span text:style-name="T10">::</text:span><text:span text:style-name="T15">getCurrentLanguage</text:span><text:span text:style-name="T10">();</text:span></text:p>
      <text:p text:style-name="Code"><text:span text:style-name="T10">$</text:span><text:span text:style-name="T11">this</text:span><text:span text:style-name="T10">-&gt;</text:span><text:span text:style-name="T15">render</text:span><text:span text:style-name="T10">('</text:span><text:span text:style-name="T16">Common/views/info.latte</text:span><text:span text:style-name="T10">',</text:span> <text:span text:style-name="T10">[</text:span></text:p>
      <text:p text:style-name="Code"><text:span text:style-name="T10">'</text:span><text:span text:style-name="T16">content</text:span><text:span text:style-name="T10">'</text:span> <text:span text:style-name="T10">=&gt;</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Languages</text:span><text:span text:style-name="T10">',</text:span> <text:span text:style-name="T10">['</text:span><text:span text:style-name="T16">Name</text:span><text:span text:style-name="T10">'</text:span> <text:span text:style-name="T10">=&gt;</text:span> <text:span text:style-name="T10">'</text:span><text:span text:style-name="T16">Help_LoanDesigner</text:span><text:span text:style-name="T10">'],</text:span> <text:span text:style-name="T10">$</text:span><text:span text:style-name="T14">lang</text:span><text:span text:style-name="T10">)-&gt;$</text:span><text:span text:style-name="T14">lang</text:span> <text:span text:style-name="T10">??</text:span> <text:span text:style-name="T10">'',</text:span></text:p>
      <text:p text:style-name="Code"><text:span text:style-name="T10">'</text:span><text:span text:style-name="T16">hasAuthorization</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isRedactor</text:span><text:span text:style-name="T10">()</text:span> <text:span text:style-name="T10">??</text:span> <text:span text:style-name="T11">false</text:span><text:span text:style-name="T10">,</text:span></text:p>
      <text:p text:style-name="Code"><text:span text:style-name="T10">'</text:span><text:span text:style-name="T16">currentVersion</text:span><text:span text:style-name="T10">'</text:span> <text:span text:style-name="T10">=&gt;</text:span> <text:span text:style-name="T12">Application</text:span><text:span text:style-name="T10">::</text:span><text:span text:style-name="T11">VERSION</text:span><text:span text:style-name="T10">,</text:span></text:p>
      <text:p text:style-name="Code"><text:span text:style-name="T10">'</text:span><text:span text:style-name="T16">timer</text:span><text:span text:style-name="T10">'</text:span> <text:span text:style-name="T10">=&gt;</text:span> <text:span text:style-name="T11">0</text:span><text:span text:style-name="T10">,</text:span></text:p>
      <text:p text:style-name="Code"><text:span text:style-name="T10">'</text:span><text:span text:style-name="T16">previousPage</text:span><text:span text:style-name="T10">'</text:span> <text:span text:style-name="T10">=&gt;</text:span> <text:span text:style-name="T11">true</text:span><text:span text:style-name="T10">,</text:span></text:p>
      <text:p text:style-name="Code"><text:span text:style-name="T10">'</text:span><text:span text:style-name="T16">page</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getPage</text:span><text:span text:style-name="T10">(),</text:span></text:p>
      <text:p text:style-name="Code">]);</text:p>
      <text:p text:style-name="Code">}</text:p>
      <text:p text:style-name="Code">}</text:p>
      <text:h text:style-name="P10" text:outline-level="3">L’abstract</text:h>
      <text:p text:style-name="Code">&lt;?php</text:p>
      <text:p text:style-name="Code"/>
      <text:p text:style-name="Code"><text:soft-page-break/><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modules</text:span><text:span text:style-name="T13">\</text:span><text:span text:style-name="T12">Common</text:span><text:span text:style-name="T10">;</text:span></text:p>
      <text:p text:style-name="Code"/>
      <text:p text:style-name="Code"><text:span text:style-name="T9">use</text:span> <text:span text:style-name="T12">flight</text:span><text:span text:style-name="T10">;</text:span></text:p>
      <text:p text:style-name="Code"><text:span text:style-name="T9">use</text:span> flight<text:span text:style-name="T10">\</text:span><text:span text:style-name="T12">Engine</text:span><text:span text:style-name="T10">;</text:span></text:p>
      <text:p text:style-name="Code"><text:span text:style-name="T9">use</text:span> Latte<text:span text:style-name="T10">\</text:span><text:span text:style-name="T12">Engine</text:span> <text:span text:style-name="T9">as</text:span> LatteEngine<text:span text:style-name="T10">;</text:span></text:p>
      <text:p text:style-name="Code"/>
      <text:p text:style-name="Code"><text:span text:style-name="T9">use</text:span> app<text:span text:style-name="T10">\</text:span>enums<text:span text:style-name="T10">\</text:span><text:span text:style-name="T12">ApplicationError</text:span><text:span text:style-name="T10">;</text:span></text:p>
      <text:p text:style-name="Code"><text:span text:style-name="T9">use</text:span> app<text:span text:style-name="T10">\</text:span>enums<text:span text:style-name="T10">\</text:span><text:span text:style-name="T12">TimeOfDay</text:span><text:span text:style-name="T10">;</text:span></text:p>
      <text:p text:style-name="Code"><text:span text:style-name="T9">use</text:span> app<text:span text:style-name="T10">\</text:span>helpers<text:span text:style-name="T10">\</text:span><text:span text:style-name="T12">Application</text:span><text:span text:style-name="T10">;</text:span></text:p>
      <text:p text:style-name="Code"><text:span text:style-name="T9">use</text:span> app<text:span text:style-name="T10">\</text:span>helpers<text:span text:style-name="T10">\</text:span><text:span text:style-name="T12">Params</text:span><text:span text:style-name="T10">;</text:span></text:p>
      <text:p text:style-name="Code"><text:span text:style-name="T9">use</text:span> app<text:span text:style-name="T10">\</text:span>helpers<text:span text:style-name="T10">\</text:span><text:span text:style-name="T12">TranslationManager</text:span><text:span text:style-name="T10">;</text:span></text:p>
      <text:p text:style-name="Code"><text:span text:style-name="T9">use</text:span> app<text:span text:style-name="T10">\</text:span>models<text:span text:style-name="T10">\</text:span><text:span text:style-name="T12">AuthorizationDataHelper</text:span><text:span text:style-name="T10">;</text:span></text:p>
      <text:p text:style-name="Code"><text:span text:style-name="T9">use</text:span> app<text:span text:style-name="T10">\</text:span>models<text:span text:style-name="T10">\</text:span><text:span text:style-name="T12">DataHelper</text:span><text:span text:style-name="T10">;</text:span></text:p>
      <text:p text:style-name="Code"><text:span text:style-name="T9">use</text:span> app<text:span text:style-name="T10">\</text:span>models<text:span text:style-name="T10">\</text:span><text:span text:style-name="T12">LanguagesDataHelper</text:span><text:span text:style-name="T10">;</text:span></text:p>
      <text:p text:style-name="Code"><text:span text:style-name="T9">use</text:span> app<text:span text:style-name="T10">\</text:span>models<text:span text:style-name="T10">\</text:span><text:span text:style-name="T12">MenuItemDataHelper</text:span><text:span text:style-name="T10">;</text:span></text:p>
      <text:p text:style-name="Code"><text:span text:style-name="T9">use</text:span> app<text:span text:style-name="T10">\</text:span>models<text:span text:style-name="T10">\</text:span><text:span text:style-name="T12">MetadataDataHelper</text:span><text:span text:style-name="T10">;</text:span></text:p>
      <text:p text:style-name="Code"/>
      <text:p text:style-name="Code"><text:span text:style-name="T9">abstract</text:span> <text:span text:style-name="T14">class</text:span> <text:span text:style-name="T12">AbstractController</text:span></text:p>
      <text:p text:style-name="Code">{</text:p>
      <text:p text:style-name="Code"><text:span text:style-name="T9">protected</text:span> <text:span text:style-name="T12">Engine</text:span> <text:span text:style-name="T10">$</text:span><text:span text:style-name="T14">flight</text:span><text:span text:style-name="T10">;</text:span></text:p>
      <text:p text:style-name="Code"><text:span text:style-name="T9">protected</text:span> <text:span text:style-name="T12">LatteEngine</text:span> <text:span text:style-name="T10">$</text:span><text:span text:style-name="T14">latte</text:span><text:span text:style-name="T10">;</text:span></text:p>
      <text:p text:style-name="Code"><text:span text:style-name="T9">public</text:span> <text:span text:style-name="T12">DataHelper</text:span> <text:span text:style-name="T10">$</text:span><text:span text:style-name="T14">dataHelper</text:span><text:span text:style-name="T10">;</text:span></text:p>
      <text:p text:style-name="Code"><text:span text:style-name="T9">protected</text:span> <text:span text:style-name="T12">LanguagesDataHelper</text:span> <text:span text:style-name="T10">$</text:span><text:span text:style-name="T14">languagesDataHelper</text:span><text:span text:style-name="T10">;</text:span></text:p>
      <text:p text:style-name="Code"><text:span text:style-name="T9">protected</text:span> <text:span text:style-name="T12">MenuItemDataHelper</text:span> <text:span text:style-name="T10">$</text:span><text:span text:style-name="T14">menuItemDataHelper</text:span><text:span text:style-name="T10">;</text:span></text:p>
      <text:p text:style-name="Code"><text:span text:style-name="T9">protected</text:span> <text:span text:style-name="T12">AuthorizationDataHelper</text:span> <text:span text:style-name="T10">$</text:span><text:span text:style-name="T14">authorizationDataHelper</text:span><text:span text:style-name="T10">;</text:span></text:p>
      <text:p text:style-name="Code"><text:span text:style-name="T9">private</text:span> <text:span text:style-name="T12">MetadataDataHelper</text:span> <text:span text:style-name="T10">$</text:span><text:span text:style-name="T14">metadataDataHelper</text:span><text:span text:style-name="T10">;</text:span></text:p>
      <text:p text:style-name="Code"><text:span text:style-name="T9">private</text:span> <text:span text:style-name="T10">?</text:span><text:span text:style-name="T9">string</text:span> <text:span text:style-name="T10">$</text:span><text:span text:style-name="T14">prodSiteUrl</text:span><text:span text:style-name="T10">;</text:span></text:p>
      <text:p text:style-name="Code"><text:span text:style-name="T9">private</text:span> <text:span text:style-name="T10">?</text:span><text:span text:style-name="T9">string</text:span> <text:span text:style-name="T10">$</text:span><text:span text:style-name="T14">memberAlert</text:span> <text:span text:style-name="T10">=</text:span> <text:span text:style-name="T11">null</text:span><text:span text:style-name="T10">;</text:span></text:p>
      <text:p text:style-name="Code"/>
      <text:p text:style-name="Code"><text:span text:style-name="T9">public</text:span> <text:span text:style-name="T14">function</text:span> <text:span text:style-name="T15">__construct</text:span><text:span text:style-name="T10">(</text:span><text:span text:style-name="T9">protected</text:span> <text:span text:style-name="T12">Application</text:span> <text:span text:style-name="T10">$</text:span><text:span text:style-name="T14">application</text:span><text:span text:style-name="T10">)</text:span></text:p>
      <text:p text:style-name="Code">{</text:p>
      <text:p text:style-name="Code"><text:span text:style-name="T10">$</text:span><text:span text:style-name="T11">this</text:span><text:span text:style-name="T10">-&gt;</text:span><text:span text:style-name="T14">flight</text:span> <text:span text:style-name="T10">=</text:span> <text:span text:style-name="T10">$</text:span><text:span text:style-name="T14">application</text:span><text:span text:style-name="T10">-&gt;</text:span><text:span text:style-name="T15">getFlight</text:span><text:span text:style-name="T10">();</text:span></text:p>
      <text:p text:style-name="Code"><text:span text:style-name="T10">$</text:span><text:span text:style-name="T11">this</text:span><text:span text:style-name="T10">-&gt;</text:span><text:span text:style-name="T14">latte</text:span> <text:span text:style-name="T10">=</text:span> <text:span text:style-name="T10">$</text:span><text:span text:style-name="T14">application</text:span><text:span text:style-name="T10">-&gt;</text:span><text:span text:style-name="T15">getLatte</text:span><text:span text:style-name="T10">();</text:span></text:p>
      <text:p text:style-name="Code"><text:span text:style-name="T10">$</text:span><text:span text:style-name="T11">this</text:span><text:span text:style-name="T10">-&gt;</text:span><text:span text:style-name="T15">addLatteFilters</text:span><text:span text:style-name="T10">();</text:span></text:p>
      <text:p text:style-name="Code"><text:span text:style-name="T10">$</text:span><text:span text:style-name="T11">this</text:span><text:span text:style-name="T10">-&gt;</text:span><text:span text:style-name="T14">dataHelper</text:span> <text:span text:style-name="T10">=</text:span> <text:span text:style-name="T9">new</text:span> <text:span text:style-name="T12">DataHelper</text:span><text:span text:style-name="T10">($</text:span><text:span text:style-name="T14">application</text:span><text:span text:style-name="T10">);</text:span></text:p>
      <text:p text:style-name="Code"><text:span text:style-name="T10">$</text:span><text:span text:style-name="T11">this</text:span><text:span text:style-name="T10">-&gt;</text:span><text:span text:style-name="T14">languagesDataHelper</text:span> <text:span text:style-name="T10">=</text:span> <text:span text:style-name="T9">new</text:span> <text:span text:style-name="T12">LanguagesDataHelper</text:span><text:span text:style-name="T10">($</text:span><text:span text:style-name="T14">application</text:span><text:span text:style-name="T10">);</text:span></text:p>
      <text:p text:style-name="Code"><text:span text:style-name="T10">$</text:span><text:span text:style-name="T11">this</text:span><text:span text:style-name="T10">-&gt;</text:span><text:span text:style-name="T14">authorizationDataHelper</text:span> <text:span text:style-name="T10">=</text:span> <text:span text:style-name="T9">new</text:span> <text:span text:style-name="T12">AuthorizationDataHelper</text:span><text:span text:style-name="T10">($</text:span><text:span text:style-name="T14">application</text:span><text:span text:style-name="T10">);</text:span></text:p>
      <text:p text:style-name="Code"><text:span text:style-name="T10">$</text:span><text:span text:style-name="T11">this</text:span><text:span text:style-name="T10">-&gt;</text:span><text:span text:style-name="T14">menuItemDataHelper</text:span> <text:span text:style-name="T10">=</text:span> <text:span text:style-name="T9">new</text:span> <text:span text:style-name="T12">MenuItemDataHelper</text:span><text:span text:style-name="T10">($</text:span><text:span text:style-name="T14">application</text:span><text:span text:style-name="T10">,</text:span> <text:span text:style-name="T10">$</text:span><text:span text:style-name="T11">this</text:span><text:span text:style-name="T10">-&gt;</text:span><text:span text:style-name="T14">authorizationDataHelper</text:span><text:span text:style-name="T10">);</text:span></text:p>
      <text:p text:style-name="Code"><text:span text:style-name="T10">$</text:span><text:span text:style-name="T11">this</text:span><text:span text:style-name="T10">-&gt;</text:span><text:span text:style-name="T14">metadataDataHelper</text:span> <text:span text:style-name="T10">=</text:span> <text:span text:style-name="T9">new</text:span> <text:span text:style-name="T12">MetadataDataHelper</text:span><text:span text:style-name="T10">($</text:span><text:span text:style-name="T14">application</text:span><text:span text:style-name="T10">);</text:span></text:p>
      <text:p text:style-name="Code"><text:span text:style-name="T10">$</text:span><text:span text:style-name="T11">this</text:span><text:span text:style-name="T10">-&gt;</text:span><text:span text:style-name="T14">prodSiteUrl</text:span> <text:span text:style-name="T10">=</text:span> <text:span text:style-name="T10">$</text:span><text:span text:style-name="T11">this</text:span><text:span text:style-name="T10">-&gt;</text:span><text:span text:style-name="T14">metadataDataHelper</text:span><text:span text:style-name="T10">-&gt;</text:span><text:span text:style-name="T15">isTestSite</text:span><text:span text:style-name="T10">()</text:span> <text:span text:style-name="T10">?</text:span> <text:span text:style-name="T10">$</text:span><text:span text:style-name="T11">this</text:span><text:span text:style-name="T10">-&gt;</text:span><text:span text:style-name="T14">metadataDataHelper</text:span><text:span text:style-name="T10">-&gt;</text:span><text:span text:style-name="T15">getProdSiteUrl</text:span><text:span text:style-name="T10">()</text:span> <text:span text:style-name="T10">:</text:span> <text:span text:style-name="T11">null</text:span><text:span text:style-name="T10">;</text:span></text:p>
      <text:p text:style-name="Code">}</text:p>
      <text:p text:style-name="Code"/>
      <text:p text:style-name="Code">#region Protected fucntions</text:p>
      <text:p text:style-name="Code"><text:span text:style-name="T9">protected</text:span> <text:span text:style-name="T14">function</text:span> <text:span text:style-name="T15">getAllLabels</text:span><text:span text:style-name="T10">():</text:span> <text:span text:style-name="T9">array</text:span></text:p>
      <text:p text:style-name="Code">{</text:p>
      <text:p text:style-name="Code"><text:span text:style-name="T9">return</text:span> <text:span text:style-name="T15">array_map</text:span><text:span text:style-name="T10">(</text:span></text:p>
      <text:p text:style-name="Code"><text:span text:style-name="T14">fn</text:span><text:span text:style-name="T10">(</text:span><text:span text:style-name="T12">TimeOfDay</text:span> <text:span text:style-name="T10">$</text:span><text:span text:style-name="T14">case</text:span><text:span text:style-name="T10">)</text:span> <text:span text:style-name="T10">=&gt;</text:span> <text:span text:style-name="T10">[</text:span></text:p>
      <text:p text:style-name="Code"><text:span text:style-name="T10">'</text:span><text:span text:style-name="T16">value</text:span><text:span text:style-name="T10">'</text:span> <text:span text:style-name="T10">=&gt;</text:span> <text:span text:style-name="T10">$</text:span><text:span text:style-name="T14">case</text:span><text:span text:style-name="T10">-&gt;</text:span><text:span text:style-name="T14">value</text:span><text:span text:style-name="T10">,</text:span></text:p>
      <text:p text:style-name="Code"><text:span text:style-name="T10">'</text:span><text:span text:style-name="T16">label</text:span><text:span text:style-name="T10">'</text:span> <text:span text:style-name="T10">=&gt;</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4">case</text:span><text:span text:style-name="T10">-&gt;</text:span><text:span text:style-name="T14">value</text:span><text:span text:style-name="T10">)</text:span></text:p>
      <text:p text:style-name="Code">],</text:p>
      <text:p text:style-name="Code"><text:span text:style-name="T12">TimeOfDay</text:span><text:span text:style-name="T10">::</text:span><text:span text:style-name="T15">cases</text:span><text:span text:style-name="T10">()</text:span></text:p>
      <text:p text:style-name="Code">);</text:p>
      <text:p text:style-name="Code">}</text:p>
      <text:p text:style-name="Code"><text:soft-page-break/></text:p>
      <text:p text:style-name="Code"><text:span text:style-name="T9">protected</text:span> <text:span text:style-name="T14">function</text:span> <text:span text:style-name="T15">getAllParams</text:span><text:span text:style-name="T10">(</text:span><text:span text:style-name="T9">array</text:span> <text:span text:style-name="T10">$</text:span><text:span text:style-name="T14">specificParams</text:span><text:span text:style-name="T10">):</text:span> <text:span text:style-name="T9">array</text:span></text:p>
      <text:p text:style-name="Code">{</text:p>
      <text:p text:style-name="Code"><text:span text:style-name="T9">return</text:span> <text:span text:style-name="T12">Params</text:span><text:span text:style-name="T10">::</text:span><text:span text:style-name="T15">getAll</text:span><text:span text:style-name="T10">($</text:span><text:span text:style-name="T14">specificParams</text:span><text:span text:style-name="T10">,</text:span> <text:span text:style-name="T10">$</text:span><text:span text:style-name="T11">this</text:span><text:span text:style-name="T10">-&gt;</text:span><text:span text:style-name="T14">prodSiteUrl</text:span><text:span text:style-name="T10">,</text:span> <text:span text:style-name="T10">$</text:span><text:span text:style-name="T11">this</text:span><text:span text:style-name="T10">-&gt;</text:span><text:span text:style-name="T14">memberAlert</text:span><text:span text:style-name="T10">);</text:span></text:p>
      <text:p text:style-name="Code">}</text:p>
      <text:p text:style-name="Code"/>
      <text:p text:style-name="Code"><text:span text:style-name="T9">protected</text:span> <text:span text:style-name="T14">function</text:span> <text:span text:style-name="T15">getLayout</text:span><text:span text:style-name="T10">():</text:span> <text:span text:style-name="T9">string</text:span></text:p>
      <text:p text:style-name="Code">{</text:p>
      <text:p text:style-name="Code"><text:span text:style-name="T10">$</text:span><text:span text:style-name="T14">navbar</text:span> <text:span text:style-name="T10">=</text:span> <text:span text:style-name="T10">$</text:span><text:span text:style-name="T14">_SESSION</text:span><text:span text:style-name="T10">['</text:span><text:span text:style-name="T16">navbar</text:span><text:span text:style-name="T10">']</text:span> <text:span text:style-name="T10">??</text:span> <text:span text:style-name="T10">'';</text:span></text:p>
      <text:p text:style-name="Code"/>
      <text:p text:style-name="Code"><text:span text:style-name="T9">return</text:span> <text:span text:style-name="T9">match</text:span> <text:span text:style-name="T10">($</text:span><text:span text:style-name="T14">navbar</text:span><text:span text:style-name="T10">)</text:span> <text:span text:style-name="T10">{</text:span></text:p>
      <text:p text:style-name="Code"><text:span text:style-name="T10">'</text:span><text:span text:style-name="T16">user</text:span><text:span text:style-name="T10">'</text:span> <text:span text:style-name="T9">=&gt;</text:span> <text:span text:style-name="T10">'</text:span><text:span text:style-name="T16">../../User/views/user.latte</text:span><text:span text:style-name="T10">',</text:span></text:p>
      <text:p text:style-name="Code"><text:span text:style-name="T10">'</text:span><text:span text:style-name="T16">eventManager</text:span><text:span text:style-name="T10">'</text:span> <text:span text:style-name="T9">=&gt;</text:span> <text:span text:style-name="T10">'</text:span><text:span text:style-name="T16">../../Webmaster/views/eventManager.latte</text:span><text:span text:style-name="T10">',</text:span></text:p>
      <text:p text:style-name="Code"><text:span text:style-name="T10">'</text:span><text:span text:style-name="T16">personManager</text:span><text:span text:style-name="T10">'</text:span> <text:span text:style-name="T9">=&gt;</text:span> <text:span text:style-name="T10">'</text:span><text:span text:style-name="T16">../../Webmaster/views/personManager.latte</text:span><text:span text:style-name="T10">',</text:span></text:p>
      <text:p text:style-name="Code"><text:span text:style-name="T10">'</text:span><text:span text:style-name="T16">redactor</text:span><text:span text:style-name="T10">'</text:span> <text:span text:style-name="T9">=&gt;</text:span> <text:span text:style-name="T10">'</text:span><text:span text:style-name="T16">../../Webmaster/views/redactor.latte</text:span><text:span text:style-name="T10">',</text:span></text:p>
      <text:p text:style-name="Code"><text:span text:style-name="T10">'</text:span><text:span text:style-name="T16">visitorInsights</text:span><text:span text:style-name="T10">'</text:span> <text:span text:style-name="T9">=&gt;</text:span> <text:span text:style-name="T10">'</text:span><text:span text:style-name="T16">../../Webmaster/views/visitorInsights.latte</text:span><text:span text:style-name="T10">',</text:span></text:p>
      <text:p text:style-name="Code"><text:span text:style-name="T10">'</text:span><text:span text:style-name="T16">webmaster</text:span><text:span text:style-name="T10">'</text:span> <text:span text:style-name="T9">=&gt;</text:span> <text:span text:style-name="T10">'</text:span><text:span text:style-name="T16">../../Webmaster/views/webmaster.latte</text:span><text:span text:style-name="T10">',</text:span></text:p>
      <text:p text:style-name="Code"><text:span text:style-name="T10">''</text:span> <text:span text:style-name="T9">=&gt;</text:span> <text:span text:style-name="T10">'</text:span><text:span text:style-name="T16">../../Common/views/home.latte</text:span><text:span text:style-name="T10">',</text:span></text:p>
      <text:p text:style-name="Code"><text:span text:style-name="T9">default</text:span> <text:span text:style-name="T9">=&gt;</text:span> <text:span text:style-name="T12">Application</text:span><text:span text:style-name="T10">::</text:span><text:span text:style-name="T15">unreachable</text:span><text:span text:style-name="T10">("</text:span><text:span text:style-name="T16">Fatal error in file with navbar=</text:span><text:span text:style-name="T10">{$</text:span><text:span text:style-name="T14">navbar</text:span><text:span text:style-name="T10">}",</text:span> <text:span text:style-name="T11">__FILE__</text:span><text:span text:style-name="T10">,</text:span> <text:span text:style-name="T11">__LINE__</text:span><text:span text:style-name="T10">),</text:span></text:p>
      <text:p text:style-name="Code">};</text:p>
      <text:p text:style-name="Code">}</text:p>
      <text:p text:style-name="Code"/>
      <text:p text:style-name="Code">/**</text:p>
      <text:p text:style-name="Code">* Retrieves navigation items filtered according to the current user and their groups.</text:p>
      <text:p text:style-name="Code">*</text:p>
      <text:p text:style-name="Code"><text:span text:style-name="T21">* </text:span><text:span text:style-name="T22">@param</text:span><text:span text:style-name="T16"> </text:span><text:span text:style-name="T22">object</text:span><text:span text:style-name="T23">|</text:span><text:span text:style-name="T22">false</text:span><text:span text:style-name="T23">|</text:span><text:span text:style-name="T22">null</text:span><text:span text:style-name="T16"> </text:span><text:span text:style-name="T21">$person The current user object, false for anonymous.</text:span></text:p>
      <text:p text:style-name="Code"><text:span text:style-name="T21">* </text:span><text:span text:style-name="T22">@param</text:span><text:span text:style-name="T16"> </text:span><text:span text:style-name="T22">bool</text:span><text:span text:style-name="T16"> </text:span><text:span text:style-name="T21">$all If true, returns all items without filtering.</text:span></text:p>
      <text:p text:style-name="Code"><text:span text:style-name="T21">* </text:span><text:span text:style-name="T22">@return</text:span><text:span text:style-name="T16"> </text:span><text:span text:style-name="T22">array</text:span><text:span text:style-name="T21">&lt;</text:span><text:span text:style-name="T22">int</text:span><text:span text:style-name="T21">, object&gt; Array of navigation item objects.</text:span></text:p>
      <text:p text:style-name="Code">*/</text:p>
      <text:p text:style-name="Code"><text:span text:style-name="T9">protected</text:span> <text:span text:style-name="T14">function</text:span> <text:span text:style-name="T15">getNavItems</text:span><text:span text:style-name="T10">(</text:span><text:span text:style-name="T9">object</text:span><text:span text:style-name="T10">|</text:span><text:span text:style-name="T9">false</text:span><text:span text:style-name="T10">|</text:span><text:span text:style-name="T9">null</text:span> <text:span text:style-name="T10">$</text:span><text:span text:style-name="T14">person</text:span><text:span text:style-name="T10">,</text:span> <text:span text:style-name="T9">bool</text:span> <text:span text:style-name="T10">$</text:span><text:span text:style-name="T14">all</text:span> <text:span text:style-name="T10">=</text:span> <text:span text:style-name="T11">false</text:span><text:span text:style-name="T10">):</text:span> <text:span text:style-name="T9">array</text:span></text:p>
      <text:p text:style-name="Code">{</text:p>
      <text:p text:style-name="Code"><text:span text:style-name="T10">$</text:span><text:span text:style-name="T14">userGroups</text:span> <text:span text:style-name="T10">=</text:span> <text:span text:style-name="T10">[];</text:span></text:p>
      <text:p text:style-name="Code"><text:span text:style-name="T9">if</text:span> <text:span text:style-name="T10">($</text:span><text:span text:style-name="T14">person</text:span> <text:span text:style-name="T10">&amp;&amp;</text:span> <text:span text:style-name="T10">$</text:span><text:span text:style-name="T14">person</text:span> <text:span text:style-name="T10">!==</text:span> <text:span text:style-name="T11">false</text:span><text:span text:style-name="T10">)</text:span> <text:span text:style-name="T10">{</text:span></text:p>
      <text:p text:style-name="Code"><text:span text:style-name="T10">$</text:span><text:span text:style-name="T14">userGroups</text:span> <text:span text:style-name="T10">=</text:span> <text:span text:style-name="T10">$</text:span><text:span text:style-name="T11">this</text:span><text:span text:style-name="T10">-&gt;</text:span><text:span text:style-name="T14">authorizationDataHelper</text:span><text:span text:style-name="T10">-&gt;</text:span><text:span text:style-name="T15">getUserGroups</text:span><text:span text:style-name="T10">($</text:span><text:span text:style-name="T14">person</text:span><text:span text:style-name="T10">-&gt;</text:span><text:span text:style-name="T14">Email</text:span><text:span text:style-name="T10">);</text:span></text:p>
      <text:p text:style-name="Code">}</text:p>
      <text:p text:style-name="Code"><text:span text:style-name="T10">$</text:span><text:span text:style-name="T14">filter</text:span> <text:span text:style-name="T10">=</text:span> <text:span text:style-name="T10">!$</text:span><text:span text:style-name="T14">all</text:span> <text:span text:style-name="T10">?</text:span> <text:span text:style-name="T10">['</text:span><text:span text:style-name="T16">What</text:span><text:span text:style-name="T10">'</text:span> <text:span text:style-name="T10">=&gt;</text:span> <text:span text:style-name="T10">'</text:span><text:span text:style-name="T16">navbar</text:span><text:span text:style-name="T10">']</text:span> <text:span text:style-name="T10">:</text:span> <text:span text:style-name="T10">[];</text:span></text:p>
      <text:p text:style-name="Code"/>
      <text:p text:style-name="Code"><text:span text:style-name="T10">$</text:span><text:span text:style-name="T14">navItems</text:span> <text:span text:style-name="T10">=</text:span> <text:span text:style-name="T10">$</text:span><text:span text:style-name="T11">this</text:span><text:span text:style-name="T10">-&gt;</text:span><text:span text:style-name="T14">dataHelper</text:span><text:span text:style-name="T10">-&gt;</text:span><text:span text:style-name="T15">gets</text:span><text:span text:style-name="T10">(</text:span></text:p>
      <text:p text:style-name="Code"><text:span text:style-name="T10">'</text:span><text:span text:style-name="T16">MenuItem</text:span><text:span text:style-name="T10">',</text:span></text:p>
      <text:p text:style-name="Code"><text:span text:style-name="T10">$</text:span><text:span text:style-name="T14">filter</text:span><text:span text:style-name="T10">,</text:span></text:p>
      <text:p text:style-name="Code"><text:span text:style-name="T10">'</text:span><text:span text:style-name="T16">Id, Label AS Name, Url AS Route, IdGroup, ForMembers, ForContacts, ForAnonymous, What, Type, Label, Icon, Url</text:span><text:span text:style-name="T10">',</text:span></text:p>
      <text:p text:style-name="Code"><text:span text:style-name="T10">'</text:span><text:span text:style-name="T16">Position</text:span><text:span text:style-name="T10">'</text:span></text:p>
      <text:p text:style-name="Code">);</text:p>
      <text:p text:style-name="Code"/>
      <text:p text:style-name="Code"><text:span text:style-name="T10">$</text:span><text:span text:style-name="T14">filteredNavItems</text:span> <text:span text:style-name="T10">=</text:span> <text:span text:style-name="T10">[];</text:span></text:p>
      <text:p text:style-name="Code"><text:span text:style-name="T9">foreach</text:span> <text:span text:style-name="T10">($</text:span><text:span text:style-name="T14">navItems</text:span> <text:span text:style-name="T10">as</text:span> <text:span text:style-name="T10">$</text:span><text:span text:style-name="T14">navItem</text:span><text:span text:style-name="T10">)</text:span> <text:span text:style-name="T10">{</text:span></text:p>
      <text:p text:style-name="Code"><text:span text:style-name="T9">if</text:span> <text:span text:style-name="T10">(</text:span></text:p>
      <text:p text:style-name="Code"><text:span text:style-name="T10">($</text:span><text:span text:style-name="T14">person</text:span> <text:span text:style-name="T10">===</text:span> <text:span text:style-name="T11">false</text:span> <text:span text:style-name="T10">&amp;&amp;</text:span> <text:span text:style-name="T10">$</text:span><text:span text:style-name="T14">navItem</text:span><text:span text:style-name="T10">-&gt;</text:span><text:span text:style-name="T14">ForAnonymous</text:span> <text:span text:style-name="T10">==</text:span> <text:span text:style-name="T11">1</text:span><text:span text:style-name="T10">)</text:span> <text:span text:style-name="T10">||</text:span></text:p>
      <text:p text:style-name="Code"><text:span text:style-name="T10">($</text:span><text:span text:style-name="T14">person</text:span> <text:span text:style-name="T10">&amp;&amp;</text:span> <text:span text:style-name="T10">$</text:span><text:span text:style-name="T14">navItem</text:span><text:span text:style-name="T10">-&gt;</text:span><text:span text:style-name="T14">ForMembers</text:span> <text:span text:style-name="T10">==</text:span> <text:span text:style-name="T11">1</text:span> <text:span text:style-name="T10">&amp;&amp;</text:span></text:p>
      <text:p text:style-name="Code">(</text:p>
      <text:p text:style-name="Code"><text:span text:style-name="T10">$</text:span><text:span text:style-name="T14">navItem</text:span><text:span text:style-name="T10">-&gt;</text:span><text:span text:style-name="T14">IdGroup</text:span> <text:span text:style-name="T10">===</text:span> <text:span text:style-name="T11">null</text:span> <text:span text:style-name="T10">||</text:span></text:p>
      <text:p text:style-name="Code"><text:span text:style-name="T10">(!</text:span><text:span text:style-name="T15">empty</text:span><text:span text:style-name="T10">($</text:span><text:span text:style-name="T14">userGroups</text:span><text:span text:style-name="T10">)</text:span> <text:span text:style-name="T10">&amp;&amp;</text:span> <text:span text:style-name="T15">in_array</text:span><text:span text:style-name="T10">($</text:span><text:span text:style-name="T14">navItem</text:span><text:span text:style-name="T10">-&gt;</text:span><text:span text:style-name="T14">IdGroup</text:span><text:span text:style-name="T10">,</text:span> <text:span text:style-name="T10">$</text:span><text:span text:style-name="T14">userGroups</text:span><text:span text:style-name="T10">,</text:span> <text:span text:style-name="T11">true</text:span><text:span text:style-name="T10">))</text:span></text:p>
      <text:p text:style-name="Code">)</text:p>
      <text:p text:style-name="Code"><text:span text:style-name="T10">)</text:span> <text:span text:style-name="T10">||</text:span></text:p>
      <text:p text:style-name="Code"><text:span text:style-name="T10">$</text:span><text:span text:style-name="T14">all</text:span></text:p>
      <text:p text:style-name="Code"><text:soft-page-break/><text:span text:style-name="T10">)</text:span> <text:span text:style-name="T10">{</text:span></text:p>
      <text:p text:style-name="Code"><text:span text:style-name="T10">$</text:span><text:span text:style-name="T14">filteredNavItems</text:span><text:span text:style-name="T10">[]</text:span> <text:span text:style-name="T10">=</text:span> <text:span text:style-name="T10">$</text:span><text:span text:style-name="T14">navItem</text:span><text:span text:style-name="T10">;</text:span></text:p>
      <text:p text:style-name="Code">}</text:p>
      <text:p text:style-name="Code">}</text:p>
      <text:p text:style-name="Code"/>
      <text:p text:style-name="Code"><text:span text:style-name="T10">$</text:span><text:span text:style-name="T14">groups</text:span> <text:span text:style-name="T10">=</text:span> <text:span text:style-name="T10">$</text:span><text:span text:style-name="T11">this</text:span><text:span text:style-name="T10">-&gt;</text:span><text:span text:style-name="T14">dataHelper</text:span><text:span text:style-name="T10">-&gt;</text:span><text:span text:style-name="T15">gets</text:span><text:span text:style-name="T10">('</text:span><text:span text:style-name="T16">Group</text:span><text:span text:style-name="T10">',</text:span> <text:span text:style-name="T10">['</text:span><text:span text:style-name="T16">Inactivated</text:span><text:span text:style-name="T10">'</text:span> <text:span text:style-name="T10">=&gt;</text:span> <text:span text:style-name="T11">0</text:span><text:span text:style-name="T10">]);</text:span></text:p>
      <text:p text:style-name="Code"><text:span text:style-name="T10">$</text:span><text:span text:style-name="T14">groupsById</text:span> <text:span text:style-name="T10">=</text:span> <text:span text:style-name="T10">[];</text:span></text:p>
      <text:p text:style-name="Code"><text:span text:style-name="T9">foreach</text:span> <text:span text:style-name="T10">($</text:span><text:span text:style-name="T14">groups</text:span> <text:span text:style-name="T10">as</text:span> <text:span text:style-name="T10">$</text:span><text:span text:style-name="T14">group</text:span><text:span text:style-name="T10">)</text:span> <text:span text:style-name="T10">{</text:span></text:p>
      <text:p text:style-name="Code"><text:span text:style-name="T10">$</text:span><text:span text:style-name="T14">groupsById</text:span><text:span text:style-name="T10">[$</text:span><text:span text:style-name="T14">group</text:span><text:span text:style-name="T10">-&gt;</text:span><text:span text:style-name="T14">Id</text:span><text:span text:style-name="T10">]</text:span> <text:span text:style-name="T10">=</text:span> <text:span text:style-name="T10">$</text:span><text:span text:style-name="T14">group</text:span><text:span text:style-name="T10">-&gt;</text:span><text:span text:style-name="T14">Name</text:span><text:span text:style-name="T10">;</text:span></text:p>
      <text:p text:style-name="Code">}</text:p>
      <text:p text:style-name="Code"/>
      <text:p text:style-name="Code"><text:span text:style-name="T9">foreach</text:span> <text:span text:style-name="T10">($</text:span><text:span text:style-name="T14">filteredNavItems</text:span> <text:span text:style-name="T10">as</text:span> <text:span text:style-name="T10">$</text:span><text:span text:style-name="T14">navItem</text:span><text:span text:style-name="T10">)</text:span> <text:span text:style-name="T10">{</text:span></text:p>
      <text:p text:style-name="Code"><text:span text:style-name="T10">$</text:span><text:span text:style-name="T14">navItem</text:span><text:span text:style-name="T10">-&gt;</text:span><text:span text:style-name="T14">GroupName</text:span> <text:span text:style-name="T10">=</text:span> <text:span text:style-name="T10">$</text:span><text:span text:style-name="T14">navItem</text:span><text:span text:style-name="T10">-&gt;</text:span><text:span text:style-name="T14">IdGroup</text:span> <text:span text:style-name="T10">!==</text:span> <text:span text:style-name="T11">null</text:span> <text:span text:style-name="T10">&amp;&amp;</text:span> <text:span text:style-name="T15">isset</text:span><text:span text:style-name="T10">($</text:span><text:span text:style-name="T14">groupsById</text:span><text:span text:style-name="T10">[$</text:span><text:span text:style-name="T14">navItem</text:span><text:span text:style-name="T10">-&gt;</text:span><text:span text:style-name="T14">IdGroup</text:span><text:span text:style-name="T10">])</text:span></text:p>
      <text:p text:style-name="Code"><text:span text:style-name="T10">?</text:span> <text:span text:style-name="T10">$</text:span><text:span text:style-name="T14">groupsById</text:span><text:span text:style-name="T10">[$</text:span><text:span text:style-name="T14">navItem</text:span><text:span text:style-name="T10">-&gt;</text:span><text:span text:style-name="T14">IdGroup</text:span><text:span text:style-name="T10">]</text:span></text:p>
      <text:p text:style-name="Code"><text:span text:style-name="T10">:</text:span> <text:span text:style-name="T11">null</text:span><text:span text:style-name="T10">;</text:span></text:p>
      <text:p text:style-name="Code">}</text:p>
      <text:p text:style-name="Code"/>
      <text:p text:style-name="Code"><text:span text:style-name="T9">return</text:span> <text:span text:style-name="T10">$</text:span><text:span text:style-name="T14">filteredNavItems</text:span><text:span text:style-name="T10">;</text:span></text:p>
      <text:p text:style-name="Code">}</text:p>
      <text:p text:style-name="Code"/>
      <text:p text:style-name="Code">/**</text:p>
      <text:p text:style-name="Code">* Retrieves sidebar menu items filtered according to the current user and their groups,</text:p>
      <text:p text:style-name="Code">* structured as a nested array matching the expected sidebar format.</text:p>
      <text:p text:style-name="Code">*</text:p>
      <text:p text:style-name="Code"><text:span text:style-name="T21">* </text:span><text:span text:style-name="T22">@param</text:span><text:span text:style-name="T16"> </text:span><text:span text:style-name="T22">object</text:span><text:span text:style-name="T23">|</text:span><text:span text:style-name="T22">false</text:span><text:span text:style-name="T23">|</text:span><text:span text:style-name="T22">null</text:span><text:span text:style-name="T16"> </text:span><text:span text:style-name="T21">$person The current user object, false for anonymous.</text:span></text:p>
      <text:p text:style-name="Code"><text:span text:style-name="T21">* </text:span><text:span text:style-name="T22">@param</text:span><text:span text:style-name="T16"> </text:span><text:span text:style-name="T22">bool</text:span><text:span text:style-name="T16"> </text:span><text:span text:style-name="T21">$all If true, returns all items without filtering.</text:span></text:p>
      <text:p text:style-name="Code"><text:span text:style-name="T21">* </text:span><text:span text:style-name="T22">@return</text:span><text:span text:style-name="T16"> </text:span><text:span text:style-name="T22">array</text:span><text:span text:style-name="T21">&lt;</text:span><text:span text:style-name="T22">int</text:span><text:span text:style-name="T21">, array&gt; Structured sidebar menu array.</text:span></text:p>
      <text:p text:style-name="Code">*/</text:p>
      <text:p text:style-name="Code"><text:span text:style-name="T9">protected</text:span> <text:span text:style-name="T14">function</text:span> <text:span text:style-name="T15">getSidebarMenuItems</text:span><text:span text:style-name="T10">(</text:span><text:span text:style-name="T9">object</text:span><text:span text:style-name="T10">|</text:span><text:span text:style-name="T9">false</text:span><text:span text:style-name="T10">|</text:span><text:span text:style-name="T9">null</text:span> <text:span text:style-name="T10">$</text:span><text:span text:style-name="T14">person</text:span><text:span text:style-name="T10">,</text:span> <text:span text:style-name="T9">bool</text:span> <text:span text:style-name="T10">$</text:span><text:span text:style-name="T14">all</text:span> <text:span text:style-name="T10">=</text:span> <text:span text:style-name="T11">false</text:span><text:span text:style-name="T10">):</text:span> <text:span text:style-name="T9">array</text:span></text:p>
      <text:p text:style-name="Code">{</text:p>
      <text:p text:style-name="Code"><text:span text:style-name="T10">$</text:span><text:span text:style-name="T14">userGroups</text:span> <text:span text:style-name="T10">=</text:span> <text:span text:style-name="T10">[];</text:span></text:p>
      <text:p text:style-name="Code"><text:span text:style-name="T9">if</text:span> <text:span text:style-name="T10">($</text:span><text:span text:style-name="T14">person</text:span> <text:span text:style-name="T10">&amp;&amp;</text:span> <text:span text:style-name="T10">$</text:span><text:span text:style-name="T14">person</text:span> <text:span text:style-name="T10">!==</text:span> <text:span text:style-name="T11">false</text:span><text:span text:style-name="T10">)</text:span> <text:span text:style-name="T10">{</text:span></text:p>
      <text:p text:style-name="Code"><text:span text:style-name="T10">$</text:span><text:span text:style-name="T14">userGroups</text:span> <text:span text:style-name="T10">=</text:span> <text:span text:style-name="T10">$</text:span><text:span text:style-name="T11">this</text:span><text:span text:style-name="T10">-&gt;</text:span><text:span text:style-name="T14">authorizationDataHelper</text:span><text:span text:style-name="T10">-&gt;</text:span><text:span text:style-name="T15">getUserGroups</text:span><text:span text:style-name="T10">($</text:span><text:span text:style-name="T14">person</text:span><text:span text:style-name="T10">-&gt;</text:span><text:span text:style-name="T14">Email</text:span><text:span text:style-name="T10">);</text:span></text:p>
      <text:p text:style-name="Code">}</text:p>
      <text:p text:style-name="Code"/>
      <text:p text:style-name="Code"><text:span text:style-name="T10">$</text:span><text:span text:style-name="T14">navItems</text:span> <text:span text:style-name="T10">=</text:span> <text:span text:style-name="T10">$</text:span><text:span text:style-name="T11">this</text:span><text:span text:style-name="T10">-&gt;</text:span><text:span text:style-name="T14">dataHelper</text:span><text:span text:style-name="T10">-&gt;</text:span><text:span text:style-name="T15">gets</text:span><text:span text:style-name="T10">(</text:span></text:p>
      <text:p text:style-name="Code"><text:span text:style-name="T10">'</text:span><text:span text:style-name="T16">MenuItem</text:span><text:span text:style-name="T10">',</text:span></text:p>
      <text:p text:style-name="Code"><text:span text:style-name="T10">['</text:span><text:span text:style-name="T16">What</text:span><text:span text:style-name="T10">'</text:span> <text:span text:style-name="T10">=&gt;</text:span> <text:span text:style-name="T10">'</text:span><text:span text:style-name="T16">sidebar</text:span><text:span text:style-name="T10">'],</text:span></text:p>
      <text:p text:style-name="Code"><text:span text:style-name="T10">'</text:span><text:span text:style-name="T16">Id, ParentId, Type, Label, Icon, Url, IdGroup, ForMembers, ForContacts, ForAnonymous</text:span><text:span text:style-name="T10">',</text:span></text:p>
      <text:p text:style-name="Code"><text:span text:style-name="T10">'</text:span><text:span text:style-name="T16">Position</text:span><text:span text:style-name="T10">'</text:span></text:p>
      <text:p text:style-name="Code">);</text:p>
      <text:p text:style-name="Code"/>
      <text:p text:style-name="Code"><text:span text:style-name="T10">$</text:span><text:span text:style-name="T14">filteredNavItems</text:span> <text:span text:style-name="T10">=</text:span> <text:span text:style-name="T10">[];</text:span></text:p>
      <text:p text:style-name="Code"><text:span text:style-name="T9">foreach</text:span> <text:span text:style-name="T10">($</text:span><text:span text:style-name="T14">navItems</text:span> <text:span text:style-name="T10">as</text:span> <text:span text:style-name="T10">$</text:span><text:span text:style-name="T14">navItem</text:span><text:span text:style-name="T10">)</text:span> <text:span text:style-name="T10">{</text:span></text:p>
      <text:p text:style-name="Code"><text:span text:style-name="T9">if</text:span> <text:span text:style-name="T10">(</text:span></text:p>
      <text:p text:style-name="Code"><text:span text:style-name="T10">($</text:span><text:span text:style-name="T14">person</text:span> <text:span text:style-name="T10">===</text:span> <text:span text:style-name="T11">false</text:span> <text:span text:style-name="T10">&amp;&amp;</text:span> <text:span text:style-name="T10">$</text:span><text:span text:style-name="T14">navItem</text:span><text:span text:style-name="T10">-&gt;</text:span><text:span text:style-name="T14">ForAnonymous</text:span> <text:span text:style-name="T10">==</text:span> <text:span text:style-name="T11">1</text:span><text:span text:style-name="T10">)</text:span> <text:span text:style-name="T10">||</text:span></text:p>
      <text:p text:style-name="Code"><text:span text:style-name="T10">($</text:span><text:span text:style-name="T14">person</text:span> <text:span text:style-name="T10">&amp;&amp;</text:span> <text:span text:style-name="T10">$</text:span><text:span text:style-name="T14">navItem</text:span><text:span text:style-name="T10">-&gt;</text:span><text:span text:style-name="T14">ForMembers</text:span> <text:span text:style-name="T10">==</text:span> <text:span text:style-name="T11">1</text:span> <text:span text:style-name="T10">&amp;&amp;</text:span></text:p>
      <text:p text:style-name="Code">(</text:p>
      <text:p text:style-name="Code"><text:span text:style-name="T10">$</text:span><text:span text:style-name="T14">navItem</text:span><text:span text:style-name="T10">-&gt;</text:span><text:span text:style-name="T14">IdGroup</text:span> <text:span text:style-name="T10">===</text:span> <text:span text:style-name="T11">null</text:span> <text:span text:style-name="T10">||</text:span></text:p>
      <text:p text:style-name="Code"><text:span text:style-name="T10">(!</text:span><text:span text:style-name="T15">empty</text:span><text:span text:style-name="T10">($</text:span><text:span text:style-name="T14">userGroups</text:span><text:span text:style-name="T10">)</text:span> <text:span text:style-name="T10">&amp;&amp;</text:span> <text:span text:style-name="T15">in_array</text:span><text:span text:style-name="T10">($</text:span><text:span text:style-name="T14">navItem</text:span><text:span text:style-name="T10">-&gt;</text:span><text:span text:style-name="T14">IdGroup</text:span><text:span text:style-name="T10">,</text:span> <text:span text:style-name="T10">$</text:span><text:span text:style-name="T14">userGroups</text:span><text:span text:style-name="T10">,</text:span> <text:span text:style-name="T11">true</text:span><text:span text:style-name="T10">))</text:span></text:p>
      <text:p text:style-name="Code">)</text:p>
      <text:p text:style-name="Code"><text:span text:style-name="T10">)</text:span> <text:span text:style-name="T10">||</text:span></text:p>
      <text:p text:style-name="Code"><text:span text:style-name="T10">$</text:span><text:span text:style-name="T14">all</text:span></text:p>
      <text:p text:style-name="Code"><text:span text:style-name="T10">)</text:span> <text:span text:style-name="T10">{</text:span></text:p>
      <text:p text:style-name="Code"><text:span text:style-name="T10">$</text:span><text:span text:style-name="T14">filteredNavItems</text:span><text:span text:style-name="T10">[$</text:span><text:span text:style-name="T14">navItem</text:span><text:span text:style-name="T10">-&gt;</text:span><text:span text:style-name="T14">Id</text:span><text:span text:style-name="T10">]</text:span> <text:span text:style-name="T10">=</text:span> <text:span text:style-name="T10">$</text:span><text:span text:style-name="T14">navItem</text:span><text:span text:style-name="T10">;</text:span></text:p>
      <text:p text:style-name="Code">}</text:p>
      <text:p text:style-name="Code"><text:soft-page-break/>}</text:p>
      <text:p text:style-name="Code"/>
      <text:p text:style-name="Code">// Build structured menu from flat filtered list</text:p>
      <text:p text:style-name="Code"><text:span text:style-name="T10">$</text:span><text:span text:style-name="T14">sidebarMenu</text:span> <text:span text:style-name="T10">=</text:span> <text:span text:style-name="T10">[];</text:span></text:p>
      <text:p text:style-name="Code"><text:span text:style-name="T9">foreach</text:span> <text:span text:style-name="T10">($</text:span><text:span text:style-name="T14">filteredNavItems</text:span> <text:span text:style-name="T10">as</text:span> <text:span text:style-name="T10">$</text:span><text:span text:style-name="T14">navItem</text:span><text:span text:style-name="T10">)</text:span> <text:span text:style-name="T10">{</text:span></text:p>
      <text:p text:style-name="Code"><text:span text:style-name="T9">if</text:span> <text:span text:style-name="T10">($</text:span><text:span text:style-name="T14">navItem</text:span><text:span text:style-name="T10">-&gt;</text:span><text:span text:style-name="T14">ParentId</text:span> <text:span text:style-name="T10">!==</text:span> <text:span text:style-name="T11">null</text:span><text:span text:style-name="T10">)</text:span> <text:span text:style-name="T10">{</text:span></text:p>
      <text:p text:style-name="Code"><text:span text:style-name="T9">continue</text:span><text:span text:style-name="T10">;</text:span> <text:span text:style-name="T24">// children are attached below</text:span></text:p>
      <text:p text:style-name="Code">}</text:p>
      <text:p text:style-name="Code"/>
      <text:p text:style-name="Code"><text:span text:style-name="T10">$</text:span><text:span text:style-name="T14">entry</text:span> <text:span text:style-name="T10">=</text:span> <text:span text:style-name="T10">['</text:span><text:span text:style-name="T16">type</text:span><text:span text:style-name="T10">'</text:span> <text:span text:style-name="T10">=&gt;</text:span> <text:span text:style-name="T10">$</text:span><text:span text:style-name="T14">navItem</text:span><text:span text:style-name="T10">-&gt;</text:span><text:span text:style-name="T14">Type</text:span><text:span text:style-name="T10">];</text:span></text:p>
      <text:p text:style-name="Code"/>
      <text:p text:style-name="Code"><text:span text:style-name="T9">match</text:span> <text:span text:style-name="T10">($</text:span><text:span text:style-name="T14">navItem</text:span><text:span text:style-name="T10">-&gt;</text:span><text:span text:style-name="T14">Type</text:span><text:span text:style-name="T10">)</text:span> <text:span text:style-name="T10">{</text:span></text:p>
      <text:p text:style-name="Code"><text:span text:style-name="T10">'</text:span><text:span text:style-name="T16">heading</text:span><text:span text:style-name="T10">'</text:span> <text:span text:style-name="T9">=&gt;</text:span> <text:span text:style-name="T10">$</text:span><text:span text:style-name="T14">entry</text:span><text:span text:style-name="T10">['</text:span><text:span text:style-name="T16">label</text:span><text:span text:style-name="T10">']</text:span> <text:span text:style-name="T10">=</text:span> <text:span text:style-name="T10">$</text:span><text:span text:style-name="T14">navItem</text:span><text:span text:style-name="T10">-&gt;</text:span><text:span text:style-name="T14">Label</text:span><text:span text:style-name="T10">,</text:span></text:p>
      <text:p text:style-name="Code"><text:span text:style-name="T10">'</text:span><text:span text:style-name="T16">divider</text:span><text:span text:style-name="T10">'</text:span> <text:span text:style-name="T9">=&gt;</text:span> <text:span text:style-name="T11">null</text:span><text:span text:style-name="T10">,</text:span></text:p>
      <text:p text:style-name="Code"><text:span text:style-name="T10">'</text:span><text:span text:style-name="T16">link</text:span><text:span text:style-name="T10">'</text:span> <text:span text:style-name="T9">=&gt;</text:span> <text:span text:style-name="T10">$</text:span><text:span text:style-name="T14">entry</text:span> <text:span text:style-name="T10">+=</text:span> <text:span text:style-name="T10">['</text:span><text:span text:style-name="T16">label</text:span><text:span text:style-name="T10">'</text:span> <text:span text:style-name="T10">=&gt;</text:span> <text:span text:style-name="T10">$</text:span><text:span text:style-name="T14">navItem</text:span><text:span text:style-name="T10">-&gt;</text:span><text:span text:style-name="T14">Label</text:span><text:span text:style-name="T10">,</text:span> <text:span text:style-name="T10">'</text:span><text:span text:style-name="T16">icon</text:span><text:span text:style-name="T10">'</text:span> <text:span text:style-name="T10">=&gt;</text:span> <text:span text:style-name="T10">$</text:span><text:span text:style-name="T14">navItem</text:span><text:span text:style-name="T10">-&gt;</text:span><text:span text:style-name="T14">Icon</text:span><text:span text:style-name="T10">,</text:span> <text:span text:style-name="T10">'</text:span><text:span text:style-name="T16">url</text:span><text:span text:style-name="T10">'</text:span> <text:span text:style-name="T10">=&gt;</text:span> <text:span text:style-name="T10">$</text:span><text:span text:style-name="T14">navItem</text:span><text:span text:style-name="T10">-&gt;</text:span><text:span text:style-name="T14">Url</text:span><text:span text:style-name="T10">],</text:span></text:p>
      <text:p text:style-name="Code"><text:span text:style-name="T10">'</text:span><text:span text:style-name="T16">submenu</text:span><text:span text:style-name="T10">'</text:span> <text:span text:style-name="T9">=&gt;</text:span> <text:span text:style-name="T10">$</text:span><text:span text:style-name="T14">entry</text:span> <text:span text:style-name="T10">+=</text:span> <text:span text:style-name="T10">[</text:span></text:p>
      <text:p text:style-name="Code"><text:span text:style-name="T10">'</text:span><text:span text:style-name="T16">label</text:span><text:span text:style-name="T10">'</text:span> <text:span text:style-name="T10">=&gt;</text:span> <text:span text:style-name="T10">$</text:span><text:span text:style-name="T14">navItem</text:span><text:span text:style-name="T10">-&gt;</text:span><text:span text:style-name="T14">Label</text:span><text:span text:style-name="T10">,</text:span></text:p>
      <text:p text:style-name="Code"><text:span text:style-name="T10">'</text:span><text:span text:style-name="T16">icon</text:span><text:span text:style-name="T10">'</text:span> <text:span text:style-name="T10">=&gt;</text:span> <text:span text:style-name="T10">$</text:span><text:span text:style-name="T14">navItem</text:span><text:span text:style-name="T10">-&gt;</text:span><text:span text:style-name="T14">Icon</text:span><text:span text:style-name="T10">,</text:span></text:p>
      <text:p text:style-name="Code"><text:span text:style-name="T10">'</text:span><text:span text:style-name="T16">children</text:span><text:span text:style-name="T10">'</text:span> <text:span text:style-name="T10">=&gt;</text:span> <text:span text:style-name="T15">array_values</text:span><text:span text:style-name="T10">(</text:span></text:p>
      <text:p text:style-name="Code"><text:span text:style-name="T15">array_map</text:span><text:span text:style-name="T10">(</text:span></text:p>
      <text:p text:style-name="Code"><text:span text:style-name="T14">fn</text:span><text:span text:style-name="T10">($</text:span><text:span text:style-name="T14">child</text:span><text:span text:style-name="T10">)</text:span> <text:span text:style-name="T10">=&gt;</text:span> <text:span text:style-name="T10">['</text:span><text:span text:style-name="T16">label</text:span><text:span text:style-name="T10">'</text:span> <text:span text:style-name="T10">=&gt;</text:span> <text:span text:style-name="T10">$</text:span><text:span text:style-name="T14">child</text:span><text:span text:style-name="T10">-&gt;</text:span><text:span text:style-name="T14">Label</text:span><text:span text:style-name="T10">,</text:span> <text:span text:style-name="T10">'</text:span><text:span text:style-name="T16">url</text:span><text:span text:style-name="T10">'</text:span> <text:span text:style-name="T10">=&gt;</text:span> <text:span text:style-name="T10">$</text:span><text:span text:style-name="T14">child</text:span><text:span text:style-name="T10">-&gt;</text:span><text:span text:style-name="T14">Url</text:span><text:span text:style-name="T10">],</text:span></text:p>
      <text:p text:style-name="Code"><text:span text:style-name="T15">array_filter</text:span><text:span text:style-name="T10">(</text:span></text:p>
      <text:p text:style-name="Code"><text:span text:style-name="T10">$</text:span><text:span text:style-name="T14">filteredNavItems</text:span><text:span text:style-name="T10">,</text:span></text:p>
      <text:p text:style-name="Code"><text:span text:style-name="T14">fn</text:span><text:span text:style-name="T10">($</text:span><text:span text:style-name="T14">child</text:span><text:span text:style-name="T10">)</text:span> <text:span text:style-name="T10">=&gt;</text:span> <text:span text:style-name="T10">$</text:span><text:span text:style-name="T14">child</text:span><text:span text:style-name="T10">-&gt;</text:span><text:span text:style-name="T14">ParentId</text:span> <text:span text:style-name="T10">===</text:span> <text:span text:style-name="T10">$</text:span><text:span text:style-name="T14">navItem</text:span><text:span text:style-name="T10">-&gt;</text:span><text:span text:style-name="T14">Id</text:span></text:p>
      <text:p text:style-name="Code">)</text:p>
      <text:p text:style-name="Code">)</text:p>
      <text:p text:style-name="Code">),</text:p>
      <text:p text:style-name="Code">],</text:p>
      <text:p text:style-name="Code">};</text:p>
      <text:p text:style-name="Code"/>
      <text:p text:style-name="Code"><text:span text:style-name="T10">$</text:span><text:span text:style-name="T14">sidebarMenu</text:span><text:span text:style-name="T10">[]</text:span> <text:span text:style-name="T10">=</text:span> <text:span text:style-name="T10">$</text:span><text:span text:style-name="T14">entry</text:span><text:span text:style-name="T10">;</text:span></text:p>
      <text:p text:style-name="Code">}</text:p>
      <text:p text:style-name="Code"/>
      <text:p text:style-name="Code"><text:span text:style-name="T9">return</text:span> <text:span text:style-name="T10">$</text:span><text:span text:style-name="T14">sidebarMenu</text:span><text:span text:style-name="T10">;</text:span></text:p>
      <text:p text:style-name="Code">}</text:p>
      <text:p text:style-name="Code"/>
      <text:p text:style-name="Code"><text:span text:style-name="T9">protected</text:span> <text:span text:style-name="T14">function</text:span> <text:span text:style-name="T15">raiseBadRequest</text:span><text:span text:style-name="T10">(</text:span><text:span text:style-name="T9">string</text:span> <text:span text:style-name="T10">$</text:span><text:span text:style-name="T14">message</text:span><text:span text:style-name="T10">,</text:span> <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BadRequest</text:span><text:span text:style-name="T10">,</text:span> <text:span text:style-name="T10">"</text:span><text:span text:style-name="T16">Error </text:span><text:span text:style-name="T10">{$</text:span><text:span text:style-name="T14">message</text:span><text:span text:style-name="T10">}</text:span><text:span text:style-name="T16">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p>
      <text:p text:style-name="Code"/>
      <text:p text:style-name="Code"><text:span text:style-name="T9">protected</text:span> <text:span text:style-name="T14">function</text:span> <text:span text:style-name="T15">raiseError</text:span><text:span text:style-name="T10">(</text:span><text:span text:style-name="T9">string</text:span> <text:span text:style-name="T10">$</text:span><text:span text:style-name="T14">message</text:span><text:span text:style-name="T10">,</text:span> <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Error</text:span><text:span text:style-name="T10">,</text:span> <text:span text:style-name="T10">"</text:span><text:span text:style-name="T16">Error </text:span><text:span text:style-name="T10">{$</text:span><text:span text:style-name="T14">message</text:span><text:span text:style-name="T10">}</text:span><text:span text:style-name="T16">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p>
      <text:p text:style-name="Code"/>
      <text:p text:style-name="Code"><text:span text:style-name="T9">protected</text:span> <text:span text:style-name="T14">function</text:span> <text:span text:style-name="T15">raiseForbidden</text:span><text:span text:style-name="T10">(</text:span><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Forbidden</text:span><text:span text:style-name="T10">,</text:span> <text:span text:style-name="T10">"</text:span><text:span text:style-name="T16">Access forbidden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p>
      <text:p text:style-name="Code"/>
      <text:p text:style-name="Code"><text:span text:style-name="T9">protected</text:span> <text:span text:style-name="T14">function</text:span> <text:span text:style-name="T15">raiseMethodNotAllowed</text:span><text:span text:style-name="T10">(</text:span><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p>
      <text:p text:style-name="Code"><text:soft-page-break/><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MethodNotAllowed</text:span><text:span text:style-name="T10">,</text:span> <text:span text:style-name="T10">"</text:span><text:span text:style-name="T16">Method </text:span><text:span text:style-name="T10">{$</text:span><text:span text:style-name="T14">_SERVER</text:span><text:span text:style-name="T10">['</text:span><text:span text:style-name="T16">REQUEST_METHOD</text:span><text:span text:style-name="T10">']}</text:span><text:span text:style-name="T16"> not allowed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p>
      <text:p text:style-name="Code"/>
      <text:p text:style-name="Code"><text:span text:style-name="T9">protected</text:span> <text:span text:style-name="T14">function</text:span> <text:span text:style-name="T15">redirect</text:span><text:span text:style-name="T10">(</text:span><text:span text:style-name="T9">string</text:span> <text:span text:style-name="T10">$</text:span><text:span text:style-name="T14">url</text:span><text:span text:style-name="T10">,</text:span> <text:span text:style-name="T10">?</text:span><text:span text:style-name="T12">ApplicationError</text:span> <text:span text:style-name="T10">$</text:span><text:span text:style-name="T14">applicationError</text:span> <text:span text:style-name="T10">=</text:span> <text:span text:style-name="T11">null</text:span><text:span text:style-name="T10">,</text:span> <text:span text:style-name="T10">?</text:span><text:span text:style-name="T9">string</text:span> <text:span text:style-name="T10">$</text:span><text:span text:style-name="T14">message</text:span> <text:span text:style-name="T10">=</text:span> <text:span text:style-name="T11">null</text:span><text:span text:style-name="T10">):</text:span> <text:span text:style-name="T9">void</text:span></text:p>
      <text:p text:style-name="Code">{</text:p>
      <text:p text:style-name="Code"><text:span text:style-name="T9">if</text:span> <text:span text:style-name="T10">($</text:span><text:span text:style-name="T14">applicationError</text:span> <text:span text:style-name="T10">!==</text:span> <text:span text:style-name="T11">null</text:span><text:span text:style-name="T10">)</text:span> <text:span text:style-name="T10">$</text:span><text:span text:style-name="T11">this</text:span><text:span text:style-name="T10">-&gt;</text:span><text:span text:style-name="T14">flight</text:span><text:span text:style-name="T10">-&gt;</text:span><text:span text:style-name="T15">setData</text:span><text:span text:style-name="T10">('</text:span><text:span text:style-name="T16">code</text:span><text:span text:style-name="T10">',</text:span> <text:span text:style-name="T10">$</text:span><text:span text:style-name="T14">applicationError</text:span><text:span text:style-name="T10">-&gt;</text:span><text:span text:style-name="T14">value</text:span><text:span text:style-name="T10">);</text:span></text:p>
      <text:p text:style-name="Code"><text:span text:style-name="T9">if</text:span> <text:span text:style-name="T10">($</text:span><text:span text:style-name="T14">message</text:span> <text:span text:style-name="T10">!==</text:span> <text:span text:style-name="T11">null</text:span><text:span text:style-name="T10">)</text:span> <text:span text:style-name="T10">$</text:span><text:span text:style-name="T11">this</text:span><text:span text:style-name="T10">-&gt;</text:span><text:span text:style-name="T14">flight</text:span><text:span text:style-name="T10">-&gt;</text:span><text:span text:style-name="T15">setData</text:span><text:span text:style-name="T10">('</text:span><text:span text:style-name="T16">message</text:span><text:span text:style-name="T10">',</text:span> <text:span text:style-name="T10">$</text:span><text:span text:style-name="T14">message</text:span><text:span text:style-name="T10">);</text:span></text:p>
      <text:p text:style-name="Code"/>
      <text:p text:style-name="Code"><text:span text:style-name="T10">$</text:span><text:span text:style-name="T14">ua</text:span> <text:span text:style-name="T10">=</text:span> <text:span text:style-name="T10">$</text:span><text:span text:style-name="T14">_SERVER</text:span><text:span text:style-name="T10">['</text:span><text:span text:style-name="T16">HTTP_USER_AGENT</text:span><text:span text:style-name="T10">']</text:span> <text:span text:style-name="T10">??</text:span> <text:span text:style-name="T10">'';</text:span></text:p>
      <text:p text:style-name="Code"><text:span text:style-name="T9">if</text:span> <text:span text:style-name="T10">(</text:span><text:span text:style-name="T15">stripos</text:span><text:span text:style-name="T10">($</text:span><text:span text:style-name="T14">ua</text:span><text:span text:style-name="T10">,</text:span> <text:span text:style-name="T10">'</text:span><text:span text:style-name="T16">TestDevice</text:span><text:span text:style-name="T10">')</text:span> <text:span text:style-name="T10">!==</text:span> <text:span text:style-name="T11">false</text:span><text:span text:style-name="T10">)</text:span> <text:span text:style-name="T10">{</text:span></text:p>
      <text:p text:style-name="Code"><text:span text:style-name="T10">$</text:span><text:span text:style-name="T14">statusCode</text:span> <text:span text:style-name="T10">=</text:span> <text:span text:style-name="T10">$</text:span><text:span text:style-name="T14">applicationError</text:span><text:span text:style-name="T10">?-&gt;</text:span><text:span text:style-name="T14">value</text:span> <text:span text:style-name="T10">??</text:span> <text:span text:style-name="T12">ApplicationError</text:span><text:span text:style-name="T10">::</text:span><text:span text:style-name="T11">Ok</text:span><text:span text:style-name="T10">-&gt;</text:span><text:span text:style-name="T14">value</text:span><text:span text:style-name="T10">;</text:span></text:p>
      <text:p text:style-name="Code"><text:span text:style-name="T10">$</text:span><text:span text:style-name="T11">this</text:span><text:span text:style-name="T10">-&gt;</text:span><text:span text:style-name="T14">application</text:span><text:span text:style-name="T10">-&gt;</text:span><text:span text:style-name="T15">getFlight</text:span><text:span text:style-name="T10">()-&gt;</text:span><text:span text:style-name="T15">response</text:span><text:span text:style-name="T10">()-&gt;</text:span><text:span text:style-name="T15">status</text:span><text:span text:style-name="T10">($</text:span><text:span text:style-name="T14">statusCode</text:span><text:span text:style-name="T10">);</text:span></text:p>
      <text:p text:style-name="Code"><text:span text:style-name="T10">$</text:span><text:span text:style-name="T11">this</text:span><text:span text:style-name="T10">-&gt;</text:span><text:span text:style-name="T14">application</text:span><text:span text:style-name="T10">-&gt;</text:span><text:span text:style-name="T15">getFlight</text:span><text:span text:style-name="T10">()-&gt;</text:span><text:span text:style-name="T15">response</text:span><text:span text:style-name="T10">()-&gt;</text:span><text:span text:style-name="T15">write</text:span><text:span text:style-name="T10">((</text:span><text:span text:style-name="T14">string</text:span><text:span text:style-name="T10">)($</text:span><text:span text:style-name="T14">message</text:span> <text:span text:style-name="T10">??</text:span> <text:span text:style-name="T10">''));</text:span></text:p>
      <text:p text:style-name="Code"><text:span text:style-name="T10">}</text:span> <text:span text:style-name="T9">else</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Flight</text:span><text:span text:style-name="T10">()-&gt;</text:span><text:span text:style-name="T15">redirect</text:span><text:span text:style-name="T10">($</text:span><text:span text:style-name="T14">url</text:span><text:span text:style-name="T10">);</text:span></text:p>
      <text:p text:style-name="Code">}</text:p>
      <text:p text:style-name="Code">}</text:p>
      <text:p text:style-name="Code"/>
      <text:p text:style-name="Code"><text:span text:style-name="T9">protected</text:span> <text:span text:style-name="T14">function</text:span> <text:span text:style-name="T15">userIsAllowedAndMethodIsGood</text:span><text:span text:style-name="T10">(</text:span><text:span text:style-name="T9">string</text:span> <text:span text:style-name="T10">$</text:span><text:span text:style-name="T14">method</text:span><text:span text:style-name="T10">,</text:span> <text:span text:style-name="T9">callable</text:span> <text:span text:style-name="T10">$</text:span><text:span text:style-name="T14">permissionCheck</text:span><text:span text:style-name="T10">):</text:span> <text:span text:style-name="T9">bool</text:span></text:p>
      <text:p text:style-name="Code">{</text:p>
      <text:p text:style-name="Code"><text:span text:style-name="T10">$</text:span><text:span text:style-name="T14">user</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text:span></text:p>
      <text:p text:style-name="Code"><text:span text:style-name="T9">if</text:span> <text:span text:style-name="T10">($</text:span><text:span text:style-name="T14">user</text:span><text:span text:style-name="T10">-&gt;</text:span><text:span text:style-name="T14">person</text:span> <text:span text:style-name="T10">===</text:span> <text:span text:style-name="T11">null</text:span><text:span text:style-name="T10">)</text:span> <text:span text:style-name="T10">{</text:span></text:p>
      <text:p text:style-name="Code"><text:span text:style-name="T10">$</text:span><text:span text:style-name="T14">result</text:span> <text:span text:style-name="T10">=</text:span> <text:span text:style-name="T10">$</text:span><text:span text:style-name="T11">this</text:span><text:span text:style-name="T10">-&gt;</text:span><text:span text:style-name="T14">application</text:span><text:span text:style-name="T10">-&gt;</text:span><text:span text:style-name="T15">getAuthenticationService</text:span><text:span text:style-name="T10">()-&gt;</text:span><text:span text:style-name="T15">handleRememberMeLogin</text:span><text:span text:style-name="T10">();</text:span></text:p>
      <text:p text:style-name="Code"><text:span text:style-name="T9">if</text:span> <text:span text:style-name="T10">($</text:span><text:span text:style-name="T14">result</text:span> <text:span text:style-name="T10">&amp;&amp;</text:span> <text:span text:style-name="T10">$</text:span><text:span text:style-name="T14">result</text:span><text:span text:style-name="T10">-&gt;</text:span><text:span text:style-name="T15">isSuccess</text:span><text:span text:style-name="T10">())</text:span> <text:span text:style-name="T10">{</text:span></text:p>
      <text:p text:style-name="Code"><text:span text:style-name="T10">$</text:span><text:span text:style-name="T11">this</text:span><text:span text:style-name="T10">-&gt;</text:span><text:span text:style-name="T15">redirect</text:span><text:span text:style-name="T10">($</text:span><text:span text:style-name="T14">_SERVER</text:span><text:span text:style-name="T10">['</text:span><text:span text:style-name="T16">REQUEST_URI</text:span><text:span text:style-name="T10">'],</text:span> <text:span text:style-name="T12">ApplicationError</text:span><text:span text:style-name="T10">::</text:span><text:span text:style-name="T11">Ok</text:span><text:span text:style-name="T10">,</text:span> <text:span text:style-name="T10">"</text:span><text:span text:style-name="T16">Auto sign in succeeded for </text:span><text:span text:style-name="T10">{$</text:span><text:span text:style-name="T14">result</text:span><text:span text:style-name="T10">-&gt;</text:span><text:span text:style-name="T15">getUser</text:span><text:span text:style-name="T10">()-&gt;</text:span><text:span text:style-name="T14">Email</text:span><text:span text:style-name="T10">}");</text:span></text:p>
      <text:p text:style-name="Code"><text:span text:style-name="T9">return</text:span> <text:span text:style-name="T11">true</text:span><text:span text:style-name="T10">;</text:span></text:p>
      <text:p text:style-name="Code">}</text:p>
      <text:p text:style-name="Code">}</text:p>
      <text:p text:style-name="Code"><text:span text:style-name="T9">if</text:span> <text:span text:style-name="T10">(!$</text:span><text:span text:style-name="T14">user</text:span> <text:span text:style-name="T10">||</text:span> <text:span text:style-name="T10">!$</text:span><text:span text:style-name="T14">permissionCheck</text:span><text:span text:style-name="T10">($</text:span><text:span text:style-name="T14">user</text:span><text:span text:style-name="T10">))</text:span> <text:span text:style-name="T10">{</text:span></text:p>
      <text:p text:style-name="Code"><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Code"><text:span text:style-name="T9">return</text:span> <text:span text:style-name="T11">false</text:span><text:span text:style-name="T10">;</text:span></text:p>
      <text:p text:style-name="Code">}</text:p>
      <text:p text:style-name="Code"><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4">method</text:span><text:span text:style-name="T10">)</text:span> <text:span text:style-name="T10">{</text:span></text:p>
      <text:p text:style-name="Code"><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Code"><text:span text:style-name="T9">return</text:span> <text:span text:style-name="T11">false</text:span><text:span text:style-name="T10">;</text:span></text:p>
      <text:p text:style-name="Code">}</text:p>
      <text:p text:style-name="Code"><text:span text:style-name="T9">return</text:span> <text:span text:style-name="T11">true</text:span><text:span text:style-name="T10">;</text:span></text:p>
      <text:p text:style-name="Code">}</text:p>
      <text:p text:style-name="Code"/>
      <text:p text:style-name="Code">#region Public functions</text:p>
      <text:p text:style-name="Code"><text:span text:style-name="T9">public</text:span> <text:span text:style-name="T14">function</text:span> <text:span text:style-name="T15">render</text:span><text:span text:style-name="T10">(</text:span><text:span text:style-name="T9">string</text:span> <text:span text:style-name="T10">$</text:span><text:span text:style-name="T14">templateLatteName</text:span><text:span text:style-name="T10">,</text:span> <text:span text:style-name="T9">object</text:span><text:span text:style-name="T10">|</text:span><text:span text:style-name="T9">array</text:span> <text:span text:style-name="T10">$</text:span><text:span text:style-name="T14">params</text:span> <text:span text:style-name="T10">=</text:span> <text:span text:style-name="T10">[]):</text:span> <text:span text:style-name="T9">void</text:span></text:p>
      <text:p text:style-name="Code">{</text:p>
      <text:p text:style-name="Code">#error_log("\n\n" . json_encode($templateLatteName, JSON_PRETTY_PRINT) . "\n");</text:p>
      <text:p text:style-name="Code"><text:span text:style-name="T10">$</text:span><text:span text:style-name="T14">content</text:span> <text:span text:style-name="T10">=</text:span> <text:span text:style-name="T10">$</text:span><text:span text:style-name="T11">this</text:span><text:span text:style-name="T10">-&gt;</text:span><text:span text:style-name="T14">latte</text:span><text:span text:style-name="T10">-&gt;</text:span><text:span text:style-name="T15">renderToString</text:span><text:span text:style-name="T10">($</text:span><text:span text:style-name="T14">templateLatteName</text:span><text:span text:style-name="T10">,</text:span> <text:span text:style-name="T10">$</text:span><text:span text:style-name="T14">params</text:span><text:span text:style-name="T10">);</text:span></text:p>
      <text:p text:style-name="Code"><text:span text:style-name="T15">echo</text:span> <text:span text:style-name="T10">$</text:span><text:span text:style-name="T14">content</text:span><text:span text:style-name="T10">;</text:span></text:p>
      <text:p text:style-name="Code"><text:span text:style-name="T9">if</text:span> <text:span text:style-name="T10">(</text:span><text:span text:style-name="T15">ob_get_level</text:span><text:span text:style-name="T10">())</text:span> <text:span text:style-name="T15">ob_end_flush</text:span><text:span text:style-name="T10">();</text:span></text:p>
      <text:p text:style-name="Code"><text:span text:style-name="T15">flush</text:span><text:span text:style-name="T10">();</text:span></text:p>
      <text:p text:style-name="Code"><text:span text:style-name="T12">Flight</text:span><text:span text:style-name="T10">::</text:span><text:span text:style-name="T15">stop</text:span><text:span text:style-name="T10">();</text:span></text:p>
      <text:p text:style-name="Code">}</text:p>
      <text:p text:style-name="Code"/>
      <text:p text:style-name="Code">#region Private functions</text:p>
      <text:p text:style-name="Code"><text:span text:style-name="T9">private</text:span> <text:span text:style-name="T14">function</text:span> <text:span text:style-name="T15">addLatteFilters</text:span><text:span text:style-name="T10">():</text:span> <text:span text:style-name="T9">void</text:span></text:p>
      <text:p text:style-name="Code">{</text:p>
      <text:p text:style-name="Code"><text:soft-page-break/><text:span text:style-name="T10">$</text:span><text:span text:style-name="T11">this</text:span><text:span text:style-name="T10">-&gt;</text:span><text:span text:style-name="T14">latte</text:span><text:span text:style-name="T10">-&gt;</text:span><text:span text:style-name="T15">addFilter</text:span><text:span text:style-name="T10">('</text:span><text:span text:style-name="T16">translate</text:span><text:span text:style-name="T10">',</text:span> <text:span text:style-name="T14">function</text:span> <text:span text:style-name="T10">($</text:span><text:span text:style-name="T14">key</text:span><text:span text:style-name="T10">)</text:span> <text:span text:style-name="T10">{</text:span></text:p>
      <text:p text:style-name="Code"><text:span text:style-name="T9">return</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4">key</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shortDate</text:span><text:span text:style-name="T10">',</text:span> <text:span text:style-name="T14">function</text:span> <text:span text:style-name="T10">($</text:span><text:span text:style-name="T14">date</text:span><text:span text:style-name="T10">)</text:span> <text:span text:style-name="T10">{</text:span></text:p>
      <text:p text:style-name="Code"><text:span text:style-name="T9">return</text:span> <text:span text:style-name="T12">TranslationManager</text:span><text:span text:style-name="T10">::</text:span><text:span text:style-name="T15">getShortDate</text:span><text:span text:style-name="T10">($</text:span><text:span text:style-name="T14">date</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longDate</text:span><text:span text:style-name="T10">',</text:span> <text:span text:style-name="T14">function</text:span> <text:span text:style-name="T10">($</text:span><text:span text:style-name="T14">date</text:span><text:span text:style-name="T10">)</text:span> <text:span text:style-name="T10">{</text:span></text:p>
      <text:p text:style-name="Code"><text:span text:style-name="T9">return</text:span> <text:span text:style-name="T12">TranslationManager</text:span><text:span text:style-name="T10">::</text:span><text:span text:style-name="T15">getLongDate</text:span><text:span text:style-name="T10">($</text:span><text:span text:style-name="T14">date</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longDateTime</text:span><text:span text:style-name="T10">',</text:span> <text:span text:style-name="T14">function</text:span> <text:span text:style-name="T10">($</text:span><text:span text:style-name="T14">date</text:span><text:span text:style-name="T10">)</text:span> <text:span text:style-name="T10">{</text:span></text:p>
      <text:p text:style-name="Code"><text:span text:style-name="T9">return</text:span> <text:span text:style-name="T12">TranslationManager</text:span><text:span text:style-name="T10">::</text:span><text:span text:style-name="T15">getLongDateTime</text:span><text:span text:style-name="T10">($</text:span><text:span text:style-name="T14">date</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shortDateTime</text:span><text:span text:style-name="T10">',</text:span> <text:span text:style-name="T14">function</text:span> <text:span text:style-name="T10">($</text:span><text:span text:style-name="T14">date</text:span><text:span text:style-name="T10">)</text:span> <text:span text:style-name="T10">{</text:span></text:p>
      <text:p text:style-name="Code"><text:span text:style-name="T9">return</text:span> <text:span text:style-name="T12">TranslationManager</text:span><text:span text:style-name="T10">::</text:span><text:span text:style-name="T15">getShortDateTime</text:span><text:span text:style-name="T10">($</text:span><text:span text:style-name="T14">date</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dayName</text:span><text:span text:style-name="T10">',</text:span> <text:span text:style-name="T14">function</text:span> <text:span text:style-name="T10">($</text:span><text:span text:style-name="T14">date</text:span><text:span text:style-name="T10">)</text:span> <text:span text:style-name="T10">{</text:span></text:p>
      <text:p text:style-name="Code"><text:span text:style-name="T9">return</text:span> <text:span text:style-name="T12">TranslationManager</text:span><text:span text:style-name="T10">::</text:span><text:span text:style-name="T15">getDayName</text:span><text:span text:style-name="T10">($</text:span><text:span text:style-name="T14">date</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formatFileSize</text:span><text:span text:style-name="T10">',</text:span> <text:span text:style-name="T14">function</text:span> <text:span text:style-name="T10">($</text:span><text:span text:style-name="T14">bytes</text:span><text:span text:style-name="T10">)</text:span> <text:span text:style-name="T10">{</text:span></text:p>
      <text:p text:style-name="Code"><text:span text:style-name="T9">if</text:span> <text:span text:style-name="T10">($</text:span><text:span text:style-name="T14">bytes</text:span> <text:span text:style-name="T10">&gt;=</text:span> <text:span text:style-name="T11">1073741824</text:span><text:span text:style-name="T10">)</text:span> <text:span text:style-name="T9">return</text:span> <text:span text:style-name="T15">number_format</text:span><text:span text:style-name="T10">($</text:span><text:span text:style-name="T14">bytes</text:span> <text:span text:style-name="T10">/</text:span> <text:span text:style-name="T11">1073741824</text:span><text:span text:style-name="T10">,</text:span> <text:span text:style-name="T11">2</text:span><text:span text:style-name="T10">)</text:span> <text:span text:style-name="T10">.</text:span> <text:span text:style-name="T10">'</text:span><text:span text:style-name="T16"> GB</text:span><text:span text:style-name="T10">';</text:span></text:p>
      <text:p text:style-name="Code"><text:span text:style-name="T9">elseif</text:span> <text:span text:style-name="T10">($</text:span><text:span text:style-name="T14">bytes</text:span> <text:span text:style-name="T10">&gt;=</text:span> <text:span text:style-name="T11">1048576</text:span><text:span text:style-name="T10">)</text:span> <text:span text:style-name="T9">return</text:span> <text:span text:style-name="T15">number_format</text:span><text:span text:style-name="T10">($</text:span><text:span text:style-name="T14">bytes</text:span> <text:span text:style-name="T10">/</text:span> <text:span text:style-name="T11">1048576</text:span><text:span text:style-name="T10">,</text:span> <text:span text:style-name="T11">2</text:span><text:span text:style-name="T10">)</text:span> <text:span text:style-name="T10">.</text:span> <text:span text:style-name="T10">'</text:span><text:span text:style-name="T16"> MB</text:span><text:span text:style-name="T10">';</text:span></text:p>
      <text:p text:style-name="Code"><text:span text:style-name="T9">elseif</text:span> <text:span text:style-name="T10">($</text:span><text:span text:style-name="T14">bytes</text:span> <text:span text:style-name="T10">&gt;=</text:span> <text:span text:style-name="T11">1024</text:span><text:span text:style-name="T10">)</text:span> <text:span text:style-name="T9">return</text:span> <text:span text:style-name="T15">number_format</text:span><text:span text:style-name="T10">($</text:span><text:span text:style-name="T14">bytes</text:span> <text:span text:style-name="T10">/</text:span> <text:span text:style-name="T11">1024</text:span><text:span text:style-name="T10">,</text:span> <text:span text:style-name="T11">2</text:span><text:span text:style-name="T10">)</text:span> <text:span text:style-name="T10">.</text:span> <text:span text:style-name="T10">'</text:span><text:span text:style-name="T16"> KB</text:span><text:span text:style-name="T10">';</text:span></text:p>
      <text:p text:style-name="Code"><text:span text:style-name="T9">else</text:span> <text:span text:style-name="T9">return</text:span> <text:span text:style-name="T10">$</text:span><text:span text:style-name="T14">bytes</text:span> <text:span text:style-name="T10">.</text:span> <text:span text:style-name="T10">'</text:span><text:span text:style-name="T16"> bytes</text:span><text:span text:style-name="T10">';</text:span></text:p>
      <text:p text:style-name="Code">});</text:p>
      <text:p text:style-name="Code"/>
      <text:p text:style-name="Code"><text:span text:style-name="T10">$</text:span><text:span text:style-name="T11">this</text:span><text:span text:style-name="T10">-&gt;</text:span><text:span text:style-name="T14">latte</text:span><text:span text:style-name="T10">-&gt;</text:span><text:span text:style-name="T15">addFilter</text:span><text:span text:style-name="T10">('</text:span><text:span text:style-name="T16">readableDuration</text:span><text:span text:style-name="T10">',</text:span> <text:span text:style-name="T14">function</text:span> <text:span text:style-name="T10">($</text:span><text:span text:style-name="T14">duration</text:span><text:span text:style-name="T10">)</text:span> <text:span text:style-name="T10">{</text:span></text:p>
      <text:p text:style-name="Code"><text:span text:style-name="T9">return</text:span> <text:span text:style-name="T12">TranslationManager</text:span><text:span text:style-name="T10">::</text:span><text:span text:style-name="T15">getReadableDuration</text:span><text:span text:style-name="T10">($</text:span><text:span text:style-name="T14">duration</text:span><text:span text:style-name="T10">);</text:span></text:p>
      <text:p text:style-name="Code">});</text:p>
      <text:p text:style-name="Code">}</text:p>
      <text:p text:style-name="Code">}</text:p>
      <text:h text:style-name="Heading_20_2" text:outline-level="2"><text:span text:style-name="T25">Les </text:span>API<text:span text:style-name="T25">s</text:span></text:h>
      <text:h text:style-name="Heading_20_3" text:outline-level="3">Déclaration</text:h>
      <text:p text:style-name="P11">&lt;?php</text:p>
      <text:p text:style-name="P11"><text:span text:style-name="T9">declare</text:span><text:span text:style-name="T10">(</text:span><text:span text:style-name="T11">strict_types</text:span><text:span text:style-name="T10">=</text:span><text:span text:style-name="T11">1</text:span><text:span text:style-name="T10">);</text:span></text:p>
      <text:p text:style-name="P11"><text:span text:style-name="T9">namespace</text:span> <text:span text:style-name="T12">app</text:span><text:span text:style-name="T13">\</text:span><text:span text:style-name="T12">config</text:span><text:span text:style-name="T13">\</text:span><text:span text:style-name="T12">routes</text:span><text:span text:style-name="T10">;</text:span></text:p>
      <text:p text:style-name="P11"/>
      <text:p text:style-name="P11"><text:span text:style-name="T9">use</text:span> app<text:span text:style-name="T10">\</text:span>config<text:span text:style-name="T10">\</text:span><text:span text:style-name="T12">ApiFactory</text:span><text:span text:style-name="T10">;</text:span></text:p>
      <text:p text:style-name="P11"><text:span text:style-name="T9">use</text:span> app<text:span text:style-name="T10">\</text:span>interfaces<text:span text:style-name="T10">\</text:span><text:span text:style-name="T12">RouteInterface</text:span><text:span text:style-name="T10">;</text:span></text:p>
      <text:p text:style-name="P11"><text:span text:style-name="T9">use</text:span> app<text:span text:style-name="T10">\</text:span>valueObjects<text:span text:style-name="T10">\</text:span><text:span text:style-name="T12">Route</text:span><text:span text:style-name="T10">;</text:span></text:p>
      <text:p text:style-name="P11"/>
      <text:p text:style-name="P11"><text:span text:style-name="T14">class</text:span> <text:span text:style-name="T12">LoanApi</text:span> <text:span text:style-name="T9">implements</text:span> <text:span text:style-name="T12">RouteInterface</text:span></text:p>
      <text:p text:style-name="P11">{</text:p>
      <text:p text:style-name="P11"><text:span text:style-name="T9"><text:tab/>private</text:span> <text:span text:style-name="T9">array</text:span> <text:span text:style-name="T10">$</text:span><text:span text:style-name="T14">routes</text:span> <text:span text:style-name="T10">=</text:span> <text:span text:style-name="T10">[];</text:span></text:p>
      <text:p text:style-name="P11"/>
      <text:p text:style-name="P11"><text:span text:style-name="T9"><text:tab/>public</text:span> <text:span text:style-name="T14">function</text:span> <text:span text:style-name="T15">__construct</text:span><text:span text:style-name="T10">(</text:span><text:span text:style-name="T9">private</text:span> <text:span text:style-name="T12">ApiFactory</text:span> <text:span text:style-name="T10">$</text:span><text:span text:style-name="T14">apiFactory</text:span><text:span text:style-name="T10">)</text:span> <text:span text:style-name="T10">{}</text:span></text:p>
      <text:p text:style-name="P11"/>
      <text:p text:style-name="P11"><text:span text:style-name="T9"><text:tab/>public</text:span> <text:span text:style-name="T14">function</text:span> <text:span text:style-name="T15">get</text:span><text:span text:style-name="T10">():</text:span> <text:span text:style-name="T9">array</text:span></text:p>
      <text:p text:style-name="P11"><text:tab/>{</text:p>
      <text:p text:style-name="P11"><text:soft-page-break/><text:span text:style-name="T10"><text:tab/><text:tab/>$</text:span><text:span text:style-name="T14">loanApi</text:span> <text:span text:style-name="T10">=</text:span> <text:span text:style-name="T14">fn</text:span><text:span text:style-name="T10">()</text:span> <text:span text:style-name="T10">=&gt;</text:span> <text:span text:style-name="T10">$</text:span><text:span text:style-name="T11">this</text:span><text:span text:style-name="T10">-&gt;</text:span><text:span text:style-name="T14">apiFactory</text:span><text:span text:style-name="T10">-&gt;</text:span><text:span text:style-name="T15">makeLoanApi</text:span><text:span text:style-name="T10">();</text:span></text:p>
      <text:p text:style-name="P11"/>
      <text:p text:style-name="P11"><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api/loan/calendar</text:span><text:span text:style-name="T10">',</text:span> <text:span text:style-name="T10">$</text:span><text:span text:style-name="T14">loanApi</text:span><text:span text:style-name="T10">,</text:span> <text:span text:style-name="T10">'</text:span><text:span text:style-name="T16">getCalendarEvents</text:span><text:span text:style-name="T10">');</text:span></text:p>
      <text:p text:style-name="P11"><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api/loan/availability/@itemId:[0-9]+</text:span><text:span text:style-name="T10">',</text:span> <text:span text:style-name="T10">$</text:span><text:span text:style-name="T14">loanApi</text:span><text:span text:style-name="T10">,</text:span> <text:span text:style-name="T10">'</text:span><text:span text:style-name="T16">getAvailability</text:span><text:span text:style-name="T10">');</text:span></text:p>
      <text:p text:style-name="P11"/>
      <text:p text:style-name="P11"><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api/loan/items</text:span><text:span text:style-name="T10">',</text:span> <text:span text:style-name="T10">$</text:span><text:span text:style-name="T14">loanApi</text:span><text:span text:style-name="T10">,</text:span> <text:span text:style-name="T10">'</text:span><text:span text:style-name="T16">getItems</text:span><text:span text:style-name="T10">');</text:span></text:p>
      <text:p text:style-name="P11"><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api/loan/item/@id:[0-9]+</text:span><text:span text:style-name="T10">',</text:span> <text:span text:style-name="T10">$</text:span><text:span text:style-name="T14">loanApi</text:span><text:span text:style-name="T10">,</text:span> <text:span text:style-name="T10">'</text:span><text:span text:style-name="T16">getItem</text:span><text:span text:style-name="T10">');</text:span></text:p>
      <text:p text:style-name="P11"><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api/loan/item/save</text:span><text:span text:style-name="T10">',</text:span> <text:span text:style-name="T10">$</text:span><text:span text:style-name="T14">loanApi</text:span><text:span text:style-name="T10">,</text:span> <text:span text:style-name="T10">'</text:span><text:span text:style-name="T16">saveItem</text:span><text:span text:style-name="T10">');</text:span></text:p>
      <text:p text:style-name="P11"><text:span text:style-name="T10"><text:tab/><text:tab/>$</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api/loan/item/delete/@id:[0-9]+</text:span><text:span text:style-name="T10">',</text:span> <text:span text:style-name="T10">$</text:span><text:span text:style-name="T14">loanApi</text:span><text:span text:style-name="T10">,</text:span> <text:span text:style-name="T10">'</text:span><text:span text:style-name="T16">deleteItem</text:span><text:span text:style-name="T10">');</text:span></text:p>
      <text:p text:style-name="P11"><text:span text:style-name="T10"/></text:p>
      <text:p text:style-name="P11"><text:span text:style-name="T9"><text:tab/><text:tab/>return</text:span> <text:span text:style-name="T10">$</text:span><text:span text:style-name="T11">this</text:span><text:span text:style-name="T10">-&gt;</text:span><text:span text:style-name="T14">routes</text:span><text:span text:style-name="T10">;</text:span></text:p>
      <text:p text:style-name="P11"><text:tab/>}</text:p>
      <text:p text:style-name="P11">}</text:p>
      <text:h text:style-name="Heading_20_3" text:outline-level="3">Définition d’une API</text:h>
      <text:p text:style-name="Code">&lt;?php</text:p>
      <text:p text:style-name="Code"/>
      <text:p text:style-name="Code"><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apis</text:span><text:span text:style-name="T10">;</text:span></text:p>
      <text:p text:style-name="Code"/>
      <text:p text:style-name="Code"><text:span text:style-name="T9">use</text:span> app<text:span text:style-name="T10">\</text:span>helpers<text:span text:style-name="T10">\</text:span><text:span text:style-name="T12">Application</text:span><text:span text:style-name="T10">;</text:span></text:p>
      <text:p text:style-name="Code"><text:span text:style-name="T9">use</text:span> app<text:span text:style-name="T10">\</text:span>helpers<text:span text:style-name="T10">\</text:span><text:span text:style-name="T12">ConnectedUser</text:span><text:span text:style-name="T10">;</text:span></text:p>
      <text:p text:style-name="Code"><text:span text:style-name="T9">use</text:span> app<text:span text:style-name="T10">\</text:span>models<text:span text:style-name="T10">\</text:span><text:span text:style-name="T12">DataHelper</text:span><text:span text:style-name="T10">;</text:span></text:p>
      <text:p text:style-name="Code"><text:span text:style-name="T9">use</text:span> app<text:span text:style-name="T10">\</text:span>models<text:span text:style-name="T10">\</text:span><text:span text:style-name="T12">LoanDataHelper</text:span><text:span text:style-name="T10">;</text:span></text:p>
      <text:p text:style-name="Code"><text:span text:style-name="T9">use</text:span> app<text:span text:style-name="T10">\</text:span>models<text:span text:style-name="T10">\</text:span><text:span text:style-name="T12">PersonDataHelper</text:span><text:span text:style-name="T10">;</text:span></text:p>
      <text:p text:style-name="Code"/>
      <text:p text:style-name="Code"><text:span text:style-name="T14">class</text:span> <text:span text:style-name="T12">LoanApi</text:span> <text:span text:style-name="T9">extends</text:span> <text:span text:style-name="T12">AbstractApi</text:span></text:p>
      <text:p text:style-name="Code">{</text:p>
      <text:p text:style-name="Code"><text:span text:style-name="T9">public</text:span> <text:span text:style-name="T14">function</text:span> <text:span text:style-name="T15">__construct</text:span><text:span text:style-name="T10">(</text:span></text:p>
      <text:p text:style-name="Code"><text:span text:style-name="T12">Application</text:span> <text:span text:style-name="T10">$</text:span><text:span text:style-name="T14">application</text:span><text:span text:style-name="T10">,</text:span></text:p>
      <text:p text:style-name="Code"><text:span text:style-name="T12">ConnectedUser</text:span> <text:span text:style-name="T10">$</text:span><text:span text:style-name="T14">connectedUser</text:span><text:span text:style-name="T10">,</text:span></text:p>
      <text:p text:style-name="Code"><text:span text:style-name="T12">DataHelper</text:span> <text:span text:style-name="T10">$</text:span><text:span text:style-name="T14">dataHelper</text:span><text:span text:style-name="T10">,</text:span></text:p>
      <text:p text:style-name="Code"><text:span text:style-name="T12">PersonDataHelper</text:span> <text:span text:style-name="T10">$</text:span><text:span text:style-name="T14">personDataHelper</text:span><text:span text:style-name="T10">,</text:span></text:p>
      <text:p text:style-name="Code"><text:span text:style-name="T9">private</text:span> <text:span text:style-name="T12">LoanDataHelper</text:span> <text:span text:style-name="T10">$</text:span><text:span text:style-name="T14">loanDataHelper</text:span><text:span text:style-name="T10">,</text:span></text:p>
      <text:p text:style-name="Code"><text:span text:style-name="T10">)</text:span> <text:span text:style-name="T10">{</text:span></text:p>
      <text:p text:style-name="Code"><text:span text:style-name="T14">parent</text:span><text:span text:style-name="T10">::</text:span><text:span text:style-name="T15">__construct</text:span><text:span text:style-name="T10">($</text:span><text:span text:style-name="T14">application</text:span><text:span text:style-name="T10">,</text:span> <text:span text:style-name="T10">$</text:span><text:span text:style-name="T14">connectedUser</text:span><text:span text:style-name="T10">,</text:span> <text:span text:style-name="T10">$</text:span><text:span text:style-name="T14">dataHelper</text:span><text:span text:style-name="T10">,</text:span> <text:span text:style-name="T10">$</text:span><text:span text:style-name="T14">personDataHelper</text:span><text:span text:style-name="T10">);</text:span></text:p>
      <text:p text:style-name="Code">}</text:p>
      <text:p text:style-name="Code"/>
      <text:p text:style-name="Code">#region LoanDesigner functions</text:p>
      <text:p text:style-name="Code"><text:span text:style-name="T9">public</text:span> <text:span text:style-name="T14">function</text:span> <text:span text:style-name="T15">getItems</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text:span text:style-name="T10">$</text:span><text:span text:style-name="T11">this</text:span><text:span text:style-name="T10">-&gt;</text:span><text:span text:style-name="T15">renderJsonOk</text:span><text:span text:style-name="T10">($</text:span><text:span text:style-name="T11">this</text:span><text:span text:style-name="T10">-&gt;</text:span><text:span text:style-name="T14">loanDataHelper</text:span><text:span text:style-name="T10">-&gt;</text:span><text:span text:style-name="T15">getAllItems</text:span><text:span text:style-name="T10">());</text:span></text:p>
      <text:p text:style-name="Code">}</text:p>
      <text:p text:style-name="Code">}</text:p>
      <text:p text:style-name="Code"/>
      <text:p text:style-name="Code"><text:span text:style-name="T9">public</text:span> <text:span text:style-name="T14">function</text:span> <text:span text:style-name="T15">getItem</text:span><text:span text:style-name="T10">(</text:span><text:span text:style-name="T9">int</text:span> <text:span text:style-name="T10">$</text:span><text:span text:style-name="T14">id</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text:span text:style-name="T10">$</text:span><text:span text:style-name="T14">item</text:span> <text:span text:style-name="T10">=</text:span> <text:span text:style-name="T10">$</text:span><text:span text:style-name="T11">this</text:span><text:span text:style-name="T10">-&gt;</text:span><text:span text:style-name="T14">loanDataHelper</text:span><text:span text:style-name="T10">-&gt;</text:span><text:span text:style-name="T15">getItem</text:span><text:span text:style-name="T10">($</text:span><text:span text:style-name="T14">id</text:span><text:span text:style-name="T10">);</text:span></text:p>
      <text:p text:style-name="Code"><text:span text:style-name="T9">if</text:span> <text:span text:style-name="T10">(!$</text:span><text:span text:style-name="T14">item</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Item </text:span><text:span text:style-name="T10">{$</text:span><text:span text:style-name="T14">id</text:span><text:span text:style-name="T10">}</text:span><text:span text:style-name="T16"> not found</text:span><text:span text:style-name="T10">",</text:span> <text:span text:style-name="T11">__FILE__</text:span><text:span text:style-name="T10">,</text:span> <text:span text:style-name="T11">__LINE__</text:span><text:span text:style-name="T10">);</text:span></text:p>
      <text:p text:style-name="Code"><text:soft-page-break/><text:span text:style-name="T9">return</text:span><text:span text:style-name="T10">;</text:span></text:p>
      <text:p text:style-name="Code">}</text:p>
      <text:p text:style-name="Code"><text:span text:style-name="T10">$</text:span><text:span text:style-name="T11">this</text:span><text:span text:style-name="T10">-&gt;</text:span><text:span text:style-name="T15">renderJsonOk</text:span><text:span text:style-name="T10">($</text:span><text:span text:style-name="T14">item</text:span><text:span text:style-name="T10">);</text:span></text:p>
      <text:p text:style-name="Code">}</text:p>
      <text:p text:style-name="Code">}</text:p>
      <text:p text:style-name="Code"/>
      <text:p text:style-name="Code"><text:span text:style-name="T9">public</text:span> <text:span text:style-name="T14">function</text:span> <text:span text:style-name="T15">saveItem</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text:span text:style-name="T10">$</text:span><text:span text:style-name="T14">data</text:span> <text:span text:style-name="T10">=</text:span> <text:span text:style-name="T10">$</text:span><text:span text:style-name="T11">this</text:span><text:span text:style-name="T10">-&gt;</text:span><text:span text:style-name="T15">getJsonInput</text:span><text:span text:style-name="T10">();</text:span></text:p>
      <text:p text:style-name="Code"><text:span text:style-name="T10">$</text:span><text:span text:style-name="T14">name</text:span> <text:span text:style-name="T10">=</text:span> <text:span text:style-name="T15">trim</text:span><text:span text:style-name="T10">($</text:span><text:span text:style-name="T14">data</text:span><text:span text:style-name="T10">['</text:span><text:span text:style-name="T16">name</text:span><text:span text:style-name="T10">']</text:span> <text:span text:style-name="T10">??</text:span> <text:span text:style-name="T10">'');</text:span></text:p>
      <text:p text:style-name="Code"><text:span text:style-name="T9">if</text:span> <text:span text:style-name="T10">($</text:span><text:span text:style-name="T14">name</text:span> <text:span text:style-name="T10">===</text:span> <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Name is required</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
      <text:p text:style-name="Code"><text:span text:style-name="T10">$</text:span><text:span text:style-name="T14">id</text:span> <text:span text:style-name="T10">=</text:span> <text:span text:style-name="T10">$</text:span><text:span text:style-name="T11">this</text:span><text:span text:style-name="T10">-&gt;</text:span><text:span text:style-name="T14">loanDataHelper</text:span><text:span text:style-name="T10">-&gt;</text:span><text:span text:style-name="T15">saveItem</text:span><text:span text:style-name="T10">($</text:span><text:span text:style-name="T14">data</text:span><text:span text:style-name="T10">);</text:span></text:p>
      <text:p text:style-name="Code"><text:span text:style-name="T10">$</text:span><text:span text:style-name="T11">this</text:span><text:span text:style-name="T10">-&gt;</text:span><text:span text:style-name="T15">renderJsonOk</text:span><text:span text:style-name="T10">(['</text:span><text:span text:style-name="T16">id</text:span><text:span text:style-name="T10">'</text:span> <text:span text:style-name="T10">=&gt;</text:span> <text:span text:style-name="T10">$</text:span><text:span text:style-name="T14">id</text:span><text:span text:style-name="T10">]);</text:span></text:p>
      <text:p text:style-name="Code">}</text:p>
      <text:p text:style-name="Code">}</text:p>
      <text:p text:style-name="Code"/>
      <text:p text:style-name="Code"><text:span text:style-name="T9">public</text:span> <text:span text:style-name="T14">function</text:span> <text:span text:style-name="T15">deleteItem</text:span><text:span text:style-name="T10">(</text:span><text:span text:style-name="T9">int</text:span> <text:span text:style-name="T10">$</text:span><text:span text:style-name="T14">id</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
      <text:p text:style-name="Code"><text:span text:style-name="T10">$</text:span><text:span text:style-name="T14">deleted</text:span> <text:span text:style-name="T10">=</text:span> <text:span text:style-name="T10">$</text:span><text:span text:style-name="T11">this</text:span><text:span text:style-name="T10">-&gt;</text:span><text:span text:style-name="T14">loanDataHelper</text:span><text:span text:style-name="T10">-&gt;</text:span><text:span text:style-name="T15">deleteItem</text:span><text:span text:style-name="T10">($</text:span><text:span text:style-name="T14">id</text:span><text:span text:style-name="T10">);</text:span></text:p>
      <text:p text:style-name="Code"><text:span text:style-name="T9">if</text:span> <text:span text:style-name="T10">(!$</text:span><text:span text:style-name="T14">deleted</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Cannot delete: active loans or reservations exist for this item.</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text:span text:style-name="T10">$</text:span><text:span text:style-name="T11">this</text:span><text:span text:style-name="T10">-&gt;</text:span><text:span text:style-name="T15">renderJsonOk</text:span><text:span text:style-name="T10">([]);</text:span></text:p>
      <text:p text:style-name="Code">}</text:p>
      <text:p text:style-name="Code">}</text:p>
      <text:p text:style-name="Code"/>
      <text:p text:style-name="Code">#region LoanManager functions</text:p>
      <text:p text:style-name="Code"><text:span text:style-name="T9">public</text:span> <text:span text:style-name="T14">function</text:span> <text:span text:style-name="T15">getLoans</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
      <text:p text:style-name="Code"><text:span text:style-name="T10">$</text:span><text:span text:style-name="T11">this</text:span><text:span text:style-name="T10">-&gt;</text:span><text:span text:style-name="T14">loanDataHelper</text:span><text:span text:style-name="T10">-&gt;</text:span><text:span text:style-name="T15">updateOverdueLoans</text:span><text:span text:style-name="T10">();</text:span></text:p>
      <text:p text:style-name="Code"><text:span text:style-name="T10">$</text:span><text:span text:style-name="T14">status</text:span> <text:span text:style-name="T10">=</text:span> <text:span text:style-name="T10">$</text:span><text:span text:style-name="T14">_GET</text:span><text:span text:style-name="T10">['</text:span><text:span text:style-name="T16">status</text:span><text:span text:style-name="T10">']</text:span> <text:span text:style-name="T10">??</text:span> <text:span text:style-name="T10">'';</text:span></text:p>
      <text:p text:style-name="Code"><text:span text:style-name="T10">$</text:span><text:span text:style-name="T11">this</text:span><text:span text:style-name="T10">-&gt;</text:span><text:span text:style-name="T15">renderJsonOk</text:span><text:span text:style-name="T10">($</text:span><text:span text:style-name="T11">this</text:span><text:span text:style-name="T10">-&gt;</text:span><text:span text:style-name="T14">loanDataHelper</text:span><text:span text:style-name="T10">-&gt;</text:span><text:span text:style-name="T15">getAllLoans</text:span><text:span text:style-name="T10">($</text:span><text:span text:style-name="T14">status</text:span><text:span text:style-name="T10">));</text:span></text:p>
      <text:p text:style-name="Code">}</text:p>
      <text:p text:style-name="Code">}</text:p>
      <text:p text:style-name="Code"/>
      <text:p text:style-name="Code"><text:span text:style-name="T9">public</text:span> <text:span text:style-name="T14">function</text:span> <text:span text:style-name="T15">getLoan</text:span><text:span text:style-name="T10">(</text:span><text:span text:style-name="T9">int</text:span> <text:span text:style-name="T10">$</text:span><text:span text:style-name="T14">id</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Designer</text:span><text:span text:style-name="T10">()))</text:span> <text:span text:style-name="T10">{</text:span></text:p>
      <text:p text:style-name="Code"/>
      <text:p text:style-name="Code"><text:span text:style-name="T10">$</text:span><text:span text:style-name="T14">loan</text:span> <text:span text:style-name="T10">=</text:span> <text:span text:style-name="T10">$</text:span><text:span text:style-name="T11">this</text:span><text:span text:style-name="T10">-&gt;</text:span><text:span text:style-name="T14">loanDataHelper</text:span><text:span text:style-name="T10">-&gt;</text:span><text:span text:style-name="T15">getLoan</text:span><text:span text:style-name="T10">($</text:span><text:span text:style-name="T14">id</text:span><text:span text:style-name="T10">);</text:span></text:p>
      <text:p text:style-name="Code"><text:span text:style-name="T9">if</text:span> <text:span text:style-name="T10">(!$</text:span><text:span text:style-name="T14">loan</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Loan </text:span><text:span text:style-name="T10">{$</text:span><text:span text:style-name="T14">id</text:span><text:span text:style-name="T10">}</text:span><text:span text:style-name="T16"> not found</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text:span text:style-name="T10">$</text:span><text:span text:style-name="T11">this</text:span><text:span text:style-name="T10">-&gt;</text:span><text:span text:style-name="T15">renderJsonOk</text:span><text:span text:style-name="T10">($</text:span><text:span text:style-name="T14">loan</text:span><text:span text:style-name="T10">);</text:span></text:p>
      <text:p text:style-name="Code">}</text:p>
      <text:p text:style-name="Code"><text:soft-page-break/>}</text:p>
      <text:p text:style-name="Code"/>
      <text:p text:style-name="Code"><text:span text:style-name="T9">public</text:span> <text:span text:style-name="T14">function</text:span> <text:span text:style-name="T15">saveLoan</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Manager</text:span><text:span text:style-name="T10">()))</text:span> <text:span text:style-name="T10">{</text:span></text:p>
      <text:p text:style-name="Code"><text:span text:style-name="T10">$</text:span><text:span text:style-name="T14">data</text:span> <text:span text:style-name="T10">=</text:span> <text:span text:style-name="T10">$</text:span><text:span text:style-name="T11">this</text:span><text:span text:style-name="T10">-&gt;</text:span><text:span text:style-name="T15">getJsonInput</text:span><text:span text:style-name="T10">();</text:span></text:p>
      <text:p text:style-name="Code"><text:span text:style-name="T9">foreach</text:span> <text:span text:style-name="T10">(['</text:span><text:span text:style-name="T16">itemId</text:span><text:span text:style-name="T10">',</text:span> <text:span text:style-name="T10">'</text:span><text:span text:style-name="T16">borrowerId</text:span><text:span text:style-name="T10">',</text:span> <text:span text:style-name="T10">'</text:span><text:span text:style-name="T16">lenderId</text:span><text:span text:style-name="T10">',</text:span> <text:span text:style-name="T10">'</text:span><text:span text:style-name="T16">loanDate</text:span><text:span text:style-name="T10">',</text:span> <text:span text:style-name="T10">'</text:span><text:span text:style-name="T16">dueDate</text:span><text:span text:style-name="T10">',</text:span> <text:span text:style-name="T10">'</text:span><text:span text:style-name="T16">quantity</text:span><text:span text:style-name="T10">']</text:span> <text:span text:style-name="T10">as</text:span> <text:span text:style-name="T10">$</text:span><text:span text:style-name="T14">field</text:span><text:span text:style-name="T10">)</text:span> <text:span text:style-name="T10">{</text:span></text:p>
      <text:p text:style-name="Code"><text:span text:style-name="T9">if</text:span> <text:span text:style-name="T10">(</text:span><text:span text:style-name="T15">empty</text:span><text:span text:style-name="T10">($</text:span><text:span text:style-name="T14">data</text:span><text:span text:style-name="T10">[$</text:span><text:span text:style-name="T14">field</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Field '</text:span><text:span text:style-name="T10">{$</text:span><text:span text:style-name="T14">field</text:span><text:span text:style-name="T10">}</text:span><text:span text:style-name="T16">' is required</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text:p>
      <text:p text:style-name="Code"><text:span text:style-name="T10">$</text:span><text:span text:style-name="T14">available</text:span> <text:span text:style-name="T10">=</text:span> <text:span text:style-name="T10">$</text:span><text:span text:style-name="T11">this</text:span><text:span text:style-name="T10">-&gt;</text:span><text:span text:style-name="T14">loanDataHelper</text:span><text:span text:style-name="T10">-&gt;</text:span><text:span text:style-name="T15">getAvailableQtyForLoan</text:span><text:span text:style-name="T10">(</text:span></text:p>
      <text:p text:style-name="Code"><text:span text:style-name="T10">(</text:span><text:span text:style-name="T14">int</text:span><text:span text:style-name="T10">)$</text:span><text:span text:style-name="T14">data</text:span><text:span text:style-name="T10">['</text:span><text:span text:style-name="T16">itemId</text:span><text:span text:style-name="T10">'],</text:span></text:p>
      <text:p text:style-name="Code"><text:span text:style-name="T10">$</text:span><text:span text:style-name="T14">data</text:span><text:span text:style-name="T10">['</text:span><text:span text:style-name="T16">loanDate</text:span><text:span text:style-name="T10">'],</text:span></text:p>
      <text:p text:style-name="Code"><text:span text:style-name="T10">$</text:span><text:span text:style-name="T14">data</text:span><text:span text:style-name="T10">['</text:span><text:span text:style-name="T16">dueDate</text:span><text:span text:style-name="T10">'],</text:span></text:p>
      <text:p text:style-name="Code"><text:span text:style-name="T15">empty</text:span><text:span text:style-name="T10">($</text:span><text:span text:style-name="T14">data</text:span><text:span text:style-name="T10">['</text:span><text:span text:style-name="T16">id</text:span><text:span text:style-name="T10">'])</text:span> <text:span text:style-name="T10">?</text:span> <text:span text:style-name="T11">null</text:span> <text:span text:style-name="T10">:</text:span> <text:span text:style-name="T10">(</text:span><text:span text:style-name="T14">int</text:span><text:span text:style-name="T10">)$</text:span><text:span text:style-name="T14">data</text:span><text:span text:style-name="T10">['</text:span><text:span text:style-name="T16">id</text:span><text:span text:style-name="T10">']</text:span></text:p>
      <text:p text:style-name="Code">);</text:p>
      <text:p text:style-name="Code"><text:span text:style-name="T9">if</text:span> <text:span text:style-name="T10">($</text:span><text:span text:style-name="T14">available</text:span> <text:span text:style-name="T10">&lt;</text:span> <text:span text:style-name="T10">(</text:span><text:span text:style-name="T14">int</text:span><text:span text:style-name="T10">)$</text:span><text:span text:style-name="T14">data</text:span><text:span text:style-name="T10">['</text:span><text:span text:style-name="T16">quantity</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Requested quantity exceeds available stock.</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
      <text:p text:style-name="Code"><text:span text:style-name="T10">$</text:span><text:span text:style-name="T14">id</text:span> <text:span text:style-name="T10">=</text:span> <text:span text:style-name="T10">$</text:span><text:span text:style-name="T11">this</text:span><text:span text:style-name="T10">-&gt;</text:span><text:span text:style-name="T14">loanDataHelper</text:span><text:span text:style-name="T10">-&gt;</text:span><text:span text:style-name="T15">saveLoan</text:span><text:span text:style-name="T10">($</text:span><text:span text:style-name="T14">data</text:span><text:span text:style-name="T10">);</text:span></text:p>
      <text:p text:style-name="Code"><text:span text:style-name="T10">$</text:span><text:span text:style-name="T11">this</text:span><text:span text:style-name="T10">-&gt;</text:span><text:span text:style-name="T15">renderJsonOk</text:span><text:span text:style-name="T10">(['</text:span><text:span text:style-name="T16">id</text:span><text:span text:style-name="T10">'</text:span> <text:span text:style-name="T10">=&gt;</text:span> <text:span text:style-name="T10">$</text:span><text:span text:style-name="T14">id</text:span><text:span text:style-name="T10">]);</text:span></text:p>
      <text:p text:style-name="Code">}</text:p>
      <text:p text:style-name="Code">}</text:p>
      <text:p text:style-name="Code"/>
      <text:p text:style-name="Code"><text:span text:style-name="T9">public</text:span> <text:span text:style-name="T14">function</text:span> <text:span text:style-name="T15">returnLoan</text:span><text:span text:style-name="T10">(</text:span><text:span text:style-name="T9">int</text:span> <text:span text:style-name="T10">$</text:span><text:span text:style-name="T14">id</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Manager</text:span><text:span text:style-name="T10">()))</text:span> <text:span text:style-name="T10">{</text:span></text:p>
      <text:p text:style-name="Code"/>
      <text:p text:style-name="Code"><text:span text:style-name="T10">$</text:span><text:span text:style-name="T14">data</text:span> <text:span text:style-name="T10">=</text:span> <text:span text:style-name="T10">$</text:span><text:span text:style-name="T11">this</text:span><text:span text:style-name="T10">-&gt;</text:span><text:span text:style-name="T15">getJsonInput</text:span><text:span text:style-name="T10">();</text:span></text:p>
      <text:p text:style-name="Code"><text:span text:style-name="T10">$</text:span><text:span text:style-name="T14">returnDate</text:span> <text:span text:style-name="T10">=</text:span> <text:span text:style-name="T10">$</text:span><text:span text:style-name="T14">data</text:span><text:span text:style-name="T10">['</text:span><text:span text:style-name="T16">returnDate</text:span><text:span text:style-name="T10">']</text:span> <text:span text:style-name="T10">??</text:span> <text:span text:style-name="T15">date</text:span><text:span text:style-name="T10">('</text:span><text:span text:style-name="T16">Y-m-d</text:span><text:span text:style-name="T10">');</text:span></text:p>
      <text:p text:style-name="Code"><text:span text:style-name="T10">$</text:span><text:span text:style-name="T14">returnedTo</text:span> <text:span text:style-name="T10">=</text:span> <text:span text:style-name="T10">(</text:span><text:span text:style-name="T14">int</text:span><text:span text:style-name="T10">)($</text:span><text:span text:style-name="T14">data</text:span><text:span text:style-name="T10">['</text:span><text:span text:style-name="T16">returnedToId</text:span><text:span text:style-name="T10">']</text:span> <text:span text:style-name="T10">??</text:span> <text:span text:style-name="T11">0</text:span><text:span text:style-name="T10">);</text:span></text:p>
      <text:p text:style-name="Code"/>
      <text:p text:style-name="Code"><text:span text:style-name="T9">if</text:span> <text:span text:style-name="T10">($</text:span><text:span text:style-name="T14">returnedTo</text:span> <text:span text:style-name="T10">===</text:span> <text:span text:style-name="T11">0</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Invalid returnedToId</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
      <text:p text:style-name="Code"><text:span text:style-name="T10">$</text:span><text:span text:style-name="T14">ok</text:span> <text:span text:style-name="T10">=</text:span> <text:span text:style-name="T10">$</text:span><text:span text:style-name="T11">this</text:span><text:span text:style-name="T10">-&gt;</text:span><text:span text:style-name="T14">loanDataHelper</text:span><text:span text:style-name="T10">-&gt;</text:span><text:span text:style-name="T15">setLoanReturn</text:span><text:span text:style-name="T10">($</text:span><text:span text:style-name="T14">id</text:span><text:span text:style-name="T10">,</text:span> <text:span text:style-name="T10">$</text:span><text:span text:style-name="T14">returnDate</text:span><text:span text:style-name="T10">,</text:span> <text:span text:style-name="T10">$</text:span><text:span text:style-name="T14">returnedTo</text:span><text:span text:style-name="T10">);</text:span></text:p>
      <text:p text:style-name="Code"><text:span text:style-name="T9">if</text:span> <text:span text:style-name="T10">(!$</text:span><text:span text:style-name="T14">ok</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Loan </text:span><text:span text:style-name="T10">{$</text:span><text:span text:style-name="T14">id</text:span><text:span text:style-name="T10">}</text:span><text:span text:style-name="T16"> not found</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text:span text:style-name="T10">$</text:span><text:span text:style-name="T11">this</text:span><text:span text:style-name="T10">-&gt;</text:span><text:span text:style-name="T15">renderJsonOk</text:span><text:span text:style-name="T10">([]);</text:span></text:p>
      <text:p text:style-name="Code">}</text:p>
      <text:p text:style-name="Code">}</text:p>
      <text:p text:style-name="Code"/>
      <text:p text:style-name="Code"><text:span text:style-name="T9">public</text:span> <text:span text:style-name="T14">function</text:span> <text:span text:style-name="T15">cancelLoan</text:span><text:span text:style-name="T10">(</text:span><text:span text:style-name="T9">int</text:span> <text:span text:style-name="T10">$</text:span><text:span text:style-name="T14">id</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LoanManager</text:span><text:span text:style-name="T10">()))</text:span> <text:span text:style-name="T10">{</text:span></text:p>
      <text:p text:style-name="Code"/>
      <text:p text:style-name="Code"><text:span text:style-name="T10">$</text:span><text:span text:style-name="T14">ok</text:span> <text:span text:style-name="T10">=</text:span> <text:span text:style-name="T10">$</text:span><text:span text:style-name="T11">this</text:span><text:span text:style-name="T10">-&gt;</text:span><text:span text:style-name="T14">loanDataHelper</text:span><text:span text:style-name="T10">-&gt;</text:span><text:span text:style-name="T15">cancelLoan</text:span><text:span text:style-name="T10">($</text:span><text:span text:style-name="T14">id</text:span><text:span text:style-name="T10">);</text:span></text:p>
      <text:p text:style-name="Code"><text:soft-page-break/><text:span text:style-name="T9">if</text:span> <text:span text:style-name="T10">(!$</text:span><text:span text:style-name="T14">ok</text:span><text:span text:style-name="T10">)</text:span> <text:span text:style-name="T10">{</text:span></text:p>
      <text:p text:style-name="Code"><text:span text:style-name="T10">$</text:span><text:span text:style-name="T11">this</text:span><text:span text:style-name="T10">-&gt;</text:span><text:span text:style-name="T15">renderJsonBadRequest</text:span><text:span text:style-name="T10">("</text:span><text:span text:style-name="T16">Loan </text:span><text:span text:style-name="T10">{$</text:span><text:span text:style-name="T14">id</text:span><text:span text:style-name="T10">}</text:span><text:span text:style-name="T16"> not found</text:span><text:span text:style-name="T10">",</text:span> <text:span text:style-name="T11">__FILE__</text:span><text:span text:style-name="T10">,</text:span> <text:span text:style-name="T11">__LINE__</text:span><text:span text:style-name="T10">);</text:span></text:p>
      <text:p text:style-name="Code"><text:span text:style-name="T9">return</text:span><text:span text:style-name="T10">;</text:span></text:p>
      <text:p text:style-name="Code">}</text:p>
      <text:p text:style-name="Code"><text:span text:style-name="T10">$</text:span><text:span text:style-name="T11">this</text:span><text:span text:style-name="T10">-&gt;</text:span><text:span text:style-name="T15">renderJsonOk</text:span><text:span text:style-name="T10">([]);</text:span></text:p>
      <text:p text:style-name="Code">}</text:p>
      <text:p text:style-name="Code">}</text:p>
      <text:h text:style-name="P12" text:outline-level="3">Appel d’une API</text:h>
      <text:p text:style-name="Code"><text:span text:style-name="T9">export</text:span> <text:span text:style-name="T9">default</text:span> <text:span text:style-name="T14">class</text:span> <text:span text:style-name="T12">ApiClient</text:span> <text:span text:style-name="T10">{</text:span></text:p>
      <text:p text:style-name="Code"/>
      <text:p text:style-name="Code"><text:span text:style-name="T9">async</text:span> <text:span text:style-name="T15">get</text:span><text:span text:style-name="T10">(</text:span><text:span text:style-name="T14">endpoint</text:span><text:span text:style-name="T10">)</text:span> <text:span text:style-name="T10">{</text:span></text:p>
      <text:p text:style-name="Code"><text:span text:style-name="T9">try</text:span> <text:span text:style-name="T10">{</text:span></text:p>
      <text:p text:style-name="Code"><text:span text:style-name="T14">const</text:span> <text:span text:style-name="T14">response</text:span> <text:span text:style-name="T10">=</text:span> <text:span text:style-name="T9">await</text:span> <text:span text:style-name="T15">fetch</text:span>(<text:span text:style-name="T14">endpoint</text:span>)<text:span text:style-name="T10">;</text:span></text:p>
      <text:p text:style-name="Code"/>
      <text:p text:style-name="Code"><text:span text:style-name="T14">const</text:span> <text:span text:style-name="T14">contentType</text:span> <text:span text:style-name="T10">=</text:span> <text:span text:style-name="T14">response</text:span><text:span text:style-name="T10">.</text:span><text:span text:style-name="T11">headers</text:span><text:span text:style-name="T10">.</text:span><text:span text:style-name="T15">get</text:span>(<text:span text:style-name="T10">"</text:span><text:span text:style-name="T16">content-type</text:span><text:span text:style-name="T10">"</text:span>)<text:span text:style-name="T10">;</text:span></text:p>
      <text:p text:style-name="Code"><text:span text:style-name="T9">if</text:span> (<text:span text:style-name="T10">!</text:span><text:span text:style-name="T14">contentType</text:span> <text:span text:style-name="T10">||</text:span> <text:span text:style-name="T10">!</text:span><text:span text:style-name="T14">contentType</text:span><text:span text:style-name="T10">.</text:span><text:span text:style-name="T15">includes</text:span>(<text:span text:style-name="T10">"</text:span><text:span text:style-name="T16">application/json</text:span><text:span text:style-name="T10">"</text:span>)) <text:span text:style-name="T10">{</text:span></text:p>
      <text:p text:style-name="Code"><text:span text:style-name="T14">const</text:span> <text:span text:style-name="T14">text</text:span> <text:span text:style-name="T10">=</text:span> <text:span text:style-name="T9">await</text:span> <text:span text:style-name="T14">response</text:span><text:span text:style-name="T10">.</text:span><text:span text:style-name="T15">text</text:span>()<text:span text:style-name="T10">;</text:span></text:p>
      <text:p text:style-name="Code"><text:span text:style-name="T14">console</text:span><text:span text:style-name="T10">.</text:span><text:span text:style-name="T15">error</text:span>(<text:span text:style-name="T10">"</text:span><text:span text:style-name="T16">Non-JSON response:</text:span><text:span text:style-name="T10">",</text:span> <text:span text:style-name="T14">text</text:span>)<text:span text:style-name="T10">;</text:span></text:p>
      <text:p text:style-name="Code"><text:span text:style-name="T9">throw</text:span> <text:span text:style-name="T10">new</text:span> <text:span text:style-name="T12">Error</text:span>(<text:span text:style-name="T10">"</text:span><text:span text:style-name="T16">Réponse serveur non JSON</text:span><text:span text:style-name="T10">"</text:span>)<text:span text:style-name="T10">;</text:span></text:p>
      <text:p text:style-name="Code">}</text:p>
      <text:p text:style-name="Code"/>
      <text:p text:style-name="Code"><text:span text:style-name="T9">return</text:span> <text:span text:style-name="T9">await</text:span> <text:span text:style-name="T14">response</text:span><text:span text:style-name="T10">.</text:span><text:span text:style-name="T15">json</text:span>()<text:span text:style-name="T10">;</text:span></text:p>
      <text:p text:style-name="Code"><text:span text:style-name="T10">}</text:span> <text:span text:style-name="T9">catch</text:span> (<text:span text:style-name="T14">err</text:span>) <text:span text:style-name="T10">{</text:span></text:p>
      <text:p text:style-name="Code"><text:span text:style-name="T14">console</text:span><text:span text:style-name="T10">.</text:span><text:span text:style-name="T15">error</text:span>(<text:span text:style-name="T10">"</text:span><text:span text:style-name="T16">GET error:</text:span><text:span text:style-name="T10">",</text:span> <text:span text:style-name="T14">err</text:span>)<text:span text:style-name="T10">;</text:span></text:p>
      <text:p text:style-name="Code"><text:span text:style-name="T9">return</text:span> <text:span text:style-name="T10">{</text:span> <text:span text:style-name="T14">success</text:span><text:span text:style-name="T10">:</text:span> <text:span text:style-name="T11">false</text:span><text:span text:style-name="T10">,</text:span> <text:span text:style-name="T14">error</text:span><text:span text:style-name="T10">:</text:span> <text:span text:style-name="T14">err</text:span><text:span text:style-name="T10">.</text:span><text:span text:style-name="T14">message</text:span> <text:span text:style-name="T10">};</text:span></text:p>
      <text:p text:style-name="Code">}</text:p>
      <text:p text:style-name="Code">}</text:p>
      <text:p text:style-name="Code"/>
      <text:p text:style-name="Code"><text:span text:style-name="T9">async</text:span> <text:span text:style-name="T15">getHtml</text:span><text:span text:style-name="T10">(</text:span><text:span text:style-name="T14">endpoint</text:span><text:span text:style-name="T10">)</text:span> <text:span text:style-name="T10">{</text:span></text:p>
      <text:p text:style-name="Code"><text:span text:style-name="T9">try</text:span> <text:span text:style-name="T10">{</text:span></text:p>
      <text:p text:style-name="Code"><text:span text:style-name="T14">const</text:span> <text:span text:style-name="T14">response</text:span> <text:span text:style-name="T10">=</text:span> <text:span text:style-name="T9">await</text:span> <text:span text:style-name="T15">fetch</text:span>(<text:span text:style-name="T14">endpoint</text:span><text:span text:style-name="T10">,</text:span> <text:span text:style-name="T10">{</text:span></text:p>
      <text:p text:style-name="Code"><text:span text:style-name="T14">headers</text:span><text:span text:style-name="T10">:</text:span> <text:span text:style-name="T10">{</text:span></text:p>
      <text:p text:style-name="Code"><text:span text:style-name="T10">"</text:span><text:span text:style-name="T16">Accept</text:span><text:span text:style-name="T10">":</text:span> <text:span text:style-name="T10">"</text:span><text:span text:style-name="T16">text/html</text:span><text:span text:style-name="T10">"</text:span></text:p>
      <text:p text:style-name="Code">}</text:p>
      <text:p text:style-name="Code"><text:span text:style-name="T10">}</text:span>)<text:span text:style-name="T10">;</text:span></text:p>
      <text:p text:style-name="Code"/>
      <text:p text:style-name="Code"><text:span text:style-name="T9">if</text:span> (<text:span text:style-name="T10">!</text:span><text:span text:style-name="T14">response</text:span><text:span text:style-name="T10">.</text:span><text:span text:style-name="T11">ok</text:span>) <text:span text:style-name="T10">{</text:span></text:p>
      <text:p text:style-name="Code"><text:span text:style-name="T9">throw</text:span> <text:span text:style-name="T10">new</text:span> <text:span text:style-name="T12">Error</text:span>(<text:span text:style-name="T10">`</text:span><text:span text:style-name="T16">HTTP </text:span><text:span text:style-name="T10">${</text:span><text:span text:style-name="T14">response</text:span><text:span text:style-name="T10">.</text:span><text:span text:style-name="T11">status</text:span><text:span text:style-name="T10">}`</text:span>)<text:span text:style-name="T10">;</text:span></text:p>
      <text:p text:style-name="Code">}</text:p>
      <text:p text:style-name="Code"/>
      <text:p text:style-name="Code"><text:span text:style-name="T9">return</text:span> <text:span text:style-name="T9">await</text:span> <text:span text:style-name="T14">response</text:span><text:span text:style-name="T10">.</text:span><text:span text:style-name="T15">text</text:span>()<text:span text:style-name="T10">;</text:span></text:p>
      <text:p text:style-name="Code"/>
      <text:p text:style-name="Code"><text:span text:style-name="T10">}</text:span> <text:span text:style-name="T9">catch</text:span> (<text:span text:style-name="T14">err</text:span>) <text:span text:style-name="T10">{</text:span></text:p>
      <text:p text:style-name="Code"><text:span text:style-name="T14">console</text:span><text:span text:style-name="T10">.</text:span><text:span text:style-name="T15">error</text:span>(<text:span text:style-name="T10">"</text:span><text:span text:style-name="T16">GET HTML error:</text:span><text:span text:style-name="T10">",</text:span> <text:span text:style-name="T14">err</text:span>)<text:span text:style-name="T10">;</text:span></text:p>
      <text:p text:style-name="Code"><text:span text:style-name="T9">throw</text:span> <text:span text:style-name="T14">err</text:span><text:span text:style-name="T10">;</text:span></text:p>
      <text:p text:style-name="Code">}</text:p>
      <text:p text:style-name="Code">}</text:p>
      <text:p text:style-name="Code"/>
      <text:p text:style-name="Code"><text:span text:style-name="T9">async</text:span> <text:span text:style-name="T15">post</text:span><text:span text:style-name="T10">(</text:span><text:span text:style-name="T14">endpoint</text:span><text:span text:style-name="T10">,</text:span> <text:span text:style-name="T14">payload</text:span><text:span text:style-name="T10">)</text:span> <text:span text:style-name="T10">{</text:span></text:p>
      <text:p text:style-name="Code"><text:span text:style-name="T9">try</text:span> <text:span text:style-name="T10">{</text:span></text:p>
      <text:p text:style-name="Code"><text:span text:style-name="T14">const</text:span> <text:span text:style-name="T14">response</text:span> <text:span text:style-name="T10">=</text:span> <text:span text:style-name="T9">await</text:span> <text:span text:style-name="T15">fetch</text:span>(<text:span text:style-name="T14">endpoint</text:span><text:span text:style-name="T10">,</text:span> <text:span text:style-name="T10">{</text:span></text:p>
      <text:p text:style-name="Code"><text:span text:style-name="T14">method</text:span><text:span text:style-name="T10">:</text:span> <text:span text:style-name="T10">"</text:span><text:span text:style-name="T16">POST</text:span><text:span text:style-name="T10">",</text:span></text:p>
      <text:p text:style-name="Code"><text:span text:style-name="T14">headers</text:span><text:span text:style-name="T10">:</text:span> <text:span text:style-name="T10">{</text:span></text:p>
      <text:p text:style-name="Code"><text:span text:style-name="T10">"</text:span><text:span text:style-name="T16">Content-Type</text:span><text:span text:style-name="T10">":</text:span> <text:span text:style-name="T10">"</text:span><text:span text:style-name="T16">application/json</text:span><text:span text:style-name="T10">",</text:span></text:p>
      <text:p text:style-name="Code"><text:span text:style-name="T10">"</text:span><text:span text:style-name="T16">Accept</text:span><text:span text:style-name="T10">":</text:span> <text:span text:style-name="T10">"</text:span><text:span text:style-name="T16">application/json</text:span><text:span text:style-name="T10">"</text:span></text:p>
      <text:p text:style-name="Code"><text:soft-page-break/>},</text:p>
      <text:p text:style-name="Code"><text:span text:style-name="T14">body</text:span><text:span text:style-name="T10">:</text:span> <text:span text:style-name="T14">JSON</text:span><text:span text:style-name="T10">.</text:span><text:span text:style-name="T15">stringify</text:span>(<text:span text:style-name="T14">payload</text:span>)</text:p>
      <text:p text:style-name="Code"><text:span text:style-name="T10">}</text:span>)<text:span text:style-name="T10">;</text:span></text:p>
      <text:p text:style-name="Code"/>
      <text:p text:style-name="Code"><text:span text:style-name="T14">const</text:span> <text:span text:style-name="T14">contentType</text:span> <text:span text:style-name="T10">=</text:span> <text:span text:style-name="T14">response</text:span><text:span text:style-name="T10">.</text:span><text:span text:style-name="T11">headers</text:span><text:span text:style-name="T10">.</text:span><text:span text:style-name="T15">get</text:span>(<text:span text:style-name="T10">"</text:span><text:span text:style-name="T16">content-type</text:span><text:span text:style-name="T10">"</text:span>)<text:span text:style-name="T10">;</text:span></text:p>
      <text:p text:style-name="Code"><text:span text:style-name="T9">if</text:span> (<text:span text:style-name="T10">!</text:span><text:span text:style-name="T14">contentType</text:span> <text:span text:style-name="T10">||</text:span> <text:span text:style-name="T10">!</text:span><text:span text:style-name="T14">contentType</text:span><text:span text:style-name="T10">.</text:span><text:span text:style-name="T15">includes</text:span>(<text:span text:style-name="T10">"</text:span><text:span text:style-name="T16">application/json</text:span><text:span text:style-name="T10">"</text:span>)) <text:span text:style-name="T10">{</text:span></text:p>
      <text:p text:style-name="Code"><text:span text:style-name="T14">const</text:span> <text:span text:style-name="T14">text</text:span> <text:span text:style-name="T10">=</text:span> <text:span text:style-name="T9">await</text:span> <text:span text:style-name="T14">response</text:span><text:span text:style-name="T10">.</text:span><text:span text:style-name="T15">text</text:span>()<text:span text:style-name="T10">;</text:span></text:p>
      <text:p text:style-name="Code"><text:span text:style-name="T14">console</text:span><text:span text:style-name="T10">.</text:span><text:span text:style-name="T15">error</text:span>(<text:span text:style-name="T10">"</text:span><text:span text:style-name="T16">Non-JSON response:</text:span><text:span text:style-name="T10">",</text:span> <text:span text:style-name="T14">text</text:span>)<text:span text:style-name="T10">;</text:span></text:p>
      <text:p text:style-name="Code"><text:span text:style-name="T9">throw</text:span> <text:span text:style-name="T10">new</text:span> <text:span text:style-name="T12">Error</text:span>(<text:span text:style-name="T10">"</text:span><text:span text:style-name="T16">Réponse serveur non JSON</text:span><text:span text:style-name="T10">"</text:span>)<text:span text:style-name="T10">;</text:span></text:p>
      <text:p text:style-name="Code">}</text:p>
      <text:p text:style-name="Code"/>
      <text:p text:style-name="Code"><text:span text:style-name="T14">const</text:span> <text:span text:style-name="T14">data</text:span> <text:span text:style-name="T10">=</text:span> <text:span text:style-name="T9">await</text:span> <text:span text:style-name="T14">response</text:span><text:span text:style-name="T10">.</text:span><text:span text:style-name="T15">json</text:span>()<text:span text:style-name="T10">;</text:span></text:p>
      <text:p text:style-name="Code"><text:span text:style-name="T9">if</text:span> (<text:span text:style-name="T10">!</text:span><text:span text:style-name="T14">response</text:span><text:span text:style-name="T10">.</text:span><text:span text:style-name="T11">ok</text:span>) <text:span text:style-name="T10">{</text:span></text:p>
      <text:p text:style-name="Code"><text:span text:style-name="T9">throw</text:span> <text:span text:style-name="T10">new</text:span> <text:span text:style-name="T12">Error</text:span>(<text:span text:style-name="T14">data</text:span><text:span text:style-name="T10">.</text:span><text:span text:style-name="T14">message</text:span> <text:span text:style-name="T10">||</text:span> <text:span text:style-name="T10">"</text:span><text:span text:style-name="T16">Erreur serveur</text:span><text:span text:style-name="T10">"</text:span>)<text:span text:style-name="T10">;</text:span></text:p>
      <text:p text:style-name="Code">}</text:p>
      <text:p text:style-name="Code"/>
      <text:p text:style-name="Code"><text:span text:style-name="T9">return</text:span> <text:span text:style-name="T14">data</text:span><text:span text:style-name="T10">;</text:span></text:p>
      <text:p text:style-name="Code"/>
      <text:p text:style-name="Code"><text:span text:style-name="T10">}</text:span> <text:span text:style-name="T9">catch</text:span> (<text:span text:style-name="T14">err</text:span>) <text:span text:style-name="T10">{</text:span></text:p>
      <text:p text:style-name="Code"><text:span text:style-name="T14">console</text:span><text:span text:style-name="T10">.</text:span><text:span text:style-name="T15">error</text:span>(<text:span text:style-name="T10">"</text:span><text:span text:style-name="T16">POST error:</text:span><text:span text:style-name="T10">",</text:span> <text:span text:style-name="T14">err</text:span>)<text:span text:style-name="T10">;</text:span></text:p>
      <text:p text:style-name="Code"><text:span text:style-name="T9">return</text:span> <text:span text:style-name="T10">{</text:span> <text:span text:style-name="T14">success</text:span><text:span text:style-name="T10">:</text:span> <text:span text:style-name="T11">false</text:span><text:span text:style-name="T10">,</text:span> <text:span text:style-name="T14">message</text:span><text:span text:style-name="T10">:</text:span> <text:span text:style-name="T14">err</text:span><text:span text:style-name="T10">.</text:span><text:span text:style-name="T14">message</text:span> <text:span text:style-name="T10">};</text:span></text:p>
      <text:p text:style-name="Code">}</text:p>
      <text:p text:style-name="Code">}</text:p>
      <text:p text:style-name="Code"/>
      <text:p text:style-name="Code"><text:span text:style-name="T9">async</text:span> <text:span text:style-name="T15">postFormData</text:span><text:span text:style-name="T10">(</text:span><text:span text:style-name="T14">endpoint</text:span><text:span text:style-name="T10">,</text:span> <text:span text:style-name="T14">formData</text:span><text:span text:style-name="T10">)</text:span> <text:span text:style-name="T10">{</text:span></text:p>
      <text:p text:style-name="Code"><text:span text:style-name="T9">try</text:span> <text:span text:style-name="T10">{</text:span></text:p>
      <text:p text:style-name="Code"><text:span text:style-name="T14">const</text:span> <text:span text:style-name="T14">response</text:span> <text:span text:style-name="T10">=</text:span> <text:span text:style-name="T9">await</text:span> <text:span text:style-name="T15">fetch</text:span>(<text:span text:style-name="T14">endpoint</text:span><text:span text:style-name="T10">,</text:span> <text:span text:style-name="T10">{</text:span></text:p>
      <text:p text:style-name="Code"><text:span text:style-name="T14">method</text:span><text:span text:style-name="T10">:</text:span> <text:span text:style-name="T10">'</text:span><text:span text:style-name="T16">POST</text:span><text:span text:style-name="T10">',</text:span></text:p>
      <text:p text:style-name="Code"><text:span text:style-name="T14">body</text:span><text:span text:style-name="T10">:</text:span> <text:span text:style-name="T14">formData</text:span></text:p>
      <text:p text:style-name="Code"><text:span text:style-name="T10">}</text:span>)<text:span text:style-name="T10">;</text:span></text:p>
      <text:p text:style-name="Code"/>
      <text:p text:style-name="Code"><text:span text:style-name="T14">const</text:span> <text:span text:style-name="T14">data</text:span> <text:span text:style-name="T10">=</text:span> <text:span text:style-name="T9">await</text:span> <text:span text:style-name="T14">response</text:span><text:span text:style-name="T10">.</text:span><text:span text:style-name="T15">json</text:span>()<text:span text:style-name="T10">;</text:span></text:p>
      <text:p text:style-name="Code"><text:span text:style-name="T9">if</text:span> (<text:span text:style-name="T10">!</text:span><text:span text:style-name="T14">response</text:span><text:span text:style-name="T10">.</text:span><text:span text:style-name="T11">ok</text:span>) <text:span text:style-name="T10">{</text:span></text:p>
      <text:p text:style-name="Code"><text:span text:style-name="T9">throw</text:span> <text:span text:style-name="T10">new</text:span> <text:span text:style-name="T12">Error</text:span>(<text:span text:style-name="T14">data</text:span><text:span text:style-name="T10">.</text:span><text:span text:style-name="T14">message</text:span> <text:span text:style-name="T10">||</text:span> <text:span text:style-name="T10">'</text:span><text:span text:style-name="T16">Erreur serveur</text:span><text:span text:style-name="T10">'</text:span>)<text:span text:style-name="T10">;</text:span></text:p>
      <text:p text:style-name="Code">}</text:p>
      <text:p text:style-name="Code"/>
      <text:p text:style-name="Code"><text:span text:style-name="T9">return</text:span> <text:span text:style-name="T14">data</text:span><text:span text:style-name="T10">;</text:span></text:p>
      <text:p text:style-name="Code"/>
      <text:p text:style-name="Code"><text:span text:style-name="T10">}</text:span> <text:span text:style-name="T9">catch</text:span> (<text:span text:style-name="T14">err</text:span>) <text:span text:style-name="T10">{</text:span></text:p>
      <text:p text:style-name="Code"><text:span text:style-name="T14">console</text:span><text:span text:style-name="T10">.</text:span><text:span text:style-name="T15">error</text:span>(<text:span text:style-name="T10">'</text:span><text:span text:style-name="T16">POST FormData error:</text:span><text:span text:style-name="T10">',</text:span> <text:span text:style-name="T14">err</text:span>)<text:span text:style-name="T10">;</text:span></text:p>
      <text:p text:style-name="Code"><text:span text:style-name="T9">return</text:span> <text:span text:style-name="T10">{</text:span> <text:span text:style-name="T14">success</text:span><text:span text:style-name="T10">:</text:span> <text:span text:style-name="T11">false</text:span><text:span text:style-name="T10">,</text:span> <text:span text:style-name="T14">message</text:span><text:span text:style-name="T10">:</text:span> <text:span text:style-name="T14">err</text:span><text:span text:style-name="T10">.</text:span><text:span text:style-name="T14">message</text:span> <text:span text:style-name="T10">};</text:span></text:p>
      <text:p text:style-name="Code">}</text:p>
      <text:p text:style-name="Code">}</text:p>
      <text:p text:style-name="Code">}</text:p>
      <text:h text:style-name="Heading_20_3" text:outline-level="3">Data retournées par les APIs</text:h>
      <text:p text:style-name="Code"><text:span text:style-name="T9">protected</text:span> <text:span text:style-name="T14">function</text:span> <text:span text:style-name="T15">renderJson</text:span><text:span text:style-name="T10">(</text:span><text:span text:style-name="T9">array</text:span> <text:span text:style-name="T10">$</text:span><text:span text:style-name="T14">data</text:span><text:span text:style-name="T10">,</text:span> <text:span text:style-name="T9">bool</text:span> <text:span text:style-name="T10">$</text:span><text:span text:style-name="T14">success</text:span><text:span text:style-name="T10">,</text:span> <text:span text:style-name="T9">int</text:span> <text:span text:style-name="T10">$</text:span><text:span text:style-name="T14">statusCode</text:span><text:span text:style-name="T10">,</text:span> <text:span text:style-name="T9">string</text:span> <text:span text:style-name="T10">$</text:span><text:span text:style-name="T14">message</text:span> <text:span text:style-name="T10">=</text:span> <text:span text:style-name="T10">''):</text:span> <text:span text:style-name="T9">void</text:span></text:p>
      <text:p text:style-name="Code">{</text:p>
      <text:p text:style-name="Code"><text:span text:style-name="T15"><text:tab/>header</text:span><text:span text:style-name="T10">('</text:span><text:span text:style-name="T16">Content-Type: application/json</text:span><text:span text:style-name="T10">');</text:span></text:p>
      <text:p text:style-name="Code"><text:span text:style-name="T15"><text:tab/>http_response_code</text:span><text:span text:style-name="T10">($</text:span><text:span text:style-name="T14">statusCode</text:span><text:span text:style-name="T10">);</text:span></text:p>
      <text:p text:style-name="Code"><text:span text:style-name="T10"><text:tab/>$</text:span><text:span text:style-name="T14">response</text:span> <text:span text:style-name="T10">=</text:span> <text:span text:style-name="T10">[</text:span></text:p>
      <text:p text:style-name="Code"><text:span text:style-name="T10"><text:tab/><text:tab/>'</text:span><text:span text:style-name="T16">success</text:span><text:span text:style-name="T10">'</text:span> <text:span text:style-name="T10">=&gt;</text:span> <text:span text:style-name="T10">$</text:span><text:span text:style-name="T14">success</text:span><text:span text:style-name="T10">,</text:span></text:p>
      <text:p text:style-name="Code"><text:span text:style-name="T10"><text:tab/><text:tab/>'</text:span><text:span text:style-name="T16">message</text:span><text:span text:style-name="T10">'</text:span> <text:span text:style-name="T10">=&gt;</text:span> <text:span text:style-name="T10">$</text:span><text:span text:style-name="T14">message</text:span><text:span text:style-name="T10">,</text:span></text:p>
      <text:p text:style-name="Code"><text:span text:style-name="T10"><text:tab/><text:tab/>'</text:span><text:span text:style-name="T16">data</text:span><text:span text:style-name="T10">'</text:span> <text:span text:style-name="T10">=&gt;</text:span> <text:span text:style-name="T10">$</text:span><text:span text:style-name="T14">data</text:span><text:span text:style-name="T10">,</text:span></text:p>
      <text:p text:style-name="Code"><text:tab/>];</text:p>
      <text:p text:style-name="Code"><text:soft-page-break/><text:span text:style-name="T15"><text:tab/>echo</text:span> <text:span text:style-name="T15">json_encode</text:span><text:span text:style-name="T10">($</text:span><text:span text:style-name="T14">response</text:span><text:span text:style-name="T10">);</text:span></text:p>
      <text:p text:style-name="Code"><text:span text:style-name="T9"><text:tab/>if</text:span> <text:span text:style-name="T10">(</text:span><text:span text:style-name="T15">ob_get_level</text:span><text:span text:style-name="T10">())</text:span> <text:span text:style-name="T15">ob_end_flush</text:span><text:span text:style-name="T10">();</text:span></text:p>
      <text:p text:style-name="Code"><text:span text:style-name="T15"><text:tab/><text:tab/>flush</text:span><text:span text:style-name="T10">();</text:span></text:p>
      <text:p text:style-name="Code"><text:span text:style-name="T12"><text:tab/><text:tab/>Flight</text:span><text:span text:style-name="T10">::</text:span><text:span text:style-name="T15">stop</text:span><text:span text:style-name="T10">();</text:span></text:p>
      <text:p text:style-name="Code">}</text:p>
      <text:h text:style-name="Heading_20_3" text:outline-level="3">L’abstract</text:h>
      <text:p text:style-name="Code">&lt;?php</text:p>
      <text:p text:style-name="Code"/>
      <text:p text:style-name="Code"><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apis</text:span><text:span text:style-name="T10">;</text:span></text:p>
      <text:p text:style-name="Code"/>
      <text:p text:style-name="Code"><text:span text:style-name="T9">use</text:span> <text:span text:style-name="T12">flight</text:span><text:span text:style-name="T10">;</text:span></text:p>
      <text:p text:style-name="Code"><text:span text:style-name="T9">use</text:span> Latte<text:span text:style-name="T10">\</text:span><text:span text:style-name="T12">Engine</text:span> <text:span text:style-name="T9">as</text:span> LatteEngine<text:span text:style-name="T10">;</text:span></text:p>
      <text:p text:style-name="Code"/>
      <text:p text:style-name="Code"><text:span text:style-name="T9">use</text:span> app<text:span text:style-name="T10">\</text:span>enums<text:span text:style-name="T10">\</text:span><text:span text:style-name="T12">ApplicationError</text:span><text:span text:style-name="T10">;</text:span></text:p>
      <text:p text:style-name="Code"><text:span text:style-name="T9">use</text:span> app<text:span text:style-name="T10">\</text:span>helpers<text:span text:style-name="T10">\</text:span><text:span text:style-name="T12">Application</text:span><text:span text:style-name="T10">;</text:span></text:p>
      <text:p text:style-name="Code"><text:span text:style-name="T9">use</text:span> app<text:span text:style-name="T10">\</text:span>helpers<text:span text:style-name="T10">\</text:span><text:span text:style-name="T12">ConnectedUser</text:span><text:span text:style-name="T10">;</text:span></text:p>
      <text:p text:style-name="Code"><text:span text:style-name="T9">use</text:span> app<text:span text:style-name="T10">\</text:span>models<text:span text:style-name="T10">\</text:span><text:span text:style-name="T12">DataHelper</text:span><text:span text:style-name="T10">;</text:span></text:p>
      <text:p text:style-name="Code"><text:span text:style-name="T9">use</text:span> app<text:span text:style-name="T10">\</text:span>models<text:span text:style-name="T10">\</text:span><text:span text:style-name="T12">PersonDataHelper</text:span><text:span text:style-name="T10">;</text:span></text:p>
      <text:p text:style-name="Code"/>
      <text:p text:style-name="Code"><text:span text:style-name="T9">abstract</text:span> <text:span text:style-name="T14">class</text:span> <text:span text:style-name="T12">AbstractApi</text:span></text:p>
      <text:p text:style-name="Code">{</text:p>
      <text:p text:style-name="Code"><text:span text:style-name="T9"><text:tab/>protected</text:span> <text:span text:style-name="T12">LatteEngine</text:span> <text:span text:style-name="T10">$</text:span><text:span text:style-name="T14">latte</text:span><text:span text:style-name="T10">;</text:span></text:p>
      <text:p text:style-name="Code"/>
      <text:p text:style-name="Code"><text:span text:style-name="T9"><text:tab/>public</text:span> <text:span text:style-name="T14">function</text:span> <text:span text:style-name="T15">__construct</text:span><text:span text:style-name="T10">(</text:span></text:p>
      <text:p text:style-name="Code"><text:span text:style-name="T9"><text:tab/><text:tab/>protected</text:span> <text:span text:style-name="T12">Application</text:span> <text:span text:style-name="T10">$</text:span><text:span text:style-name="T14">application</text:span><text:span text:style-name="T10">,</text:span></text:p>
      <text:p text:style-name="Code"><text:span text:style-name="T9"><text:tab/><text:tab/>protected</text:span> <text:span text:style-name="T12">ConnectedUser</text:span> <text:span text:style-name="T10">$</text:span><text:span text:style-name="T14">connectedUser</text:span><text:span text:style-name="T10">,</text:span></text:p>
      <text:p text:style-name="Code"><text:span text:style-name="T9"><text:tab/><text:tab/>protected</text:span> <text:span text:style-name="T12">DataHelper</text:span> <text:span text:style-name="T10">$</text:span><text:span text:style-name="T14">dataHelper</text:span><text:span text:style-name="T10">,</text:span></text:p>
      <text:p text:style-name="Code"><text:span text:style-name="T9"><text:tab/><text:tab/>protected</text:span> <text:span text:style-name="T12">PersonDataHelper</text:span> <text:span text:style-name="T10">$</text:span><text:span text:style-name="T14">personDataHelper</text:span></text:p>
      <text:p text:style-name="Code"><text:span text:style-name="T10"><text:tab/><text:tab/>)</text:span> <text:span text:style-name="T10">{</text:span></text:p>
      <text:p text:style-name="Code"><text:span text:style-name="T10"><text:tab/><text:tab/><text:tab/>$</text:span><text:span text:style-name="T11">this</text:span><text:span text:style-name="T10">-&gt;</text:span><text:span text:style-name="T14">latte</text:span> <text:span text:style-name="T10">=</text:span> <text:span text:style-name="T10">$</text:span><text:span text:style-name="T14">application</text:span><text:span text:style-name="T10">-&gt;</text:span><text:span text:style-name="T15">getLatte</text:span><text:span text:style-name="T10">();</text:span></text:p>
      <text:p text:style-name="Code"><text:tab/><text:tab/>}</text:p>
      <text:p text:style-name="Code"/>
      <text:p text:style-name="Code"><text:span text:style-name="T9"><text:tab/>protected</text:span> <text:span text:style-name="T14">function</text:span> <text:span text:style-name="T15">getJsonInput</text:span><text:span text:style-name="T10">():</text:span> <text:span text:style-name="T9">array</text:span></text:p>
      <text:p text:style-name="Code"><text:tab/>{</text:p>
      <text:p text:style-name="Code"><text:span text:style-name="T10"><text:tab/><text:tab/>$</text:span><text:span text:style-name="T14">json</text:span> <text:span text:style-name="T10">=</text:span> <text:span text:style-name="T15">file_get_contents</text:span><text:span text:style-name="T10">('</text:span><text:span text:style-name="T16">php://input</text:span><text:span text:style-name="T10">');</text:span></text:p>
      <text:p text:style-name="Code"><text:span text:style-name="T9"><text:tab/><text:tab/>return</text:span> <text:span text:style-name="T15">json_decode</text:span><text:span text:style-name="T10">($</text:span><text:span text:style-name="T14">json</text:span><text:span text:style-name="T10">,</text:span> <text:span text:style-name="T11">true</text:span><text:span text:style-name="T10">)</text:span> <text:span text:style-name="T10">??</text:span> <text:span text:style-name="T10">[];</text:span></text:p>
      <text:p text:style-name="Code"><text:tab/>}</text:p>
      <text:p text:style-name="Code"/>
      <text:p text:style-name="Code"><text:span text:style-name="T9"><text:tab/>protected</text:span> <text:span text:style-name="T14">function</text:span> <text:span text:style-name="T15">renderJson</text:span><text:span text:style-name="T10">(</text:span><text:span text:style-name="T9">array</text:span> <text:span text:style-name="T10">$</text:span><text:span text:style-name="T14">data</text:span><text:span text:style-name="T10">,</text:span> <text:span text:style-name="T9">bool</text:span> <text:span text:style-name="T10">$</text:span><text:span text:style-name="T14">success</text:span><text:span text:style-name="T10">,</text:span> <text:span text:style-name="T9">int</text:span> <text:span text:style-name="T10">$</text:span><text:span text:style-name="T14">statusCode</text:span><text:span text:style-name="T10">,</text:span> <text:span text:style-name="T9">string</text:span> <text:span text:style-name="T10">$</text:span><text:span text:style-name="T14">message</text:span> <text:span text:style-name="T10">=</text:span> <text:span text:style-name="T10">''):</text:span> <text:span text:style-name="T9">void</text:span></text:p>
      <text:p text:style-name="Code"><text:tab/>{</text:p>
      <text:p text:style-name="Code"><text:span text:style-name="T15"><text:tab/><text:tab/>header</text:span><text:span text:style-name="T10">('</text:span><text:span text:style-name="T16">Content-Type: application/json</text:span><text:span text:style-name="T10">');</text:span></text:p>
      <text:p text:style-name="Code"><text:span text:style-name="T15"><text:tab/><text:tab/>http_response_code</text:span><text:span text:style-name="T10">($</text:span><text:span text:style-name="T14">statusCode</text:span><text:span text:style-name="T10">);</text:span></text:p>
      <text:p text:style-name="Code"><text:span text:style-name="T10"><text:tab/><text:tab/>$</text:span><text:span text:style-name="T14">response</text:span> <text:span text:style-name="T10">=</text:span> <text:span text:style-name="T10">[</text:span></text:p>
      <text:p text:style-name="Code"><text:span text:style-name="T10"><text:tab/><text:tab/><text:tab/>'</text:span><text:span text:style-name="T16">success</text:span><text:span text:style-name="T10">'</text:span> <text:span text:style-name="T10">=&gt;</text:span> <text:span text:style-name="T10">$</text:span><text:span text:style-name="T14">success</text:span><text:span text:style-name="T10">,</text:span></text:p>
      <text:p text:style-name="Code"><text:span text:style-name="T10"><text:tab/><text:tab/><text:tab/>'</text:span><text:span text:style-name="T16">message</text:span><text:span text:style-name="T10">'</text:span> <text:span text:style-name="T10">=&gt;</text:span> <text:span text:style-name="T10">$</text:span><text:span text:style-name="T14">message</text:span><text:span text:style-name="T10">,</text:span></text:p>
      <text:p text:style-name="Code"><text:span text:style-name="T10"><text:tab/><text:tab/><text:tab/>'</text:span><text:span text:style-name="T16">data</text:span><text:span text:style-name="T10">'</text:span> <text:span text:style-name="T10">=&gt;</text:span> <text:span text:style-name="T10">$</text:span><text:span text:style-name="T14">data</text:span><text:span text:style-name="T10">,</text:span></text:p>
      <text:p text:style-name="Code"><text:tab/><text:tab/>];</text:p>
      <text:p text:style-name="Code"><text:span text:style-name="T15"><text:tab/><text:tab/>echo</text:span> <text:span text:style-name="T15">json_encode</text:span><text:span text:style-name="T10">($</text:span><text:span text:style-name="T14">response</text:span><text:span text:style-name="T10">);</text:span></text:p>
      <text:p text:style-name="Code"><text:span text:style-name="T9"><text:tab/><text:tab/>if</text:span> <text:span text:style-name="T10">(</text:span><text:span text:style-name="T15">ob_get_level</text:span><text:span text:style-name="T10">())</text:span> <text:span text:style-name="T15">ob_end_flush</text:span><text:span text:style-name="T10">();</text:span></text:p>
      <text:p text:style-name="Code"><text:span text:style-name="T15"><text:tab/><text:tab/>flush</text:span><text:span text:style-name="T10">();</text:span></text:p>
      <text:p text:style-name="Code"><text:span text:style-name="T12"><text:tab/><text:tab/>Flight</text:span><text:span text:style-name="T10">::</text:span><text:span text:style-name="T15">stop</text:span><text:span text:style-name="T10">();</text:span></text:p>
      <text:p text:style-name="Code"><text:tab/>}</text:p>
      <text:p text:style-name="Code"><text:soft-page-break/></text:p>
      <text:p text:style-name="Code"><text:span text:style-name="T9"><text:tab/>protected</text:span> <text:span text:style-name="T14">function</text:span> <text:span text:style-name="T15">renderJsonBadRequest</text:span><text:span text:style-name="T10">(</text:span><text:span text:style-name="T9">string</text:span> <text:span text:style-name="T10">$</text:span><text:span text:style-name="T14">message</text:span><text:span text:style-name="T10">,</text:span> <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tab/>{</text:p>
      <text:p text:style-name="Code"><text:span text:style-name="T10"><text:tab/><text:tab/>$</text:span><text:span text:style-name="T11">this</text:span><text:span text:style-name="T10">-&gt;</text:span><text:span text:style-name="T15">renderJson</text:span><text:span text:style-name="T10">(</text:span></text:p>
      <text:p text:style-name="Code"><text:tab/><text:tab/><text:tab/>[],</text:p>
      <text:p text:style-name="Code"><text:span text:style-name="T11"><text:tab/><text:tab/><text:tab/>false</text:span><text:span text:style-name="T10">,</text:span></text:p>
      <text:p text:style-name="Code"><text:span text:style-name="T12"><text:tab/><text:tab/><text:tab/>ApplicationError</text:span><text:span text:style-name="T10">::</text:span><text:span text:style-name="T11">BadRequest</text:span><text:span text:style-name="T10">-&gt;</text:span><text:span text:style-name="T14">value</text:span><text:span text:style-name="T10">,</text:span></text:p>
      <text:p text:style-name="Code"><text:span text:style-name="T10"><text:tab/><text:tab/><text:tab/>"</text:span><text:span text:style-name="T16">Bad request: </text:span><text:span text:style-name="T10">{$</text:span><text:span text:style-name="T14">message</text:span><text:span text:style-name="T10">}</text:span><text:span text:style-name="T16">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tab/><text:tab/>);</text:p>
      <text:p text:style-name="Code"><text:tab/>}</text:p>
      <text:p text:style-name="Code"/>
      <text:p text:style-name="Code"><text:span text:style-name="T9"><text:tab/>protected</text:span> <text:span text:style-name="T14">function</text:span> <text:span text:style-name="T15">renderJsonCreated</text:span><text:span text:style-name="T10">(</text:span><text:span text:style-name="T9">array</text:span> <text:span text:style-name="T10">$</text:span><text:span text:style-name="T14">data</text:span> <text:span text:style-name="T10">=</text:span> <text:span text:style-name="T10">[],</text:span> <text:span text:style-name="T9">string</text:span> <text:span text:style-name="T10">$</text:span><text:span text:style-name="T14">message</text:span> <text:span text:style-name="T10">=</text:span> <text:span text:style-name="T10">'</text:span><text:span text:style-name="T16">Created</text:span><text:span text:style-name="T10">'):</text:span> <text:span text:style-name="T9">void</text:span></text:p>
      <text:p text:style-name="Code"><text:tab/>{</text:p>
      <text:p text:style-name="Code"><text:span text:style-name="T10"><text:tab/><text:tab/><text:tab/>$</text:span><text:span text:style-name="T11">this</text:span><text:span text:style-name="T10">-&gt;</text:span><text:span text:style-name="T15">renderJson</text:span><text:span text:style-name="T10">(</text:span></text:p>
      <text:p text:style-name="Code"><text:span text:style-name="T10"><text:tab/><text:tab/><text:tab/>$</text:span><text:span text:style-name="T14">data</text:span><text:span text:style-name="T10">,</text:span></text:p>
      <text:p text:style-name="Code"><text:span text:style-name="T11"><text:tab/><text:tab/><text:tab/>true</text:span><text:span text:style-name="T10">,</text:span></text:p>
      <text:p text:style-name="Code"><text:span text:style-name="T12"><text:tab/><text:tab/><text:tab/>ApplicationError</text:span><text:span text:style-name="T10">::</text:span><text:span text:style-name="T11">Created</text:span><text:span text:style-name="T10">-&gt;</text:span><text:span text:style-name="T14">value</text:span><text:span text:style-name="T10">,</text:span></text:p>
      <text:p text:style-name="Code"><text:span text:style-name="T10"><text:tab/><text:tab/><text:tab/>$</text:span><text:span text:style-name="T14">message</text:span></text:p>
      <text:p text:style-name="Code"><text:tab/><text:tab/>);</text:p>
      <text:p text:style-name="Code"><text:tab/>}</text:p>
      <text:p text:style-name="Code"/>
      <text:p text:style-name="Code"><text:span text:style-name="T9"><text:tab/>protected</text:span> <text:span text:style-name="T14">function</text:span> <text:span text:style-name="T15">renderJsonError</text:span><text:span text:style-name="T10">(</text:span><text:span text:style-name="T9">string</text:span> <text:span text:style-name="T10">$</text:span><text:span text:style-name="T14">message</text:span><text:span text:style-name="T10">,</text:span> <text:span text:style-name="T9">int</text:span> <text:span text:style-name="T10">$</text:span><text:span text:style-name="T14">statusCode</text:span><text:span text:style-name="T10">,</text:span> <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tab/>{</text:p>
      <text:p text:style-name="Code"><text:span text:style-name="T10"><text:tab/><text:tab/>$</text:span><text:span text:style-name="T11">this</text:span><text:span text:style-name="T10">-&gt;</text:span><text:span text:style-name="T14">application</text:span><text:span text:style-name="T10">-&gt;</text:span><text:span text:style-name="T15">getFlight</text:span><text:span text:style-name="T10">()-&gt;</text:span><text:span text:style-name="T15">setData</text:span><text:span text:style-name="T10">('</text:span><text:span text:style-name="T16">code</text:span><text:span text:style-name="T10">',</text:span> <text:span text:style-name="T10">$</text:span><text:span text:style-name="T14">statusCode</text:span><text:span text:style-name="T10">);</text:span></text:p>
      <text:p text:style-name="Code"><text:span text:style-name="T10"><text:tab/><text:tab/>$</text:span><text:span text:style-name="T11">this</text:span><text:span text:style-name="T10">-&gt;</text:span><text:span text:style-name="T14">application</text:span><text:span text:style-name="T10">-&gt;</text:span><text:span text:style-name="T15">getFlight</text:span><text:span text:style-name="T10">()-&gt;</text:span><text:span text:style-name="T15">setData</text:span><text:span text:style-name="T10">('</text:span><text:span text:style-name="T16">message</text:span><text:span text:style-name="T10">',</text:span> <text:span text:style-name="T10">$</text:span><text:span text:style-name="T14">message</text:span><text:span text:style-name="T10">);</text:span></text:p>
      <text:p text:style-name="Code"><text:span text:style-name="T10"><text:tab/><text:tab/>$</text:span><text:span text:style-name="T11">this</text:span><text:span text:style-name="T10">-&gt;</text:span><text:span text:style-name="T15">renderJson</text:span><text:span text:style-name="T10">(</text:span></text:p>
      <text:p text:style-name="Code"><text:tab/><text:tab/><text:tab/>[],</text:p>
      <text:p text:style-name="Code"><text:span text:style-name="T11"><text:tab/><text:tab/><text:tab/>false</text:span><text:span text:style-name="T10">,</text:span></text:p>
      <text:p text:style-name="Code"><text:span text:style-name="T10"><text:tab/><text:tab/><text:tab/>$</text:span><text:span text:style-name="T14">statusCode</text:span><text:span text:style-name="T10">,</text:span></text:p>
      <text:p text:style-name="Code"><text:span text:style-name="T10"><text:tab/><text:tab/><text:tab/>"{$</text:span><text:span text:style-name="T14">message</text:span><text:span text:style-name="T10">}</text:span><text:span text:style-name="T16">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tab/><text:tab/>);</text:p>
      <text:p text:style-name="Code"><text:tab/>}</text:p>
      <text:p text:style-name="Code"/>
      <text:p text:style-name="Code"><text:span text:style-name="T9"><text:tab/>protected</text:span> <text:span text:style-name="T14">function</text:span> <text:span text:style-name="T15">renderJsonForbidden</text:span><text:span text:style-name="T10">(</text:span><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tab/>{</text:p>
      <text:p text:style-name="Code"><text:span text:style-name="T10"><text:tab/><text:tab/>$</text:span><text:span text:style-name="T11">this</text:span><text:span text:style-name="T10">-&gt;</text:span><text:span text:style-name="T15">renderJson</text:span><text:span text:style-name="T10">(</text:span></text:p>
      <text:p text:style-name="Code"><text:tab/><text:tab/><text:tab/>[],</text:p>
      <text:p text:style-name="Code"><text:span text:style-name="T11"><text:tab/><text:tab/><text:tab/>false</text:span><text:span text:style-name="T10">,</text:span></text:p>
      <text:p text:style-name="Code"><text:span text:style-name="T12"><text:tab/><text:tab/><text:tab/>ApplicationError</text:span><text:span text:style-name="T10">::</text:span><text:span text:style-name="T11">Forbidden</text:span><text:span text:style-name="T10">-&gt;</text:span><text:span text:style-name="T14">value</text:span><text:span text:style-name="T10">,</text:span></text:p>
      <text:p text:style-name="Code"><text:span text:style-name="T10"><text:tab/><text:tab/><text:tab/>"</text:span><text:span text:style-name="T16">User not allowed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tab/><text:tab/>);</text:p>
      <text:p text:style-name="Code"><text:tab/>}</text:p>
      <text:p text:style-name="Code"/>
      <text:p text:style-name="Code"><text:span text:style-name="T9"><text:tab/>protected</text:span> <text:span text:style-name="T14">function</text:span> <text:span text:style-name="T15">renderJsonMethodNotAllowed</text:span><text:span text:style-name="T10">(</text:span><text:span text:style-name="T9">string</text:span> <text:span text:style-name="T10">$</text:span><text:span text:style-name="T14">file</text:span><text:span text:style-name="T10">,</text:span> <text:span text:style-name="T9">int</text:span> <text:span text:style-name="T10">$</text:span><text:span text:style-name="T14">line</text:span><text:span text:style-name="T10">):</text:span> <text:span text:style-name="T9">void</text:span></text:p>
      <text:p text:style-name="Code"><text:tab/>{</text:p>
      <text:p text:style-name="Code"><text:span text:style-name="T10"><text:tab/><text:tab/>$</text:span><text:span text:style-name="T11">this</text:span><text:span text:style-name="T10">-&gt;</text:span><text:span text:style-name="T15">renderJson</text:span><text:span text:style-name="T10">(</text:span></text:p>
      <text:p text:style-name="Code"><text:tab/><text:tab/><text:tab/>[],</text:p>
      <text:p text:style-name="Code"><text:span text:style-name="T11"><text:tab/><text:tab/><text:tab/>false</text:span><text:span text:style-name="T10">,</text:span></text:p>
      <text:p text:style-name="Code"><text:span text:style-name="T12"><text:tab/><text:tab/><text:tab/>ApplicationError</text:span><text:span text:style-name="T10">::</text:span><text:span text:style-name="T11">MethodNotAllowed</text:span><text:span text:style-name="T10">-&gt;</text:span><text:span text:style-name="T14">value</text:span><text:span text:style-name="T10">,</text:span></text:p>
      <text:p text:style-name="Code"><text:span text:style-name="T10"><text:tab/><text:tab/><text:tab/>"</text:span><text:span text:style-name="T16">Method </text:span><text:span text:style-name="T10">{$</text:span><text:span text:style-name="T14">_SERVER</text:span><text:span text:style-name="T10">['</text:span><text:span text:style-name="T16">REQUEST_METHOD</text:span><text:span text:style-name="T10">']}</text:span><text:span text:style-name="T16"> not allowed in file </text:span><text:span text:style-name="T10">{$</text:span><text:span text:style-name="T14">file</text:span><text:span text:style-name="T10">}</text:span><text:span text:style-name="T16"> at line </text:span><text:span text:style-name="T10">{$</text:span><text:span text:style-name="T14">line</text:span><text:span text:style-name="T10">}"</text:span></text:p>
      <text:p text:style-name="Code"><text:tab/><text:tab/>);</text:p>
      <text:p text:style-name="Code"><text:tab/>}</text:p>
      <text:p text:style-name="Code"/>
      <text:p text:style-name="Code"><text:span text:style-name="T9"><text:tab/>protected</text:span> <text:span text:style-name="T14">function</text:span> <text:span text:style-name="T15">renderJsonOk</text:span><text:span text:style-name="T10">(</text:span><text:span text:style-name="T9">array</text:span> <text:span text:style-name="T10">$</text:span><text:span text:style-name="T14">data</text:span> <text:span text:style-name="T10">=</text:span> <text:span text:style-name="T10">[],</text:span> <text:span text:style-name="T9">string</text:span> <text:span text:style-name="T10">$</text:span><text:span text:style-name="T14">message</text:span> <text:span text:style-name="T10">=</text:span> <text:span text:style-name="T10">'</text:span><text:span text:style-name="T16">OK</text:span><text:span text:style-name="T10">'):</text:span> <text:span text:style-name="T9">void</text:span></text:p>
      <text:p text:style-name="Code"><text:tab/>{</text:p>
      <text:p text:style-name="Code"><text:soft-page-break/><text:span text:style-name="T10"><text:tab/><text:tab/>$</text:span><text:span text:style-name="T11">this</text:span><text:span text:style-name="T10">-&gt;</text:span><text:span text:style-name="T15">renderJson</text:span><text:span text:style-name="T10">(</text:span></text:p>
      <text:p text:style-name="Code"><text:span text:style-name="T10"><text:tab/><text:tab/><text:tab/>$</text:span><text:span text:style-name="T14">data</text:span><text:span text:style-name="T10">,</text:span></text:p>
      <text:p text:style-name="Code"><text:span text:style-name="T11"><text:tab/><text:tab/><text:tab/>true</text:span><text:span text:style-name="T10">,</text:span></text:p>
      <text:p text:style-name="Code"><text:span text:style-name="T12"><text:tab/><text:tab/><text:tab/>ApplicationError</text:span><text:span text:style-name="T10">::</text:span><text:span text:style-name="T11">Ok</text:span><text:span text:style-name="T10">-&gt;</text:span><text:span text:style-name="T14">value</text:span><text:span text:style-name="T10">,</text:span></text:p>
      <text:p text:style-name="Code"><text:span text:style-name="T10"><text:tab/><text:tab/><text:tab/>$</text:span><text:span text:style-name="T14">message</text:span></text:p>
      <text:p text:style-name="Code"><text:tab/><text:tab/>);</text:p>
      <text:p text:style-name="Code"><text:tab/>}</text:p>
      <text:p text:style-name="Code"/>
      <text:p text:style-name="Code"><text:span text:style-name="T9"><text:tab/>protected</text:span> <text:span text:style-name="T14">function</text:span> <text:span text:style-name="T15">renderPartial</text:span><text:span text:style-name="T10">(</text:span><text:span text:style-name="T9">string</text:span> <text:span text:style-name="T10">$</text:span><text:span text:style-name="T14">template</text:span><text:span text:style-name="T10">,</text:span> <text:span text:style-name="T9">array</text:span> <text:span text:style-name="T10">$</text:span><text:span text:style-name="T14">params</text:span> <text:span text:style-name="T10">=</text:span> <text:span text:style-name="T10">[]):</text:span> <text:span text:style-name="T9">void</text:span></text:p>
      <text:p text:style-name="Code"><text:tab/>{</text:p>
      <text:p text:style-name="Code"><text:span text:style-name="T10"><text:tab/><text:tab/>$</text:span><text:span text:style-name="T11">this</text:span><text:span text:style-name="T10">-&gt;</text:span><text:span text:style-name="T14">latte</text:span><text:span text:style-name="T10">-&gt;</text:span><text:span text:style-name="T15">render</text:span><text:span text:style-name="T10">($</text:span><text:span text:style-name="T14">template</text:span><text:span text:style-name="T10">,</text:span> <text:span text:style-name="T10">$</text:span><text:span text:style-name="T14">params</text:span><text:span text:style-name="T10">);</text:span></text:p>
      <text:p text:style-name="Code"><text:tab/>}</text:p>
      <text:p text:style-name="Code"/>
      <text:p text:style-name="Code"><text:span text:style-name="T9"><text:tab/>protected</text:span> <text:span text:style-name="T14">function</text:span> <text:span text:style-name="T15">userIsAllowedAndMethodIsGood</text:span><text:span text:style-name="T10">(</text:span><text:span text:style-name="T9">string</text:span> <text:span text:style-name="T10">$</text:span><text:span text:style-name="T14">method</text:span><text:span text:style-name="T10">,</text:span> <text:span text:style-name="T9">callable</text:span> <text:span text:style-name="T10">$</text:span><text:span text:style-name="T14">permissionCheck</text:span><text:span text:style-name="T10">):</text:span> <text:span text:style-name="T9">bool</text:span></text:p>
      <text:p text:style-name="Code"><text:tab/>{</text:p>
      <text:p text:style-name="Code"><text:span text:style-name="T10"><text:tab/><text:tab/>$</text:span><text:span text:style-name="T14">user</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text:span></text:p>
      <text:p text:style-name="Code"><text:span text:style-name="T9"><text:tab/><text:tab/>if</text:span> <text:span text:style-name="T10">(!$</text:span><text:span text:style-name="T14">user</text:span> <text:span text:style-name="T10">||</text:span> <text:span text:style-name="T10">!$</text:span><text:span text:style-name="T14">permissionCheck</text:span><text:span text:style-name="T10">($</text:span><text:span text:style-name="T14">user</text:span><text:span text:style-name="T10">))</text:span> <text:span text:style-name="T10">{</text:span></text:p>
      <text:p text:style-name="Code"><text:span text:style-name="T10"><text:tab/><text:tab/><text:tab/>$</text:span><text:span text:style-name="T11">this</text:span><text:span text:style-name="T10">-&gt;</text:span><text:span text:style-name="T15">renderJsonForbidden</text:span><text:span text:style-name="T10">(</text:span><text:span text:style-name="T11">__FILE__</text:span><text:span text:style-name="T10">,</text:span> <text:span text:style-name="T11">__LINE__</text:span><text:span text:style-name="T10">);</text:span></text:p>
      <text:p text:style-name="Code"><text:span text:style-name="T9"><text:tab/><text:tab/><text:tab/>return</text:span> <text:span text:style-name="T11">false</text:span><text:span text:style-name="T10">;</text:span></text:p>
      <text:p text:style-name="Code"><text:tab/><text:tab/>}</text:p>
      <text:p text:style-name="Code"><text:span text:style-name="T9"><text:tab/><text:tab/>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4">method</text:span><text:span text:style-name="T10">)</text:span> <text:span text:style-name="T10">{</text:span></text:p>
      <text:p text:style-name="Code"><text:span text:style-name="T10"><text:tab/><text:tab/><text:tab/>$</text:span><text:span text:style-name="T11">this</text:span><text:span text:style-name="T10">-&gt;</text:span><text:span text:style-name="T15">renderJsonMethodNotAllowed</text:span><text:span text:style-name="T10">(</text:span><text:span text:style-name="T11">__FILE__</text:span><text:span text:style-name="T10">,</text:span> <text:span text:style-name="T11">__LINE__</text:span><text:span text:style-name="T10">);</text:span></text:p>
      <text:p text:style-name="Code"><text:span text:style-name="T9"><text:tab/><text:tab/><text:tab/>return</text:span> <text:span text:style-name="T11">false</text:span><text:span text:style-name="T10">;</text:span></text:p>
      <text:p text:style-name="Code"><text:tab/><text:tab/>}</text:p>
      <text:p text:style-name="Code"><text:span text:style-name="T9"><text:tab/><text:tab/>return</text:span> <text:span text:style-name="T11">true</text:span><text:span text:style-name="T10">;</text:span></text:p>
      <text:p text:style-name="Code"><text:tab/>}</text:p>
      <text:p text:style-name="Code">}</text:p>
      <text:h text:style-name="P13" text:outline-level="2">Les DataHelpers</text:h>
      <text:p text:style-name="P14">Ils héritent tous de Data</text:p>
      <text:p text:style-name="Code">&lt;?php</text:p>
      <text:p text:style-name="Code"><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models</text:span><text:span text:style-name="T10">;</text:span></text:p>
      <text:p text:style-name="Code"/>
      <text:p text:style-name="Code"><text:span text:style-name="T9">use</text:span> <text:span text:style-name="T12">PDO</text:span><text:span text:style-name="T10">;</text:span></text:p>
      <text:p text:style-name="Code"><text:span text:style-name="T9">use</text:span> <text:span text:style-name="T12">Throwable</text:span><text:span text:style-name="T10">;</text:span></text:p>
      <text:p text:style-name="Code"/>
      <text:p text:style-name="Code"><text:span text:style-name="T9">use</text:span> app<text:span text:style-name="T10">\</text:span>enums<text:span text:style-name="T10">\</text:span><text:span text:style-name="T12">ApplicationError</text:span><text:span text:style-name="T10">;</text:span></text:p>
      <text:p text:style-name="Code"><text:span text:style-name="T9">use</text:span> app<text:span text:style-name="T10">\</text:span>helpers<text:span text:style-name="T10">\</text:span><text:span text:style-name="T12">Application</text:span><text:span text:style-name="T10">;</text:span></text:p>
      <text:p text:style-name="Code"/>
      <text:p text:style-name="Code"><text:span text:style-name="T14">class</text:span> <text:span text:style-name="T12">AttributeDataHelper</text:span> <text:span text:style-name="T9">extends</text:span> <text:span text:style-name="T12">Data</text:span></text:p>
      <text:p text:style-name="Code">{</text:p>
      <text:p text:style-name="Code"><text:span text:style-name="T9"><text:tab/>public</text:span> <text:span text:style-name="T14">function</text:span> <text:span text:style-name="T15">__construct</text:span><text:span text:style-name="T10">(</text:span><text:span text:style-name="T12">Application</text:span> <text:span text:style-name="T10">$</text:span><text:span text:style-name="T14">application</text:span><text:span text:style-name="T10">)</text:span></text:p>
      <text:p text:style-name="Code"><text:tab/>{</text:p>
      <text:p text:style-name="Code"><text:span text:style-name="T14"><text:tab/><text:tab/>parent</text:span><text:span text:style-name="T10">::</text:span><text:span text:style-name="T15">__construct</text:span><text:span text:style-name="T10">($</text:span><text:span text:style-name="T14">application</text:span><text:span text:style-name="T10">);</text:span></text:p>
      <text:p text:style-name="Code"><text:tab/>}</text:p>
      <text:h text:style-name="Heading_20_3" text:outline-level="3">Data</text:h>
      <text:p text:style-name="Code">&lt;?php</text:p>
      <text:p text:style-name="Code"/>
      <text:p text:style-name="Code"><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models</text:span><text:span text:style-name="T10">;</text:span></text:p>
      <text:p text:style-name="Code"><text:soft-page-break/></text:p>
      <text:p text:style-name="Code"><text:span text:style-name="T9">use</text:span> <text:span text:style-name="T12">InvalidArgumentException</text:span><text:span text:style-name="T10">;</text:span></text:p>
      <text:p text:style-name="Code"><text:span text:style-name="T9">use</text:span> <text:span text:style-name="T12">PDO</text:span><text:span text:style-name="T10">;</text:span></text:p>
      <text:p text:style-name="Code"><text:span text:style-name="T9">use</text:span> <text:span text:style-name="T12">PDOException</text:span><text:span text:style-name="T10">;</text:span></text:p>
      <text:p text:style-name="Code"/>
      <text:p text:style-name="Code"><text:span text:style-name="T9">use</text:span> app<text:span text:style-name="T10">\</text:span>enums<text:span text:style-name="T10">\</text:span><text:span text:style-name="T12">ApplicationError</text:span><text:span text:style-name="T10">;</text:span></text:p>
      <text:p text:style-name="Code"><text:span text:style-name="T9">use</text:span> app<text:span text:style-name="T10">\</text:span>exceptions<text:span text:style-name="T10">\</text:span><text:span text:style-name="T12">SqliteTableException</text:span><text:span text:style-name="T10">;</text:span></text:p>
      <text:p text:style-name="Code"><text:span text:style-name="T9">use</text:span> app<text:span text:style-name="T10">\</text:span>helpers<text:span text:style-name="T10">\</text:span><text:span text:style-name="T12">Application</text:span><text:span text:style-name="T10">;</text:span></text:p>
      <text:p text:style-name="Code"/>
      <text:p text:style-name="Code"><text:span text:style-name="T9">abstract</text:span> <text:span text:style-name="T14">class</text:span> <text:span text:style-name="T12">Data</text:span></text:p>
      <text:p text:style-name="Code">{</text:p>
      <text:p text:style-name="Code"><text:span text:style-name="T9">protected</text:span> <text:span text:style-name="T12">PDO</text:span> <text:span text:style-name="T10">$</text:span><text:span text:style-name="T14">pdo</text:span><text:span text:style-name="T10">;</text:span></text:p>
      <text:p text:style-name="Code"><text:span text:style-name="T9">protected</text:span> <text:span text:style-name="T12">PDO</text:span> <text:span text:style-name="T10">$</text:span><text:span text:style-name="T14">pdoForLog</text:span><text:span text:style-name="T10">;</text:span></text:p>
      <text:p text:style-name="Code"><text:span text:style-name="T9">protected</text:span> <text:span text:style-name="T10">$</text:span><text:span text:style-name="T14">fluent</text:span><text:span text:style-name="T10">;</text:span></text:p>
      <text:p text:style-name="Code"><text:span text:style-name="T9">protected</text:span> <text:span text:style-name="T10">$</text:span><text:span text:style-name="T14">fluentForLog</text:span><text:span text:style-name="T10">;</text:span></text:p>
      <text:p text:style-name="Code"><text:span text:style-name="T9">private</text:span> <text:span text:style-name="T9">array</text:span> <text:span text:style-name="T10">$</text:span><text:span text:style-name="T14">tables</text:span><text:span text:style-name="T10">;</text:span></text:p>
      <text:p text:style-name="Code"><text:span text:style-name="T9">private</text:span> <text:span text:style-name="T9">static</text:span> <text:span text:style-name="T10">?</text:span><text:span text:style-name="T9">array</text:span> <text:span text:style-name="T10">$</text:span><text:span text:style-name="T14">cachedTables</text:span> <text:span text:style-name="T10">=</text:span> <text:span text:style-name="T11">null</text:span><text:span text:style-name="T10">;</text:span></text:p>
      <text:p text:style-name="Code"/>
      <text:p text:style-name="Code"><text:span text:style-name="T9">public</text:span> <text:span text:style-name="T14">function</text:span> <text:span text:style-name="T15">__construct</text:span><text:span text:style-name="T10">(</text:span><text:span text:style-name="T9">protected</text:span> <text:span text:style-name="T12">Application</text:span> <text:span text:style-name="T10">$</text:span><text:span text:style-name="T14">application</text:span><text:span text:style-name="T10">)</text:span></text:p>
      <text:p text:style-name="Code">{</text:p>
      <text:p text:style-name="Code"><text:span text:style-name="T10">$</text:span><text:span text:style-name="T11">this</text:span><text:span text:style-name="T10">-&gt;</text:span><text:span text:style-name="T14">pdo</text:span> <text:span text:style-name="T10">=</text:span> <text:span text:style-name="T10">$</text:span><text:span text:style-name="T14">application</text:span><text:span text:style-name="T10">-&gt;</text:span><text:span text:style-name="T15">getPdo</text:span><text:span text:style-name="T10">();</text:span></text:p>
      <text:p text:style-name="Code"><text:span text:style-name="T10">$</text:span><text:span text:style-name="T11">this</text:span><text:span text:style-name="T10">-&gt;</text:span><text:span text:style-name="T14">pdoForLog</text:span> <text:span text:style-name="T10">=</text:span> <text:span text:style-name="T10">$</text:span><text:span text:style-name="T14">application</text:span><text:span text:style-name="T10">-&gt;</text:span><text:span text:style-name="T15">getPdoForLog</text:span><text:span text:style-name="T10">();</text:span></text:p>
      <text:p text:style-name="Code"><text:span text:style-name="T10">$</text:span><text:span text:style-name="T11">this</text:span><text:span text:style-name="T10">-&gt;</text:span><text:span text:style-name="T14">fluent</text:span> <text:span text:style-name="T10">=</text:span> <text:span text:style-name="T9">new</text:span> <text:span text:style-name="T10">\</text:span>Envms<text:span text:style-name="T10">\</text:span>FluentPDO<text:span text:style-name="T10">\</text:span><text:span text:style-name="T12">Query</text:span><text:span text:style-name="T10">($</text:span><text:span text:style-name="T11">this</text:span><text:span text:style-name="T10">-&gt;</text:span><text:span text:style-name="T14">pdo</text:span><text:span text:style-name="T10">);</text:span></text:p>
      <text:p text:style-name="Code"><text:span text:style-name="T10">$</text:span><text:span text:style-name="T11">this</text:span><text:span text:style-name="T10">-&gt;</text:span><text:span text:style-name="T14">fluentForLog</text:span> <text:span text:style-name="T10">=</text:span> <text:span text:style-name="T9">new</text:span> <text:span text:style-name="T10">\</text:span>Envms<text:span text:style-name="T10">\</text:span>FluentPDO<text:span text:style-name="T10">\</text:span><text:span text:style-name="T12">Query</text:span><text:span text:style-name="T10">($</text:span><text:span text:style-name="T11">this</text:span><text:span text:style-name="T10">-&gt;</text:span><text:span text:style-name="T14">pdoForLog</text:span><text:span text:style-name="T10">);</text:span></text:p>
      <text:p text:style-name="Code"><text:span text:style-name="T14">self</text:span><text:span text:style-name="T10">::$</text:span><text:span text:style-name="T14">cachedTables</text:span> <text:span text:style-name="T10">??=</text:span> <text:span text:style-name="T10">$</text:span><text:span text:style-name="T11">this</text:span><text:span text:style-name="T10">-&gt;</text:span><text:span text:style-name="T15">getTables</text:span><text:span text:style-name="T10">();</text:span></text:p>
      <text:p text:style-name="Code"><text:span text:style-name="T10">$</text:span><text:span text:style-name="T11">this</text:span><text:span text:style-name="T10">-&gt;</text:span><text:span text:style-name="T14">tables</text:span> <text:span text:style-name="T10">=</text:span> <text:span text:style-name="T14">self</text:span><text:span text:style-name="T10">::$</text:span><text:span text:style-name="T14">cachedTables</text:span><text:span text:style-name="T10">;</text:span></text:p>
      <text:p text:style-name="Code">}</text:p>
      <text:p text:style-name="Code"/>
      <text:p text:style-name="Code">#region Protected methods</text:p>
      <text:p text:style-name="Code"><text:span text:style-name="T9">protected</text:span> <text:span text:style-name="T14">function</text:span> <text:span text:style-name="T15">getCheckValues</text:span><text:span text:style-name="T10">($</text:span><text:span text:style-name="T14">table</text:span><text:span text:style-name="T10">,</text:span> <text:span text:style-name="T10">$</text:span><text:span text:style-name="T14">column</text:span><text:span text:style-name="T10">)</text:span></text:p>
      <text:p text:style-name="Code">{</text:p>
      <text:p text:style-name="Code"><text:span text:style-name="T10">$</text:span><text:span text:style-name="T14">sql</text:span> <text:span text:style-name="T10">=</text:span> <text:span text:style-name="T10">"</text:span><text:span text:style-name="T9">SELECT</text:span><text:span text:style-name="T16"> </text:span><text:span text:style-name="T9">sql</text:span><text:span text:style-name="T16"> </text:span><text:span text:style-name="T9">FROM</text:span><text:span text:style-name="T16"> sqlite_master </text:span><text:span text:style-name="T9">WHERE</text:span><text:span text:style-name="T16"> </text:span><text:span text:style-name="T9">type</text:span><text:span text:style-name="T10">=</text:span><text:span text:style-name="T16">'table' </text:span><text:span text:style-name="T9">AND</text:span><text:span text:style-name="T16"> </text:span><text:span text:style-name="T9">name</text:span><text:span text:style-name="T10">=</text:span><text:span text:style-name="T16">?</text:span><text:span text:style-name="T10">";</text:span></text:p>
      <text:p text:style-name="Code"><text:span text:style-name="T10">$</text:span><text:span text:style-name="T14">tableDef</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tableDef</text:span><text:span text:style-name="T10">-&gt;</text:span><text:span text:style-name="T15">execute</text:span><text:span text:style-name="T10">([$</text:span><text:span text:style-name="T14">table</text:span><text:span text:style-name="T10">]);</text:span></text:p>
      <text:p text:style-name="Code"><text:span text:style-name="T10">$</text:span><text:span text:style-name="T14">row</text:span> <text:span text:style-name="T10">=</text:span> <text:span text:style-name="T10">$</text:span><text:span text:style-name="T14">tableDef</text:span><text:span text:style-name="T10">-&gt;</text:span><text:span text:style-name="T15">fetch</text:span><text:span text:style-name="T10">(</text:span><text:span text:style-name="T12">PDO</text:span><text:span text:style-name="T10">::</text:span><text:span text:style-name="T11">FETCH_ASSOC</text:span><text:span text:style-name="T10">);</text:span></text:p>
      <text:p text:style-name="Code"/>
      <text:p text:style-name="Code"><text:span text:style-name="T9">if</text:span> <text:span text:style-name="T10">(!$</text:span><text:span text:style-name="T14">row</text:span><text:span text:style-name="T10">)</text:span> <text:span text:style-name="T9">return</text:span> <text:span text:style-name="T10">[];</text:span></text:p>
      <text:p text:style-name="Code"/>
      <text:p text:style-name="Code"><text:span text:style-name="T10">$</text:span><text:span text:style-name="T14">sqlText</text:span> <text:span text:style-name="T10">=</text:span> <text:span text:style-name="T10">$</text:span><text:span text:style-name="T14">row</text:span><text:span text:style-name="T10">['</text:span><text:span text:style-name="T16">sql</text:span><text:span text:style-name="T10">'];</text:span></text:p>
      <text:p text:style-name="Code"><text:span text:style-name="T9">if</text:span> <text:span text:style-name="T10">(</text:span><text:span text:style-name="T15">preg_match</text:span><text:span text:style-name="T10">("/\"$</text:span><text:span text:style-name="T14">column</text:span><text:span text:style-name="T10">\"[</text:span><text:span text:style-name="T9">^</text:span><text:span text:style-name="T10">\n]*</text:span><text:span text:style-name="T9">CHECK\s</text:span><text:span text:style-name="T10">*</text:span><text:span text:style-name="T9">\(\s</text:span><text:span text:style-name="T10">*\"$</text:span><text:span text:style-name="T14">column</text:span><text:span text:style-name="T10">\"</text:span><text:span text:style-name="T9">\s</text:span><text:span text:style-name="T10">+</text:span><text:span text:style-name="T9">IN\s</text:span><text:span text:style-name="T10">*</text:span><text:span text:style-name="T9">\((</text:span><text:span text:style-name="T10">[</text:span><text:span text:style-name="T9">^)</text:span><text:span text:style-name="T10">]+</text:span><text:span text:style-name="T9">)\)\)</text:span><text:span text:style-name="T10">/i",</text:span> <text:span text:style-name="T10">$</text:span><text:span text:style-name="T14">sqlText</text:span><text:span text:style-name="T10">,</text:span> <text:span text:style-name="T10">$</text:span><text:span text:style-name="T14">matches</text:span><text:span text:style-name="T10">))</text:span> <text:span text:style-name="T10">{</text:span></text:p>
      <text:p text:style-name="Code"><text:span text:style-name="T10">$</text:span><text:span text:style-name="T14">values</text:span> <text:span text:style-name="T10">=</text:span> <text:span text:style-name="T15">explode</text:span><text:span text:style-name="T10">('</text:span><text:span text:style-name="T16">,</text:span><text:span text:style-name="T10">',</text:span> <text:span text:style-name="T10">$</text:span><text:span text:style-name="T14">matches</text:span><text:span text:style-name="T10">[</text:span><text:span text:style-name="T11">1</text:span><text:span text:style-name="T10">]);</text:span></text:p>
      <text:p text:style-name="Code"><text:span text:style-name="T10">$</text:span><text:span text:style-name="T14">values</text:span> <text:span text:style-name="T10">=</text:span> <text:span text:style-name="T15">array_map</text:span><text:span text:style-name="T10">(</text:span><text:span text:style-name="T14">function</text:span> <text:span text:style-name="T10">($</text:span><text:span text:style-name="T14">v</text:span><text:span text:style-name="T10">)</text:span> <text:span text:style-name="T10">{</text:span></text:p>
      <text:p text:style-name="Code"><text:span text:style-name="T9">return</text:span> <text:span text:style-name="T15">trim</text:span><text:span text:style-name="T10">($</text:span><text:span text:style-name="T14">v</text:span><text:span text:style-name="T10">,</text:span> <text:span text:style-name="T10">"</text:span><text:span text:style-name="T16"> '</text:span><text:span text:style-name="T10">\"");</text:span></text:p>
      <text:p text:style-name="Code"><text:span text:style-name="T10">},</text:span> <text:span text:style-name="T10">$</text:span><text:span text:style-name="T14">values</text:span><text:span text:style-name="T10">);</text:span></text:p>
      <text:p text:style-name="Code"><text:span text:style-name="T9">return</text:span> <text:span text:style-name="T10">$</text:span><text:span text:style-name="T14">values</text:span><text:span text:style-name="T10">;</text:span></text:p>
      <text:p text:style-name="Code">}</text:p>
      <text:p text:style-name="Code"/>
      <text:p text:style-name="Code"><text:span text:style-name="T9">return</text:span> <text:span text:style-name="T10">[];</text:span></text:p>
      <text:p text:style-name="Code">}</text:p>
      <text:p text:style-name="Code"/>
      <text:p text:style-name="Code"><text:span text:style-name="T9">protected</text:span> <text:span text:style-name="T14">function</text:span> <text:span text:style-name="T15">validateTableName</text:span><text:span text:style-name="T10">(</text:span><text:span text:style-name="T9">string</text:span> <text:span text:style-name="T10">$</text:span><text:span text:style-name="T14">table</text:span><text:span text:style-name="T10">):</text:span> <text:span text:style-name="T9">void</text:span></text:p>
      <text:p text:style-name="Code">{</text:p>
      <text:p text:style-name="Code"><text:span text:style-name="T9">if</text:span> <text:span text:style-name="T10">(</text:span><text:span text:style-name="T15">strlen</text:span><text:span text:style-name="T10">($</text:span><text:span text:style-name="T14">table</text:span><text:span text:style-name="T10">)</text:span> <text:span text:style-name="T10">&gt;</text:span> <text:span text:style-name="T11">64</text:span><text:span text:style-name="T10">)</text:span> <text:span text:style-name="T9">throw</text:span> <text:span text:style-name="T9">new</text:span> <text:span text:style-name="T12">SqliteTableException</text:span><text:span text:style-name="T10">('</text:span><text:span text:style-name="T16">Table name too long (max 64)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Code"><text:span text:style-name="T9">if</text:span> <text:span text:style-name="T10">(!</text:span><text:span text:style-name="T15">preg_match</text:span><text:span text:style-name="T10">('/^[</text:span><text:span text:style-name="T9">a-zA-Z0-9_</text:span><text:span text:style-name="T10">]+$/',</text:span> <text:span text:style-name="T10">$</text:span><text:span text:style-name="T14">table</text:span><text:span text:style-name="T10">))</text:span> <text:span text:style-name="T9">throw</text:span> <text:span text:style-name="T9">new</text:span> <text:span text:style-name="T12">SqliteTableException</text:span><text:span text:style-name="T10">('</text:span><text:span text:style-name="T16">Invalid table name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Code"><text:soft-page-break/><text:span text:style-name="T9">if</text:span> <text:span text:style-name="T10">(!</text:span><text:span text:style-name="T15">in_array</text:span><text:span text:style-name="T10">($</text:span><text:span text:style-name="T14">table</text:span><text:span text:style-name="T10">,</text:span> <text:span text:style-name="T10">$</text:span><text:span text:style-name="T11">this</text:span><text:span text:style-name="T10">-&gt;</text:span><text:span text:style-name="T14">tables</text:span><text:span text:style-name="T10">))</text:span> <text:span text:style-name="T9">throw</text:span> <text:span text:style-name="T9">new</text:span> <text:span text:style-name="T12">SqliteTableException</text:span><text:span text:style-name="T10">("</text:span><text:span text:style-name="T16">Table '</text:span><text:span text:style-name="T10">$</text:span><text:span text:style-name="T14">table</text:span><text:span text:style-name="T16">' not found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Code">}</text:p>
      <text:p text:style-name="Code"/>
      <text:p text:style-name="Code">#region Public methods</text:p>
      <text:p text:style-name="Code"><text:span text:style-name="T9">public</text:span> <text:span text:style-name="T14">function</text:span> <text:span text:style-name="T15">delete</text:span><text:span text:style-name="T10">(</text:span><text:span text:style-name="T9">string</text:span> <text:span text:style-name="T10">$</text:span><text:span text:style-name="T14">table</text:span><text:span text:style-name="T10">,</text:span> <text:span text:style-name="T9">array</text:span> <text:span text:style-name="T10">$</text:span><text:span text:style-name="T14">where</text:span><text:span text:style-name="T10">):</text:span> <text:span text:style-name="T9">int</text:span></text:p>
      <text:p text:style-name="Code">{</text:p>
      <text:p text:style-name="Code"><text:span text:style-name="T10">$</text:span><text:span text:style-name="T11">this</text:span><text:span text:style-name="T10">-&gt;</text:span><text:span text:style-name="T15">validateTableName</text:span><text:span text:style-name="T10">($</text:span><text:span text:style-name="T14">table</text:span><text:span text:style-name="T10">);</text:span></text:p>
      <text:p text:style-name="Code"><text:span text:style-name="T9">try</text:span> <text:span text:style-name="T10">{</text:span></text:p>
      <text:p text:style-name="Code"><text:span text:style-name="T9">if</text:span> <text:span text:style-name="T10">(</text:span><text:span text:style-name="T15">empty</text:span><text:span text:style-name="T10">($</text:span><text:span text:style-name="T14">where</text:span><text:span text:style-name="T10">))</text:span> <text:span text:style-name="T9">throw</text:span> <text:span text:style-name="T9">new</text:span> <text:span text:style-name="T12">PDOException</text:span><text:span text:style-name="T10">("</text:span><text:span text:style-name="T9">DELETE</text:span><text:span text:style-name="T16"> requires </text:span><text:span text:style-name="T9">WHERE</text:span><text:span text:style-name="T16"> conditions</text:span><text:span text:style-name="T10">");</text:span></text:p>
      <text:p text:style-name="Code"><text:span text:style-name="T10">$</text:span><text:span text:style-name="T14">conditions</text:span> <text:span text:style-name="T10">=</text:span> <text:span text:style-name="T10">[];</text:span></text:p>
      <text:p text:style-name="Code"><text:span text:style-name="T10">$</text:span><text:span text:style-name="T14">params</text:span> <text:span text:style-name="T10">=</text:span> <text:span text:style-name="T10">[];</text:span></text:p>
      <text:p text:style-name="Code"><text:span text:style-name="T9">foreach</text:span> <text:span text:style-name="T10">($</text:span><text:span text:style-name="T14">where</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10">$</text:span><text:span text:style-name="T14">conditions</text:span><text:span text:style-name="T10">[]</text:span> <text:span text:style-name="T10">=</text:span> <text:span text:style-name="T10">"{$</text:span><text:span text:style-name="T14">field</text:span><text:span text:style-name="T10">}</text:span><text:span text:style-name="T16"> = :</text:span><text:span text:style-name="T10">{$</text:span><text:span text:style-name="T14">field</text:span><text:span text:style-name="T10">}";</text:span></text:p>
      <text:p text:style-name="Code"><text:span text:style-name="T10">$</text:span><text:span text:style-name="T14">params</text:span><text:span text:style-name="T10">["</text:span><text:span text:style-name="T16">:</text:span><text:span text:style-name="T10">{$</text:span><text:span text:style-name="T14">field</text:span><text:span text:style-name="T10">}"]</text:span> <text:span text:style-name="T10">=</text:span> <text:span text:style-name="T10">$</text:span><text:span text:style-name="T14">value</text:span><text:span text:style-name="T10">;</text:span></text:p>
      <text:p text:style-name="Code">}</text:p>
      <text:p text:style-name="Code"/>
      <text:p text:style-name="Code"><text:span text:style-name="T10">$</text:span><text:span text:style-name="T14">sql</text:span> <text:span text:style-name="T10">=</text:span> <text:span text:style-name="T10">"</text:span><text:span text:style-name="T9">DELETE</text:span><text:span text:style-name="T16"> </text:span><text:span text:style-name="T9">FROM</text:span><text:span text:style-name="T16"> </text:span><text:span text:style-name="T10">\"{$</text:span><text:span text:style-name="T14">table</text:span><text:span text:style-name="T10">}\"</text:span><text:span text:style-name="T16"> </text:span><text:span text:style-name="T9">WHERE</text:span><text:span text:style-name="T16"> </text:span><text:span text:style-name="T10">"</text:span> <text:span text:style-name="T10">.</text:span> <text:span text:style-name="T15">implode</text:span><text:span text:style-name="T10">(' </text:span><text:span text:style-name="T9">AND</text:span><text:span text:style-name="T16"> </text:span><text:span text:style-name="T10">',</text:span> <text:span text:style-name="T10">$</text:span><text:span text:style-name="T14">conditions</text:span><text:span text:style-name="T10">);</text:span></text:p>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stmt</text:span><text:span text:style-name="T10">-&gt;</text:span><text:span text:style-name="T15">execute</text:span><text:span text:style-name="T10">($</text:span><text:span text:style-name="T14">params</text:span><text:span text:style-name="T10">);</text:span></text:p>
      <text:p text:style-name="Code"><text:span text:style-name="T9">return</text:span> <text:span text:style-name="T10">$</text:span><text:span text:style-name="T14">stmt</text:span><text:span text:style-name="T10">-&gt;</text:span><text:span text:style-name="T15">rowCount</text:span><text:span text:style-name="T10">();</text:span></text:p>
      <text:p text:style-name="Code"><text:span text:style-name="T10">}</text:span> <text:span text:style-name="T9">catch</text:span> <text:span text:style-name="T10">(</text:span><text:span text:style-name="T12">PDOException</text:span> <text:span text:style-name="T10">$</text:span><text:span text:style-name="T14">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p>
      <text:p text:style-name="Code"><text:span text:style-name="T12">ApplicationError</text:span><text:span text:style-name="T10">::</text:span><text:span text:style-name="T11">Error</text:span><text:span text:style-name="T10">,</text:span></text:p>
      <text:p text:style-name="Code"><text:span text:style-name="T10">'</text:span><text:span text:style-name="T16">Database error: </text:span><text:span text:style-name="T10">'</text:span> <text:span text:style-name="T10">.</text:span> <text:span text:style-name="T10">$</text:span><text:span text:style-name="T14">e</text:span><text:span text:style-name="T10">-&gt;</text:span><text:span text:style-name="T15">getMessage</text:span><text:span text:style-name="T10">()</text:span> <text:span text:style-name="T10">.</text:span> <text:span text:style-name="T10">'</text:span><text:span text:style-name="T16">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p>
      <text:p text:style-name="Code">);</text:p>
      <text:p text:style-name="Code"><text:span text:style-name="T9">throw</text:span> <text:span text:style-name="T10">$</text:span><text:span text:style-name="T14">e</text:span><text:span text:style-name="T10">;</text:span></text:p>
      <text:p text:style-name="Code">}</text:p>
      <text:p text:style-name="Code">}</text:p>
      <text:p text:style-name="Code"/>
      <text:p text:style-name="Code"><text:span text:style-name="T9">public</text:span> <text:span text:style-name="T14">function</text:span> <text:span text:style-name="T15">get</text:span><text:span text:style-name="T10">(</text:span><text:span text:style-name="T9">string</text:span> <text:span text:style-name="T10">$</text:span><text:span text:style-name="T14">table</text:span><text:span text:style-name="T10">,</text:span> <text:span text:style-name="T9">array</text:span> <text:span text:style-name="T10">$</text:span><text:span text:style-name="T14">where</text:span> <text:span text:style-name="T10">=</text:span> <text:span text:style-name="T10">[],</text:span> <text:span text:style-name="T10">$</text:span><text:span text:style-name="T14">fields</text:span> <text:span text:style-name="T10">=</text:span> <text:span text:style-name="T10">'</text:span><text:span text:style-name="T16">*</text:span><text:span text:style-name="T10">'):</text:span> <text:span text:style-name="T9">object</text:span><text:span text:style-name="T10">|</text:span><text:span text:style-name="T9">false</text:span></text:p>
      <text:p text:style-name="Code">{</text:p>
      <text:p text:style-name="Code"><text:span text:style-name="T10">$</text:span><text:span text:style-name="T11">this</text:span><text:span text:style-name="T10">-&gt;</text:span><text:span text:style-name="T15">validateTableName</text:span><text:span text:style-name="T10">($</text:span><text:span text:style-name="T14">table</text:span><text:span text:style-name="T10">);</text:span></text:p>
      <text:p text:style-name="Code"><text:span text:style-name="T9">try</text:span> <text:span text:style-name="T10">{</text:span></text:p>
      <text:p text:style-name="Code"><text:span text:style-name="T9">if</text:span> <text:span text:style-name="T10">(</text:span><text:span text:style-name="T15">is_array</text:span><text:span text:style-name="T10">($</text:span><text:span text:style-name="T14">fields</text:span><text:span text:style-name="T10">))</text:span> <text:span text:style-name="T10">$</text:span><text:span text:style-name="T14">fieldsStr</text:span> <text:span text:style-name="T10">=</text:span> <text:span text:style-name="T15">implode</text:span><text:span text:style-name="T10">('</text:span><text:span text:style-name="T16">, </text:span><text:span text:style-name="T10">',</text:span> <text:span text:style-name="T10">$</text:span><text:span text:style-name="T14">fields</text:span><text:span text:style-name="T10">);</text:span></text:p>
      <text:p text:style-name="Code"><text:span text:style-name="T9">else</text:span> <text:span text:style-name="T10">$</text:span><text:span text:style-name="T14">fieldsStr</text:span> <text:span text:style-name="T10">=</text:span> <text:span text:style-name="T10">$</text:span><text:span text:style-name="T14">fields</text:span><text:span text:style-name="T10">;</text:span></text:p>
      <text:p text:style-name="Code"/>
      <text:p text:style-name="Code"><text:span text:style-name="T10">$</text:span><text:span text:style-name="T14">sql</text:span> <text:span text:style-name="T10">=</text:span> <text:span text:style-name="T10">"</text:span><text:span text:style-name="T9">SELECT</text:span><text:span text:style-name="T16"> </text:span><text:span text:style-name="T10">{$</text:span><text:span text:style-name="T14">fieldsStr</text:span><text:span text:style-name="T10">}</text:span><text:span text:style-name="T16"> </text:span><text:span text:style-name="T9">FROM</text:span><text:span text:style-name="T16"> </text:span><text:span text:style-name="T10">\"{$</text:span><text:span text:style-name="T14">table</text:span><text:span text:style-name="T10">}\"";</text:span></text:p>
      <text:p text:style-name="Code"><text:span text:style-name="T10">$</text:span><text:span text:style-name="T14">params</text:span> <text:span text:style-name="T10">=</text:span> <text:span text:style-name="T10">[];</text:span></text:p>
      <text:p text:style-name="Code"><text:span text:style-name="T9">if</text:span> <text:span text:style-name="T10">(!</text:span><text:span text:style-name="T15">empty</text:span><text:span text:style-name="T10">($</text:span><text:span text:style-name="T14">where</text:span><text:span text:style-name="T10">))</text:span> <text:span text:style-name="T10">{</text:span></text:p>
      <text:p text:style-name="Code"><text:span text:style-name="T10">$</text:span><text:span text:style-name="T14">conditions</text:span> <text:span text:style-name="T10">=</text:span> <text:span text:style-name="T10">[];</text:span></text:p>
      <text:p text:style-name="Code"><text:span text:style-name="T9">foreach</text:span> <text:span text:style-name="T10">($</text:span><text:span text:style-name="T14">where</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9">if</text:span> <text:span text:style-name="T10">(</text:span><text:span text:style-name="T15">strtolower</text:span><text:span text:style-name="T10">($</text:span><text:span text:style-name="T14">field</text:span><text:span text:style-name="T10">)</text:span> <text:span text:style-name="T10">===</text:span> <text:span text:style-name="T10">'</text:span><text:span text:style-name="T16">email</text:span><text:span text:style-name="T10">')</text:span> <text:span text:style-name="T10">$</text:span><text:span text:style-name="T14">conditions</text:span><text:span text:style-name="T10">[]</text:span> <text:span text:style-name="T10">=</text:span> <text:span text:style-name="T10">"{$</text:span><text:span text:style-name="T14">field</text:span><text:span text:style-name="T10">}</text:span><text:span text:style-name="T16"> COLLATE NOCASE = :</text:span><text:span text:style-name="T10">{$</text:span><text:span text:style-name="T14">field</text:span><text:span text:style-name="T10">}";</text:span></text:p>
      <text:p text:style-name="Code"><text:span text:style-name="T9">else</text:span> <text:span text:style-name="T10">$</text:span><text:span text:style-name="T14">conditions</text:span><text:span text:style-name="T10">[]</text:span> <text:span text:style-name="T10">=</text:span> <text:span text:style-name="T10">"{$</text:span><text:span text:style-name="T14">field</text:span><text:span text:style-name="T10">}</text:span><text:span text:style-name="T16"> = :</text:span><text:span text:style-name="T10">{$</text:span><text:span text:style-name="T14">field</text:span><text:span text:style-name="T10">}";</text:span></text:p>
      <text:p text:style-name="Code"><text:span text:style-name="T10">$</text:span><text:span text:style-name="T14">params</text:span><text:span text:style-name="T10">["</text:span><text:span text:style-name="T16">:</text:span><text:span text:style-name="T10">{$</text:span><text:span text:style-name="T14">field</text:span><text:span text:style-name="T10">}"]</text:span> <text:span text:style-name="T10">=</text:span> <text:span text:style-name="T10">$</text:span><text:span text:style-name="T14">value</text:span><text:span text:style-name="T10">;</text:span></text:p>
      <text:p text:style-name="Code">}</text:p>
      <text:p text:style-name="Code"><text:span text:style-name="T10">$</text:span><text:span text:style-name="T14">sql</text:span> <text:span text:style-name="T10">.=</text:span> <text:span text:style-name="T10">"</text:span><text:span text:style-name="T16"> WHERE </text:span><text:span text:style-name="T10">"</text:span> <text:span text:style-name="T10">.</text:span> <text:span text:style-name="T15">implode</text:span><text:span text:style-name="T10">(' </text:span><text:span text:style-name="T9">AND</text:span><text:span text:style-name="T16"> </text:span><text:span text:style-name="T10">',</text:span> <text:span text:style-name="T10">$</text:span><text:span text:style-name="T14">conditions</text:span><text:span text:style-name="T10">);</text:span></text:p>
      <text:p text:style-name="Code"><text:span text:style-name="T10">$</text:span><text:span text:style-name="T14">sql</text:span> <text:span text:style-name="T10">.=</text:span> <text:span text:style-name="T10">"</text:span><text:span text:style-name="T16"> LIMIT 1</text:span><text:span text:style-name="T10">";</text:span></text:p>
      <text:p text:style-name="Code">}</text:p>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stmt</text:span><text:span text:style-name="T10">-&gt;</text:span><text:span text:style-name="T15">execute</text:span><text:span text:style-name="T10">($</text:span><text:span text:style-name="T14">params</text:span><text:span text:style-name="T10">);</text:span></text:p>
      <text:p text:style-name="Code"><text:span text:style-name="T9">return</text:span> <text:span text:style-name="T10">$</text:span><text:span text:style-name="T14">stmt</text:span><text:span text:style-name="T10">-&gt;</text:span><text:span text:style-name="T15">fetch</text:span><text:span text:style-name="T10">();</text:span></text:p>
      <text:p text:style-name="Code"><text:span text:style-name="T10">}</text:span> <text:span text:style-name="T9">catch</text:span> <text:span text:style-name="T10">(</text:span><text:span text:style-name="T12">PDOException</text:span> <text:span text:style-name="T10">$</text:span><text:span text:style-name="T14">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Error</text:span><text:span text:style-name="T10">,</text:span> <text:span text:style-name="T10">"</text:span><text:span text:style-name="T16">Database error </text:span><text:span text:style-name="T10">{$</text:span><text:span text:style-name="T14">e</text:span><text:span text:style-name="T10">-&gt;</text:span><text:span text:style-name="T15">getMessage</text:span><text:span text:style-name="T10">()}</text:span><text:span text:style-name="T16"> in </text:span><text:span text:style-name="T10">{$</text:span><text:span text:style-name="T14">e</text:span><text:span text:style-name="T10">-&gt;</text:span><text:span text:style-name="T15">getFile</text:span><text:span text:style-name="T10">()}</text:span><text:span text:style-name="T16">:</text:span><text:span text:style-name="T10">{$</text:span><text:span text:style-name="T14">e</text:span><text:span text:style-name="T10">-&gt;</text:span><text:span text:style-name="T15">getLine</text:span><text:span text:style-name="T10">()}</text:span><text:span text:style-name="T16"> with query </text:span><text:span text:style-name="T10">{$</text:span><text:span text:style-name="T14">sql</text:span><text:span text:style-name="T10">}");</text:span></text:p>
      <text:p text:style-name="Code"><text:span text:style-name="T9">throw</text:span> <text:span text:style-name="T10">$</text:span><text:span text:style-name="T14">e</text:span><text:span text:style-name="T10">;</text:span></text:p>
      <text:p text:style-name="Code"><text:soft-page-break/>}</text:p>
      <text:p text:style-name="Code">}</text:p>
      <text:p text:style-name="Code"/>
      <text:p text:style-name="Code"><text:span text:style-name="T9">public</text:span> <text:span text:style-name="T14">function</text:span> <text:span text:style-name="T15">getSetting</text:span><text:span text:style-name="T10">(</text:span><text:span text:style-name="T9">string</text:span> <text:span text:style-name="T10">$</text:span><text:span text:style-name="T14">name</text:span><text:span text:style-name="T10">,</text:span> <text:span text:style-name="T9">string</text:span> <text:span text:style-name="T10">$</text:span><text:span text:style-name="T14">default</text:span><text:span text:style-name="T10">):</text:span> <text:span text:style-name="T9">string</text:span></text:p>
      <text:p text:style-name="Code">{</text:p>
      <text:p text:style-name="Code"><text:span text:style-name="T10">$</text:span><text:span text:style-name="T14">row</text:span> <text:span text:style-name="T10">=</text:span> <text:span text:style-name="T10">$</text:span><text:span text:style-name="T11">this</text:span><text:span text:style-name="T10">-&gt;</text:span><text:span text:style-name="T15">get</text:span><text:span text:style-name="T10">('</text:span><text:span text:style-name="T16">Settings</text:span><text:span text:style-name="T10">',</text:span> <text:span text:style-name="T10">['</text:span><text:span text:style-name="T16">Name</text:span><text:span text:style-name="T10">'</text:span> <text:span text:style-name="T10">=&gt;</text:span> <text:span text:style-name="T10">$</text:span><text:span text:style-name="T14">name</text:span><text:span text:style-name="T10">],</text:span> <text:span text:style-name="T10">'</text:span><text:span text:style-name="T16">Value</text:span><text:span text:style-name="T10">');</text:span></text:p>
      <text:p text:style-name="Code"><text:span text:style-name="T9">return</text:span> <text:span text:style-name="T10">$</text:span><text:span text:style-name="T14">row</text:span> <text:span text:style-name="T10">!==</text:span> <text:span text:style-name="T11">false</text:span> <text:span text:style-name="T10">?</text:span> <text:span text:style-name="T10">$</text:span><text:span text:style-name="T14">row</text:span><text:span text:style-name="T10">-&gt;</text:span><text:span text:style-name="T14">Value</text:span> <text:span text:style-name="T10">:</text:span> <text:span text:style-name="T10">$</text:span><text:span text:style-name="T14">default</text:span><text:span text:style-name="T10">;</text:span></text:p>
      <text:p text:style-name="Code">}</text:p>
      <text:p text:style-name="Code"/>
      <text:p text:style-name="Code"><text:span text:style-name="T9">public</text:span> <text:span text:style-name="T14">function</text:span> <text:span text:style-name="T15">gets</text:span><text:span text:style-name="T10">(</text:span><text:span text:style-name="T9">string</text:span> <text:span text:style-name="T10">$</text:span><text:span text:style-name="T14">table</text:span><text:span text:style-name="T10">,</text:span> <text:span text:style-name="T9">array</text:span> <text:span text:style-name="T10">$</text:span><text:span text:style-name="T14">where</text:span> <text:span text:style-name="T10">=</text:span> <text:span text:style-name="T10">[],</text:span> <text:span text:style-name="T9">string</text:span> <text:span text:style-name="T10">$</text:span><text:span text:style-name="T14">fields</text:span> <text:span text:style-name="T10">=</text:span> <text:span text:style-name="T10">'</text:span><text:span text:style-name="T16">*</text:span><text:span text:style-name="T10">',</text:span> <text:span text:style-name="T9">string</text:span> <text:span text:style-name="T10">$</text:span><text:span text:style-name="T14">orderBy</text:span> <text:span text:style-name="T10">=</text:span> <text:span text:style-name="T10">'',</text:span> <text:span text:style-name="T9">bool</text:span> <text:span text:style-name="T10">$</text:span><text:span text:style-name="T14">keyPair</text:span> <text:span text:style-name="T10">=</text:span> <text:span text:style-name="T11">false</text:span><text:span text:style-name="T10">):</text:span> <text:span text:style-name="T9">array</text:span></text:p>
      <text:p text:style-name="Code">{</text:p>
      <text:p text:style-name="Code"><text:span text:style-name="T10">$</text:span><text:span text:style-name="T11">this</text:span><text:span text:style-name="T10">-&gt;</text:span><text:span text:style-name="T15">validateTableName</text:span><text:span text:style-name="T10">($</text:span><text:span text:style-name="T14">table</text:span><text:span text:style-name="T10">);</text:span></text:p>
      <text:p text:style-name="Code"><text:span text:style-name="T9">try</text:span> <text:span text:style-name="T10">{</text:span></text:p>
      <text:p text:style-name="Code"><text:span text:style-name="T10">$</text:span><text:span text:style-name="T14">firstField</text:span> <text:span text:style-name="T10">=</text:span> <text:span text:style-name="T11">null</text:span><text:span text:style-name="T10">;</text:span></text:p>
      <text:p text:style-name="Code"><text:span text:style-name="T9">if</text:span> <text:span text:style-name="T10">($</text:span><text:span text:style-name="T14">keyPair</text:span><text:span text:style-name="T10">)</text:span> <text:span text:style-name="T10">{</text:span></text:p>
      <text:p text:style-name="Code"><text:span text:style-name="T9">if</text:span> <text:span text:style-name="T10">($</text:span><text:span text:style-name="T14">fields</text:span> <text:span text:style-name="T10">===</text:span> <text:span text:style-name="T10">'</text:span><text:span text:style-name="T16">*</text:span><text:span text:style-name="T10">')</text:span> <text:span text:style-name="T9">throw</text:span> <text:span text:style-name="T9">new</text:span> <text:span text:style-name="T12">InvalidArgumentException</text:span><text:span text:style-name="T10">("</text:span><text:span text:style-name="T16">Cannot use keyPair with fields='*'</text:span><text:span text:style-name="T10">");</text:span></text:p>
      <text:p text:style-name="Code"><text:span text:style-name="T10">$</text:span><text:span text:style-name="T14">fieldParts</text:span> <text:span text:style-name="T10">=</text:span> <text:span text:style-name="T15">array_map</text:span><text:span text:style-name="T10">('</text:span><text:span text:style-name="T16">trim</text:span><text:span text:style-name="T10">',</text:span> <text:span text:style-name="T15">explode</text:span><text:span text:style-name="T10">('</text:span><text:span text:style-name="T16">,</text:span><text:span text:style-name="T10">',</text:span> <text:span text:style-name="T10">$</text:span><text:span text:style-name="T14">fields</text:span><text:span text:style-name="T10">));</text:span></text:p>
      <text:p text:style-name="Code"><text:span text:style-name="T10">$</text:span><text:span text:style-name="T14">firstField</text:span> <text:span text:style-name="T10">=</text:span> <text:span text:style-name="T10">$</text:span><text:span text:style-name="T14">fieldParts</text:span><text:span text:style-name="T10">[</text:span><text:span text:style-name="T11">0</text:span><text:span text:style-name="T10">];</text:span></text:p>
      <text:p text:style-name="Code">}</text:p>
      <text:p text:style-name="Code"><text:span text:style-name="T10">$</text:span><text:span text:style-name="T14">sql</text:span> <text:span text:style-name="T10">=</text:span> <text:span text:style-name="T10">"</text:span><text:span text:style-name="T9">SELECT</text:span><text:span text:style-name="T16"> </text:span><text:span text:style-name="T10">{$</text:span><text:span text:style-name="T14">fields</text:span><text:span text:style-name="T10">}</text:span><text:span text:style-name="T16"> </text:span><text:span text:style-name="T9">FROM</text:span><text:span text:style-name="T16"> </text:span><text:span text:style-name="T10">\"{$</text:span><text:span text:style-name="T14">table</text:span><text:span text:style-name="T10">}\"";</text:span></text:p>
      <text:p text:style-name="Code"><text:span text:style-name="T10">$</text:span><text:span text:style-name="T14">params</text:span> <text:span text:style-name="T10">=</text:span> <text:span text:style-name="T10">[];</text:span></text:p>
      <text:p text:style-name="Code"><text:span text:style-name="T9">if</text:span> <text:span text:style-name="T10">(!</text:span><text:span text:style-name="T15">empty</text:span><text:span text:style-name="T10">($</text:span><text:span text:style-name="T14">where</text:span><text:span text:style-name="T10">))</text:span> <text:span text:style-name="T10">{</text:span></text:p>
      <text:p text:style-name="Code"><text:span text:style-name="T10">$</text:span><text:span text:style-name="T14">conditions</text:span> <text:span text:style-name="T10">=</text:span> <text:span text:style-name="T10">[];</text:span></text:p>
      <text:p text:style-name="Code"><text:span text:style-name="T9">foreach</text:span> <text:span text:style-name="T10">($</text:span><text:span text:style-name="T14">where</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9">if</text:span> <text:span text:style-name="T10">($</text:span><text:span text:style-name="T14">value</text:span> <text:span text:style-name="T10">===</text:span> <text:span text:style-name="T11">null</text:span><text:span text:style-name="T10">)</text:span> <text:span text:style-name="T10">$</text:span><text:span text:style-name="T14">conditions</text:span><text:span text:style-name="T10">[]</text:span> <text:span text:style-name="T10">=</text:span> <text:span text:style-name="T10">"{$</text:span><text:span text:style-name="T14">field</text:span><text:span text:style-name="T10">}";</text:span></text:p>
      <text:p text:style-name="Code"><text:span text:style-name="T9">else</text:span> <text:span text:style-name="T10">{</text:span></text:p>
      <text:p text:style-name="Code"><text:span text:style-name="T9">if</text:span> <text:span text:style-name="T10">(</text:span><text:span text:style-name="T15">strtolower</text:span><text:span text:style-name="T10">($</text:span><text:span text:style-name="T14">field</text:span><text:span text:style-name="T10">)</text:span> <text:span text:style-name="T10">===</text:span> <text:span text:style-name="T10">'</text:span><text:span text:style-name="T16">email</text:span><text:span text:style-name="T10">')</text:span> <text:span text:style-name="T10">$</text:span><text:span text:style-name="T14">conditions</text:span><text:span text:style-name="T10">[]</text:span> <text:span text:style-name="T10">=</text:span> <text:span text:style-name="T10">"{$</text:span><text:span text:style-name="T14">field</text:span><text:span text:style-name="T10">}</text:span><text:span text:style-name="T16"> COLLATE NOCASE = ?</text:span><text:span text:style-name="T10">";</text:span></text:p>
      <text:p text:style-name="Code"><text:span text:style-name="T9">else</text:span> <text:span text:style-name="T10">$</text:span><text:span text:style-name="T14">conditions</text:span><text:span text:style-name="T10">[]</text:span> <text:span text:style-name="T10">=</text:span> <text:span text:style-name="T10">"{$</text:span><text:span text:style-name="T14">field</text:span><text:span text:style-name="T10">}</text:span><text:span text:style-name="T16"> = ?</text:span><text:span text:style-name="T10">";</text:span></text:p>
      <text:p text:style-name="Code"><text:span text:style-name="T10">$</text:span><text:span text:style-name="T14">params</text:span><text:span text:style-name="T10">[]</text:span> <text:span text:style-name="T10">=</text:span> <text:span text:style-name="T10">$</text:span><text:span text:style-name="T14">value</text:span><text:span text:style-name="T10">;</text:span></text:p>
      <text:p text:style-name="Code">}</text:p>
      <text:p text:style-name="Code">}</text:p>
      <text:p text:style-name="Code"><text:span text:style-name="T10">$</text:span><text:span text:style-name="T14">sql</text:span> <text:span text:style-name="T10">.=</text:span> <text:span text:style-name="T10">"</text:span><text:span text:style-name="T16"> WHERE </text:span><text:span text:style-name="T10">"</text:span> <text:span text:style-name="T10">.</text:span> <text:span text:style-name="T15">implode</text:span><text:span text:style-name="T10">(' </text:span><text:span text:style-name="T9">AND</text:span><text:span text:style-name="T16"> </text:span><text:span text:style-name="T10">',</text:span> <text:span text:style-name="T10">$</text:span><text:span text:style-name="T14">conditions</text:span><text:span text:style-name="T10">);</text:span></text:p>
      <text:p text:style-name="Code">}</text:p>
      <text:p text:style-name="Code"><text:span text:style-name="T9">if</text:span> <text:span text:style-name="T10">($</text:span><text:span text:style-name="T14">orderBy</text:span> <text:span text:style-name="T10">!==</text:span> <text:span text:style-name="T10">'')</text:span> <text:span text:style-name="T10">$</text:span><text:span text:style-name="T14">sql</text:span> <text:span text:style-name="T10">.=</text:span> <text:span text:style-name="T10">"</text:span><text:span text:style-name="T16"> ORDER BY </text:span><text:span text:style-name="T10">"</text:span> <text:span text:style-name="T10">.</text:span> <text:span text:style-name="T10">$</text:span><text:span text:style-name="T14">orderBy</text:span><text:span text:style-name="T10">;</text:span></text:p>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stmt</text:span><text:span text:style-name="T10">-&gt;</text:span><text:span text:style-name="T15">execute</text:span><text:span text:style-name="T10">($</text:span><text:span text:style-name="T14">params</text:span><text:span text:style-name="T10">);</text:span></text:p>
      <text:p text:style-name="Code"><text:span text:style-name="T9">if</text:span> <text:span text:style-name="T10">($</text:span><text:span text:style-name="T14">keyPair</text:span><text:span text:style-name="T10">)</text:span> <text:span text:style-name="T10">{</text:span></text:p>
      <text:p text:style-name="Code"><text:span text:style-name="T10">$</text:span><text:span text:style-name="T14">results</text:span> <text:span text:style-name="T10">=</text:span> <text:span text:style-name="T10">$</text:span><text:span text:style-name="T14">stmt</text:span><text:span text:style-name="T10">-&gt;</text:span><text:span text:style-name="T15">fetchAll</text:span><text:span text:style-name="T10">(</text:span><text:span text:style-name="T12">PDO</text:span><text:span text:style-name="T10">::</text:span><text:span text:style-name="T11">FETCH_OBJ</text:span><text:span text:style-name="T10">);</text:span></text:p>
      <text:p text:style-name="Code"><text:span text:style-name="T10">$</text:span><text:span text:style-name="T14">keyPairArray</text:span> <text:span text:style-name="T10">=</text:span> <text:span text:style-name="T10">[];</text:span></text:p>
      <text:p text:style-name="Code"><text:span text:style-name="T9">foreach</text:span> <text:span text:style-name="T10">($</text:span><text:span text:style-name="T14">results</text:span> <text:span text:style-name="T10">as</text:span> <text:span text:style-name="T10">$</text:span><text:span text:style-name="T14">result</text:span><text:span text:style-name="T10">)</text:span> <text:span text:style-name="T10">{</text:span></text:p>
      <text:p text:style-name="Code"><text:span text:style-name="T10">$</text:span><text:span text:style-name="T14">key</text:span> <text:span text:style-name="T10">=</text:span> <text:span text:style-name="T10">$</text:span><text:span text:style-name="T14">result</text:span><text:span text:style-name="T10">-&gt;{$</text:span><text:span text:style-name="T14">firstField</text:span><text:span text:style-name="T10">};</text:span></text:p>
      <text:p text:style-name="Code"><text:span text:style-name="T10">$</text:span><text:span text:style-name="T14">keyPairArray</text:span><text:span text:style-name="T10">[$</text:span><text:span text:style-name="T14">key</text:span><text:span text:style-name="T10">]</text:span> <text:span text:style-name="T10">=</text:span> <text:span text:style-name="T10">$</text:span><text:span text:style-name="T14">result</text:span><text:span text:style-name="T10">;</text:span></text:p>
      <text:p text:style-name="Code">}</text:p>
      <text:p text:style-name="Code"><text:span text:style-name="T9">return</text:span> <text:span text:style-name="T10">$</text:span><text:span text:style-name="T14">keyPairArray</text:span><text:span text:style-name="T10">;</text:span></text:p>
      <text:p text:style-name="Code">}</text:p>
      <text:p text:style-name="Code"><text:span text:style-name="T9">return</text:span> <text:span text:style-name="T10">$</text:span><text:span text:style-name="T14">stmt</text:span><text:span text:style-name="T10">-&gt;</text:span><text:span text:style-name="T15">fetchAll</text:span><text:span text:style-name="T10">(</text:span><text:span text:style-name="T12">PDO</text:span><text:span text:style-name="T10">::</text:span><text:span text:style-name="T11">FETCH_OBJ</text:span><text:span text:style-name="T10">);</text:span></text:p>
      <text:p text:style-name="Code"><text:span text:style-name="T10">}</text:span> <text:span text:style-name="T9">catch</text:span> <text:span text:style-name="T10">(</text:span><text:span text:style-name="T12">PDOException</text:span> <text:span text:style-name="T10">$</text:span><text:span text:style-name="T14">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Error</text:span><text:span text:style-name="T10">,</text:span> <text:span text:style-name="T10">'</text:span><text:span text:style-name="T16">Database error: </text:span><text:span text:style-name="T10">'</text:span> <text:span text:style-name="T10">.</text:span> <text:span text:style-name="T10">$</text:span><text:span text:style-name="T14">e</text:span><text:span text:style-name="T10">-&gt;</text:span><text:span text:style-name="T15">getMessage</text:span><text:span text:style-name="T10">()</text:span> <text:span text:style-name="T10">.</text:span> <text:span text:style-name="T10">'</text:span><text:span text:style-name="T16">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Code"><text:span text:style-name="T9">throw</text:span> <text:span text:style-name="T10">$</text:span><text:span text:style-name="T14">e</text:span><text:span text:style-name="T10">;</text:span></text:p>
      <text:p text:style-name="Code">}</text:p>
      <text:p text:style-name="Code">}</text:p>
      <text:p text:style-name="Code"/>
      <text:p text:style-name="Code"><text:span text:style-name="T9">public</text:span> <text:span text:style-name="T14">function</text:span> <text:span text:style-name="T15">getTables</text:span><text:span text:style-name="T10">():</text:span> <text:span text:style-name="T9">array</text:span></text:p>
      <text:p text:style-name="Code">{</text:p>
      <text:p text:style-name="Code"><text:soft-page-break/><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query</text:span><text:span text:style-name="T10">("</text:span><text:span text:style-name="T9">SELECT</text:span><text:span text:style-name="T16"> </text:span><text:span text:style-name="T9">name</text:span><text:span text:style-name="T16"> </text:span><text:span text:style-name="T9">FROM</text:span><text:span text:style-name="T16"> sqlite_master </text:span><text:span text:style-name="T9">WHERE</text:span><text:span text:style-name="T16"> </text:span><text:span text:style-name="T9">type</text:span><text:span text:style-name="T10">=</text:span><text:span text:style-name="T16">'table' </text:span><text:span text:style-name="T9">AND</text:span><text:span text:style-name="T16"> </text:span><text:span text:style-name="T9">name</text:span><text:span text:style-name="T16"> </text:span><text:span text:style-name="T9">NOT</text:span><text:span text:style-name="T16"> </text:span><text:span text:style-name="T9">LIKE</text:span><text:span text:style-name="T16"> 'sqlite_%' </text:span><text:span text:style-name="T9">ORDER BY</text:span><text:span text:style-name="T16"> </text:span><text:span text:style-name="T9">name</text:span><text:span text:style-name="T10">");</text:span></text:p>
      <text:p text:style-name="Code"><text:span text:style-name="T9">return</text:span> <text:span text:style-name="T10">$</text:span><text:span text:style-name="T14">stmt</text:span><text:span text:style-name="T10">-&gt;</text:span><text:span text:style-name="T15">fetchAll</text:span><text:span text:style-name="T10">(</text:span><text:span text:style-name="T12">PDO</text:span><text:span text:style-name="T10">::</text:span><text:span text:style-name="T11">FETCH_COLUMN</text:span><text:span text:style-name="T10">);</text:span></text:p>
      <text:p text:style-name="Code">}</text:p>
      <text:p text:style-name="Code"/>
      <text:p text:style-name="Code"><text:span text:style-name="T9">public</text:span> <text:span text:style-name="T14">function</text:span> <text:span text:style-name="T15">last</text:span><text:span text:style-name="T10">(</text:span><text:span text:style-name="T9">string</text:span> <text:span text:style-name="T10">$</text:span><text:span text:style-name="T14">table</text:span><text:span text:style-name="T10">,</text:span> <text:span text:style-name="T9">array</text:span> <text:span text:style-name="T10">$</text:span><text:span text:style-name="T14">where</text:span> <text:span text:style-name="T10">=</text:span> <text:span text:style-name="T10">[],</text:span> <text:span text:style-name="T10">$</text:span><text:span text:style-name="T14">fields</text:span> <text:span text:style-name="T10">=</text:span> <text:span text:style-name="T10">'</text:span><text:span text:style-name="T16">*</text:span><text:span text:style-name="T10">'):</text:span> <text:span text:style-name="T9">object</text:span><text:span text:style-name="T10">|</text:span><text:span text:style-name="T9">false</text:span></text:p>
      <text:p text:style-name="Code">{</text:p>
      <text:p text:style-name="Code"><text:span text:style-name="T10">$</text:span><text:span text:style-name="T11">this</text:span><text:span text:style-name="T10">-&gt;</text:span><text:span text:style-name="T15">validateTableName</text:span><text:span text:style-name="T10">($</text:span><text:span text:style-name="T14">table</text:span><text:span text:style-name="T10">);</text:span></text:p>
      <text:p text:style-name="Code"><text:span text:style-name="T9">try</text:span> <text:span text:style-name="T10">{</text:span></text:p>
      <text:p text:style-name="Code"><text:span text:style-name="T9">if</text:span> <text:span text:style-name="T10">(</text:span><text:span text:style-name="T15">is_array</text:span><text:span text:style-name="T10">($</text:span><text:span text:style-name="T14">fields</text:span><text:span text:style-name="T10">))</text:span> <text:span text:style-name="T10">$</text:span><text:span text:style-name="T14">fieldsStr</text:span> <text:span text:style-name="T10">=</text:span> <text:span text:style-name="T15">implode</text:span><text:span text:style-name="T10">('</text:span><text:span text:style-name="T16">, </text:span><text:span text:style-name="T10">',</text:span> <text:span text:style-name="T10">$</text:span><text:span text:style-name="T14">fields</text:span><text:span text:style-name="T10">);</text:span></text:p>
      <text:p text:style-name="Code"><text:span text:style-name="T9">else</text:span> <text:span text:style-name="T10">$</text:span><text:span text:style-name="T14">fieldsStr</text:span> <text:span text:style-name="T10">=</text:span> <text:span text:style-name="T10">$</text:span><text:span text:style-name="T14">fields</text:span><text:span text:style-name="T10">;</text:span></text:p>
      <text:p text:style-name="Code"/>
      <text:p text:style-name="Code"><text:span text:style-name="T10">$</text:span><text:span text:style-name="T14">sql</text:span> <text:span text:style-name="T10">=</text:span> <text:span text:style-name="T10">"</text:span><text:span text:style-name="T9">SELECT</text:span><text:span text:style-name="T16"> </text:span><text:span text:style-name="T10">{$</text:span><text:span text:style-name="T14">fieldsStr</text:span><text:span text:style-name="T10">}</text:span><text:span text:style-name="T16"> </text:span><text:span text:style-name="T9">FROM</text:span><text:span text:style-name="T16"> </text:span><text:span text:style-name="T10">\"{$</text:span><text:span text:style-name="T14">table</text:span><text:span text:style-name="T10">}\"";</text:span></text:p>
      <text:p text:style-name="Code"><text:span text:style-name="T10">$</text:span><text:span text:style-name="T14">params</text:span> <text:span text:style-name="T10">=</text:span> <text:span text:style-name="T10">[];</text:span></text:p>
      <text:p text:style-name="Code"><text:span text:style-name="T9">if</text:span> <text:span text:style-name="T10">(!</text:span><text:span text:style-name="T15">empty</text:span><text:span text:style-name="T10">($</text:span><text:span text:style-name="T14">where</text:span><text:span text:style-name="T10">))</text:span> <text:span text:style-name="T10">{</text:span></text:p>
      <text:p text:style-name="Code"><text:span text:style-name="T10">$</text:span><text:span text:style-name="T14">conditions</text:span> <text:span text:style-name="T10">=</text:span> <text:span text:style-name="T10">[];</text:span></text:p>
      <text:p text:style-name="Code"><text:span text:style-name="T9">foreach</text:span> <text:span text:style-name="T10">($</text:span><text:span text:style-name="T14">where</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9">if</text:span> <text:span text:style-name="T10">(</text:span><text:span text:style-name="T15">strtolower</text:span><text:span text:style-name="T10">($</text:span><text:span text:style-name="T14">field</text:span><text:span text:style-name="T10">)</text:span> <text:span text:style-name="T10">===</text:span> <text:span text:style-name="T10">'</text:span><text:span text:style-name="T16">email</text:span><text:span text:style-name="T10">')</text:span> <text:span text:style-name="T10">$</text:span><text:span text:style-name="T14">conditions</text:span><text:span text:style-name="T10">[]</text:span> <text:span text:style-name="T10">=</text:span> <text:span text:style-name="T10">"{$</text:span><text:span text:style-name="T14">field</text:span><text:span text:style-name="T10">}</text:span><text:span text:style-name="T16"> COLLATE NOCASE = :</text:span><text:span text:style-name="T10">{$</text:span><text:span text:style-name="T14">field</text:span><text:span text:style-name="T10">}";</text:span></text:p>
      <text:p text:style-name="Code"><text:span text:style-name="T9">else</text:span> <text:span text:style-name="T10">$</text:span><text:span text:style-name="T14">conditions</text:span><text:span text:style-name="T10">[]</text:span> <text:span text:style-name="T10">=</text:span> <text:span text:style-name="T10">"{$</text:span><text:span text:style-name="T14">field</text:span><text:span text:style-name="T10">}</text:span><text:span text:style-name="T16"> = :</text:span><text:span text:style-name="T10">{$</text:span><text:span text:style-name="T14">field</text:span><text:span text:style-name="T10">}";</text:span></text:p>
      <text:p text:style-name="Code"><text:span text:style-name="T10">$</text:span><text:span text:style-name="T14">params</text:span><text:span text:style-name="T10">["</text:span><text:span text:style-name="T16">:</text:span><text:span text:style-name="T10">{$</text:span><text:span text:style-name="T14">field</text:span><text:span text:style-name="T10">}"]</text:span> <text:span text:style-name="T10">=</text:span> <text:span text:style-name="T10">$</text:span><text:span text:style-name="T14">value</text:span><text:span text:style-name="T10">;</text:span></text:p>
      <text:p text:style-name="Code">}</text:p>
      <text:p text:style-name="Code"><text:span text:style-name="T10">$</text:span><text:span text:style-name="T14">sql</text:span> <text:span text:style-name="T10">.=</text:span> <text:span text:style-name="T10">"</text:span><text:span text:style-name="T16"> WHERE </text:span><text:span text:style-name="T10">"</text:span> <text:span text:style-name="T10">.</text:span> <text:span text:style-name="T15">implode</text:span><text:span text:style-name="T10">(' </text:span><text:span text:style-name="T9">AND</text:span><text:span text:style-name="T16"> </text:span><text:span text:style-name="T10">',</text:span> <text:span text:style-name="T10">$</text:span><text:span text:style-name="T14">conditions</text:span><text:span text:style-name="T10">);</text:span></text:p>
      <text:p text:style-name="Code">}</text:p>
      <text:p text:style-name="Code"><text:span text:style-name="T10">$</text:span><text:span text:style-name="T14">sql</text:span> <text:span text:style-name="T10">.=</text:span> <text:span text:style-name="T10">"</text:span><text:span text:style-name="T16"> ORDER BY Id DESC LIMIT 1</text:span><text:span text:style-name="T10">";</text:span></text:p>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stmt</text:span><text:span text:style-name="T10">-&gt;</text:span><text:span text:style-name="T15">execute</text:span><text:span text:style-name="T10">($</text:span><text:span text:style-name="T14">params</text:span><text:span text:style-name="T10">);</text:span></text:p>
      <text:p text:style-name="Code"><text:span text:style-name="T9">return</text:span> <text:span text:style-name="T10">$</text:span><text:span text:style-name="T14">stmt</text:span><text:span text:style-name="T10">-&gt;</text:span><text:span text:style-name="T15">fetch</text:span><text:span text:style-name="T10">();</text:span></text:p>
      <text:p text:style-name="Code"><text:span text:style-name="T10">}</text:span> <text:span text:style-name="T9">catch</text:span> <text:span text:style-name="T10">(</text:span><text:span text:style-name="T12">PDOException</text:span> <text:span text:style-name="T10">$</text:span><text:span text:style-name="T14">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Error</text:span><text:span text:style-name="T10">,</text:span> <text:span text:style-name="T10">"</text:span><text:span text:style-name="T16">Database error </text:span><text:span text:style-name="T10">{$</text:span><text:span text:style-name="T14">e</text:span><text:span text:style-name="T10">-&gt;</text:span><text:span text:style-name="T15">getMessage</text:span><text:span text:style-name="T10">()}</text:span><text:span text:style-name="T16"> in </text:span><text:span text:style-name="T10">{$</text:span><text:span text:style-name="T14">e</text:span><text:span text:style-name="T10">-&gt;</text:span><text:span text:style-name="T15">getFile</text:span><text:span text:style-name="T10">()}</text:span><text:span text:style-name="T16">:</text:span><text:span text:style-name="T10">{$</text:span><text:span text:style-name="T14">e</text:span><text:span text:style-name="T10">-&gt;</text:span><text:span text:style-name="T15">getLine</text:span><text:span text:style-name="T10">()}</text:span><text:span text:style-name="T16"> with query </text:span><text:span text:style-name="T10">{$</text:span><text:span text:style-name="T14">sql</text:span><text:span text:style-name="T10">}");</text:span></text:p>
      <text:p text:style-name="Code"><text:span text:style-name="T9">throw</text:span> <text:span text:style-name="T10">$</text:span><text:span text:style-name="T14">e</text:span><text:span text:style-name="T10">;</text:span></text:p>
      <text:p text:style-name="Code">}</text:p>
      <text:p text:style-name="Code">}</text:p>
      <text:p text:style-name="Code"/>
      <text:p text:style-name="Code"><text:span text:style-name="T9">public</text:span> <text:span text:style-name="T14">function</text:span> <text:span text:style-name="T15">query</text:span><text:span text:style-name="T10">(</text:span><text:span text:style-name="T9">string</text:span> <text:span text:style-name="T10">$</text:span><text:span text:style-name="T14">sql</text:span><text:span text:style-name="T10">,</text:span> <text:span text:style-name="T9">array</text:span> <text:span text:style-name="T10">$</text:span><text:span text:style-name="T14">parameters</text:span> <text:span text:style-name="T10">=</text:span> <text:span text:style-name="T10">[]):</text:span> <text:span text:style-name="T9">mixed</text:span></text:p>
      <text:p text:style-name="Code">{</text:p>
      <text:p text:style-name="Code"><text:span text:style-name="T9">try</text:span> <text:span text:style-name="T10">{</text:span></text:p>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result</text:span> <text:span text:style-name="T10">=</text:span> <text:span text:style-name="T10">$</text:span><text:span text:style-name="T14">stmt</text:span><text:span text:style-name="T10">-&gt;</text:span><text:span text:style-name="T15">execute</text:span><text:span text:style-name="T10">($</text:span><text:span text:style-name="T14">parameters</text:span><text:span text:style-name="T10">);</text:span></text:p>
      <text:p text:style-name="Code"><text:span text:style-name="T9">if</text:span> <text:span text:style-name="T10">(!$</text:span><text:span text:style-name="T14">result</text:span><text:span text:style-name="T10">)</text:span> <text:span text:style-name="T9">return</text:span> <text:span text:style-name="T11">false</text:span><text:span text:style-name="T10">;</text:span></text:p>
      <text:p text:style-name="Code"><text:span text:style-name="T10">$</text:span><text:span text:style-name="T14">queryType</text:span> <text:span text:style-name="T10">=</text:span> <text:span text:style-name="T15">strtoupper</text:span><text:span text:style-name="T10">(</text:span><text:span text:style-name="T15">substr</text:span><text:span text:style-name="T10">(</text:span><text:span text:style-name="T15">trim</text:span><text:span text:style-name="T10">($</text:span><text:span text:style-name="T14">sql</text:span><text:span text:style-name="T10">),</text:span> <text:span text:style-name="T11">0</text:span><text:span text:style-name="T10">,</text:span> <text:span text:style-name="T11">6</text:span><text:span text:style-name="T10">));</text:span></text:p>
      <text:p text:style-name="Code"><text:span text:style-name="T9">switch</text:span> <text:span text:style-name="T10">($</text:span><text:span text:style-name="T14">queryType</text:span><text:span text:style-name="T10">)</text:span> <text:span text:style-name="T10">{</text:span></text:p>
      <text:p text:style-name="Code"><text:span text:style-name="T9">case</text:span> <text:span text:style-name="T10">'</text:span><text:span text:style-name="T9">SELECT</text:span><text:span text:style-name="T10">':</text:span></text:p>
      <text:p text:style-name="Code"><text:span text:style-name="T9">return</text:span> <text:span text:style-name="T10">$</text:span><text:span text:style-name="T14">stmt</text:span><text:span text:style-name="T10">-&gt;</text:span><text:span text:style-name="T15">fetchAll</text:span><text:span text:style-name="T10">(</text:span><text:span text:style-name="T12">PDO</text:span><text:span text:style-name="T10">::</text:span><text:span text:style-name="T11">FETCH_OBJ</text:span><text:span text:style-name="T10">);</text:span></text:p>
      <text:p text:style-name="Code"><text:span text:style-name="T9">case</text:span> <text:span text:style-name="T10">'</text:span><text:span text:style-name="T9">INSERT</text:span><text:span text:style-name="T10">':</text:span></text:p>
      <text:p text:style-name="Code"><text:span text:style-name="T9">return</text:span> <text:span text:style-name="T10">$</text:span><text:span text:style-name="T11">this</text:span><text:span text:style-name="T10">-&gt;</text:span><text:span text:style-name="T14">pdo</text:span><text:span text:style-name="T10">-&gt;</text:span><text:span text:style-name="T15">lastInsertId</text:span><text:span text:style-name="T10">();</text:span></text:p>
      <text:p text:style-name="Code"><text:span text:style-name="T9">case</text:span> <text:span text:style-name="T10">'</text:span><text:span text:style-name="T9">UPDATE</text:span><text:span text:style-name="T10">':</text:span></text:p>
      <text:p text:style-name="Code"><text:span text:style-name="T9">case</text:span> <text:span text:style-name="T10">'</text:span><text:span text:style-name="T9">DELETE</text:span><text:span text:style-name="T10">':</text:span></text:p>
      <text:p text:style-name="Code"><text:span text:style-name="T9">return</text:span> <text:span text:style-name="T10">$</text:span><text:span text:style-name="T14">stmt</text:span><text:span text:style-name="T10">-&gt;</text:span><text:span text:style-name="T15">rowCount</text:span><text:span text:style-name="T10">();</text:span></text:p>
      <text:p text:style-name="Code"><text:span text:style-name="T9">default</text:span><text:span text:style-name="T10">:</text:span></text:p>
      <text:p text:style-name="Code"><text:span text:style-name="T9">return</text:span> <text:span text:style-name="T10">$</text:span><text:span text:style-name="T14">result</text:span><text:span text:style-name="T10">;</text:span></text:p>
      <text:p text:style-name="Code">}</text:p>
      <text:p text:style-name="Code"><text:span text:style-name="T10">}</text:span> <text:span text:style-name="T9">catch</text:span> <text:span text:style-name="T10">(\</text:span><text:span text:style-name="T12">PDOException</text:span> <text:span text:style-name="T10">$</text:span><text:span text:style-name="T14">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Error</text:span><text:span text:style-name="T10">,</text:span> <text:span text:style-name="T10">'</text:span><text:span text:style-name="T16">Database error: </text:span><text:span text:style-name="T10">'</text:span> <text:span text:style-name="T10">.</text:span> <text:span text:style-name="T10">$</text:span><text:span text:style-name="T14">e</text:span><text:span text:style-name="T10">-&gt;</text:span><text:span text:style-name="T15">getMessage</text:span><text:span text:style-name="T10">()</text:span> <text:span text:style-name="T10">.</text:span> <text:span text:style-name="T10">'</text:span><text:span text:style-name="T16">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Code"><text:span text:style-name="T9">return</text:span> <text:span text:style-name="T11">false</text:span><text:span text:style-name="T10">;</text:span></text:p>
      <text:p text:style-name="Code"><text:soft-page-break/>}</text:p>
      <text:p text:style-name="Code">}</text:p>
      <text:p text:style-name="Code"/>
      <text:p text:style-name="Code"><text:span text:style-name="T9">public</text:span> <text:span text:style-name="T14">function</text:span> <text:span text:style-name="T15">set</text:span><text:span text:style-name="T10">(</text:span><text:span text:style-name="T9">string</text:span> <text:span text:style-name="T10">$</text:span><text:span text:style-name="T14">table</text:span><text:span text:style-name="T10">,</text:span> <text:span text:style-name="T9">array</text:span> <text:span text:style-name="T10">$</text:span><text:span text:style-name="T14">fields</text:span><text:span text:style-name="T10">,</text:span> <text:span text:style-name="T9">array</text:span> <text:span text:style-name="T10">$</text:span><text:span text:style-name="T14">where</text:span> <text:span text:style-name="T10">=</text:span> <text:span text:style-name="T10">[]):</text:span> <text:span text:style-name="T9">int</text:span><text:span text:style-name="T10">|</text:span><text:span text:style-name="T9">bool</text:span></text:p>
      <text:p text:style-name="Code">{</text:p>
      <text:p text:style-name="Code"><text:span text:style-name="T10">$</text:span><text:span text:style-name="T11">this</text:span><text:span text:style-name="T10">-&gt;</text:span><text:span text:style-name="T15">validateTableName</text:span><text:span text:style-name="T10">($</text:span><text:span text:style-name="T14">table</text:span><text:span text:style-name="T10">);</text:span></text:p>
      <text:p text:style-name="Code"><text:span text:style-name="T10">$</text:span><text:span text:style-name="T14">escape</text:span> <text:span text:style-name="T10">=</text:span> <text:span text:style-name="T14">fn</text:span><text:span text:style-name="T10">(</text:span><text:span text:style-name="T9">string</text:span> <text:span text:style-name="T10">$</text:span><text:span text:style-name="T14">name</text:span><text:span text:style-name="T10">)</text:span> <text:span text:style-name="T10">=&gt;</text:span> <text:span text:style-name="T10">'</text:span><text:span text:style-name="T16">"</text:span><text:span text:style-name="T10">'</text:span> <text:span text:style-name="T10">.</text:span> <text:span text:style-name="T15">str_replace</text:span><text:span text:style-name="T10">('</text:span><text:span text:style-name="T16">"</text:span><text:span text:style-name="T10">',</text:span> <text:span text:style-name="T10">'</text:span><text:span text:style-name="T16">""</text:span><text:span text:style-name="T10">',</text:span> <text:span text:style-name="T10">$</text:span><text:span text:style-name="T14">name</text:span><text:span text:style-name="T10">)</text:span> <text:span text:style-name="T10">.</text:span> <text:span text:style-name="T10">'</text:span><text:span text:style-name="T16">"</text:span><text:span text:style-name="T10">';</text:span></text:p>
      <text:p text:style-name="Code"><text:span text:style-name="T9">try</text:span> <text:span text:style-name="T10">{</text:span></text:p>
      <text:p text:style-name="Code"><text:span text:style-name="T9">if</text:span> <text:span text:style-name="T10">($</text:span><text:span text:style-name="T14">where</text:span> <text:span text:style-name="T10">===</text:span> <text:span text:style-name="T10">[])</text:span> <text:span text:style-name="T10">{</text:span></text:p>
      <text:p text:style-name="Code">// INSERT</text:p>
      <text:p text:style-name="Code"><text:span text:style-name="T10">$</text:span><text:span text:style-name="T14">columns</text:span> <text:span text:style-name="T10">=</text:span> <text:span text:style-name="T15">implode</text:span><text:span text:style-name="T10">('</text:span><text:span text:style-name="T16">, </text:span><text:span text:style-name="T10">',</text:span> <text:span text:style-name="T15">array_map</text:span><text:span text:style-name="T10">($</text:span><text:span text:style-name="T14">escape</text:span><text:span text:style-name="T10">,</text:span> <text:span text:style-name="T15">array_keys</text:span><text:span text:style-name="T10">($</text:span><text:span text:style-name="T14">fields</text:span><text:span text:style-name="T10">)));</text:span></text:p>
      <text:p text:style-name="Code"><text:span text:style-name="T10">$</text:span><text:span text:style-name="T14">placeholders</text:span> <text:span text:style-name="T10">=</text:span> <text:span text:style-name="T10">'</text:span><text:span text:style-name="T16">:</text:span><text:span text:style-name="T10">'</text:span> <text:span text:style-name="T10">.</text:span> <text:span text:style-name="T15">implode</text:span><text:span text:style-name="T10">('</text:span><text:span text:style-name="T16">, :</text:span><text:span text:style-name="T10">',</text:span> <text:span text:style-name="T15">array_keys</text:span><text:span text:style-name="T10">($</text:span><text:span text:style-name="T14">fields</text:span><text:span text:style-name="T10">));</text:span></text:p>
      <text:p text:style-name="Code"><text:span text:style-name="T10">$</text:span><text:span text:style-name="T14">sql</text:span> <text:span text:style-name="T10">=</text:span> <text:span text:style-name="T10">"</text:span><text:span text:style-name="T9">INSERT INTO</text:span><text:span text:style-name="T16"> </text:span><text:span text:style-name="T10">{$</text:span><text:span text:style-name="T14">escape</text:span><text:span text:style-name="T10">($</text:span><text:span text:style-name="T14">table</text:span><text:span text:style-name="T10">)}</text:span><text:span text:style-name="T16"> (</text:span><text:span text:style-name="T10">{$</text:span><text:span text:style-name="T14">columns</text:span><text:span text:style-name="T10">}</text:span><text:span text:style-name="T16">) </text:span><text:span text:style-name="T9">VALUES</text:span><text:span text:style-name="T16"> (</text:span><text:span text:style-name="T10">{$</text:span><text:span text:style-name="T14">placeholders</text:span><text:span text:style-name="T10">}</text:span><text:span text:style-name="T16">)</text:span><text:span text:style-name="T10">";</text:span></text:p>
      <text:p text:style-name="Code"/>
      <text:p text:style-name="Code"><text:span text:style-name="T10">$</text:span><text:span text:style-name="T14">params</text:span> <text:span text:style-name="T10">=</text:span> <text:span text:style-name="T10">[];</text:span></text:p>
      <text:p text:style-name="Code"><text:span text:style-name="T9">foreach</text:span> <text:span text:style-name="T10">($</text:span><text:span text:style-name="T14">fields</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10">$</text:span><text:span text:style-name="T14">params</text:span><text:span text:style-name="T10">["</text:span><text:span text:style-name="T16">:</text:span><text:span text:style-name="T10">{$</text:span><text:span text:style-name="T14">field</text:span><text:span text:style-name="T10">}"]</text:span> <text:span text:style-name="T10">=</text:span> <text:span text:style-name="T10">$</text:span><text:span text:style-name="T14">value</text:span><text:span text:style-name="T10">;</text:span></text:p>
      <text:p text:style-name="Code">}</text:p>
      <text:p text:style-name="Code"/>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10">$</text:span><text:span text:style-name="T14">result</text:span> <text:span text:style-name="T10">=</text:span> <text:span text:style-name="T10">$</text:span><text:span text:style-name="T14">stmt</text:span><text:span text:style-name="T10">-&gt;</text:span><text:span text:style-name="T15">execute</text:span><text:span text:style-name="T10">($</text:span><text:span text:style-name="T14">params</text:span><text:span text:style-name="T10">);</text:span></text:p>
      <text:p text:style-name="Code"/>
      <text:p text:style-name="Code"><text:span text:style-name="T9">return</text:span> <text:span text:style-name="T10">$</text:span><text:span text:style-name="T14">result</text:span> <text:span text:style-name="T10">?</text:span> <text:span text:style-name="T10">(</text:span><text:span text:style-name="T14">int</text:span><text:span text:style-name="T10">)$</text:span><text:span text:style-name="T11">this</text:span><text:span text:style-name="T10">-&gt;</text:span><text:span text:style-name="T14">pdo</text:span><text:span text:style-name="T10">-&gt;</text:span><text:span text:style-name="T15">lastInsertId</text:span><text:span text:style-name="T10">()</text:span> <text:span text:style-name="T10">:</text:span> <text:span text:style-name="T11">false</text:span><text:span text:style-name="T10">;</text:span></text:p>
      <text:p text:style-name="Code"><text:span text:style-name="T10">}</text:span> <text:span text:style-name="T9">else</text:span> <text:span text:style-name="T10">{</text:span></text:p>
      <text:p text:style-name="Code">// UPDATE</text:p>
      <text:p text:style-name="Code"><text:span text:style-name="T10">$</text:span><text:span text:style-name="T14">setClause</text:span> <text:span text:style-name="T10">=</text:span> <text:span text:style-name="T10">[];</text:span></text:p>
      <text:p text:style-name="Code"><text:span text:style-name="T10">$</text:span><text:span text:style-name="T14">params</text:span> <text:span text:style-name="T10">=</text:span> <text:span text:style-name="T10">[];</text:span></text:p>
      <text:p text:style-name="Code"/>
      <text:p text:style-name="Code"><text:span text:style-name="T9">foreach</text:span> <text:span text:style-name="T10">($</text:span><text:span text:style-name="T14">fields</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10">$</text:span><text:span text:style-name="T14">setClause</text:span><text:span text:style-name="T10">[]</text:span> <text:span text:style-name="T10">=</text:span> <text:span text:style-name="T10">$</text:span><text:span text:style-name="T14">escape</text:span><text:span text:style-name="T10">($</text:span><text:span text:style-name="T14">field</text:span><text:span text:style-name="T10">)</text:span> <text:span text:style-name="T10">.</text:span> <text:span text:style-name="T10">"</text:span><text:span text:style-name="T16"> = :set_</text:span><text:span text:style-name="T10">{$</text:span><text:span text:style-name="T14">field</text:span><text:span text:style-name="T10">}";</text:span></text:p>
      <text:p text:style-name="Code"><text:span text:style-name="T10">$</text:span><text:span text:style-name="T14">params</text:span><text:span text:style-name="T10">["</text:span><text:span text:style-name="T16">:set_</text:span><text:span text:style-name="T10">{$</text:span><text:span text:style-name="T14">field</text:span><text:span text:style-name="T10">}"]</text:span> <text:span text:style-name="T10">=</text:span> <text:span text:style-name="T10">$</text:span><text:span text:style-name="T14">value</text:span><text:span text:style-name="T10">;</text:span></text:p>
      <text:p text:style-name="Code">}</text:p>
      <text:p text:style-name="Code"/>
      <text:p text:style-name="Code"><text:span text:style-name="T10">$</text:span><text:span text:style-name="T14">whereClause</text:span> <text:span text:style-name="T10">=</text:span> <text:span text:style-name="T10">[];</text:span></text:p>
      <text:p text:style-name="Code"><text:span text:style-name="T9">foreach</text:span> <text:span text:style-name="T10">($</text:span><text:span text:style-name="T14">where</text:span> <text:span text:style-name="T10">as</text:span> <text:span text:style-name="T10">$</text:span><text:span text:style-name="T14">field</text:span> <text:span text:style-name="T10">=&gt;</text:span> <text:span text:style-name="T10">$</text:span><text:span text:style-name="T14">value</text:span><text:span text:style-name="T10">)</text:span> <text:span text:style-name="T10">{</text:span></text:p>
      <text:p text:style-name="Code"><text:span text:style-name="T10">$</text:span><text:span text:style-name="T14">escapedField</text:span> <text:span text:style-name="T10">=</text:span> <text:span text:style-name="T10">$</text:span><text:span text:style-name="T14">escape</text:span><text:span text:style-name="T10">($</text:span><text:span text:style-name="T14">field</text:span><text:span text:style-name="T10">);</text:span></text:p>
      <text:p text:style-name="Code"><text:span text:style-name="T9">if</text:span> <text:span text:style-name="T10">(</text:span><text:span text:style-name="T15">strtolower</text:span><text:span text:style-name="T10">($</text:span><text:span text:style-name="T14">field</text:span><text:span text:style-name="T10">)</text:span> <text:span text:style-name="T10">===</text:span> <text:span text:style-name="T10">'</text:span><text:span text:style-name="T16">email</text:span><text:span text:style-name="T10">')</text:span> <text:span text:style-name="T10">{</text:span></text:p>
      <text:p text:style-name="Code"><text:span text:style-name="T10">$</text:span><text:span text:style-name="T14">whereClause</text:span><text:span text:style-name="T10">[]</text:span> <text:span text:style-name="T10">=</text:span> <text:span text:style-name="T10">"{$</text:span><text:span text:style-name="T14">escapedField</text:span><text:span text:style-name="T10">}</text:span><text:span text:style-name="T16"> COLLATE NOCASE = :where_</text:span><text:span text:style-name="T10">{$</text:span><text:span text:style-name="T14">field</text:span><text:span text:style-name="T10">}";</text:span></text:p>
      <text:p text:style-name="Code"><text:span text:style-name="T10">}</text:span> <text:span text:style-name="T9">else</text:span> <text:span text:style-name="T10">{</text:span></text:p>
      <text:p text:style-name="Code"><text:span text:style-name="T10">$</text:span><text:span text:style-name="T14">whereClause</text:span><text:span text:style-name="T10">[]</text:span> <text:span text:style-name="T10">=</text:span> <text:span text:style-name="T10">"{$</text:span><text:span text:style-name="T14">escapedField</text:span><text:span text:style-name="T10">}</text:span><text:span text:style-name="T16"> = :where_</text:span><text:span text:style-name="T10">{$</text:span><text:span text:style-name="T14">field</text:span><text:span text:style-name="T10">}";</text:span></text:p>
      <text:p text:style-name="Code">}</text:p>
      <text:p text:style-name="Code"><text:span text:style-name="T10">$</text:span><text:span text:style-name="T14">params</text:span><text:span text:style-name="T10">["</text:span><text:span text:style-name="T16">:where_</text:span><text:span text:style-name="T10">{$</text:span><text:span text:style-name="T14">field</text:span><text:span text:style-name="T10">}"]</text:span> <text:span text:style-name="T10">=</text:span> <text:span text:style-name="T10">$</text:span><text:span text:style-name="T14">value</text:span><text:span text:style-name="T10">;</text:span></text:p>
      <text:p text:style-name="Code">}</text:p>
      <text:p text:style-name="Code"/>
      <text:p text:style-name="Code"><text:span text:style-name="T10">$</text:span><text:span text:style-name="T14">sql</text:span> <text:span text:style-name="T10">=</text:span> <text:span text:style-name="T10">"</text:span><text:span text:style-name="T9">UPDATE</text:span><text:span text:style-name="T16"> </text:span><text:span text:style-name="T10">{$</text:span><text:span text:style-name="T14">escape</text:span><text:span text:style-name="T10">($</text:span><text:span text:style-name="T14">table</text:span><text:span text:style-name="T10">)}</text:span><text:span text:style-name="T16"> </text:span><text:span text:style-name="T9">SET</text:span><text:span text:style-name="T16"> </text:span><text:span text:style-name="T10">"</text:span> <text:span text:style-name="T10">.</text:span> <text:span text:style-name="T15">implode</text:span><text:span text:style-name="T10">('</text:span><text:span text:style-name="T16">, </text:span><text:span text:style-name="T10">',</text:span> <text:span text:style-name="T10">$</text:span><text:span text:style-name="T14">setClause</text:span><text:span text:style-name="T10">)</text:span></text:p>
      <text:p text:style-name="Code"><text:span text:style-name="T10">.</text:span> <text:span text:style-name="T10">"</text:span><text:span text:style-name="T16"> WHERE </text:span><text:span text:style-name="T10">"</text:span> <text:span text:style-name="T10">.</text:span> <text:span text:style-name="T15">implode</text:span><text:span text:style-name="T10">(' </text:span><text:span text:style-name="T9">AND</text:span><text:span text:style-name="T16"> </text:span><text:span text:style-name="T10">',</text:span> <text:span text:style-name="T10">$</text:span><text:span text:style-name="T14">whereClause</text:span><text:span text:style-name="T10">);</text:span></text:p>
      <text:p text:style-name="Code"><text:span text:style-name="T10">$</text:span><text:span text:style-name="T14">stmt</text:span> <text:span text:style-name="T10">=</text:span> <text:span text:style-name="T10">$</text:span><text:span text:style-name="T11">this</text:span><text:span text:style-name="T10">-&gt;</text:span><text:span text:style-name="T14">pdo</text:span><text:span text:style-name="T10">-&gt;</text:span><text:span text:style-name="T15">prepare</text:span><text:span text:style-name="T10">($</text:span><text:span text:style-name="T14">sql</text:span><text:span text:style-name="T10">);</text:span></text:p>
      <text:p text:style-name="Code"><text:span text:style-name="T9">return</text:span> <text:span text:style-name="T10">$</text:span><text:span text:style-name="T14">stmt</text:span><text:span text:style-name="T10">-&gt;</text:span><text:span text:style-name="T15">execute</text:span><text:span text:style-name="T10">($</text:span><text:span text:style-name="T14">params</text:span><text:span text:style-name="T10">);</text:span></text:p>
      <text:p text:style-name="Code">}</text:p>
      <text:p text:style-name="Code"><text:span text:style-name="T10">}</text:span> <text:span text:style-name="T9">catch</text:span> <text:span text:style-name="T10">(</text:span><text:span text:style-name="T12">PDOException</text:span> <text:span text:style-name="T10">$</text:span><text:span text:style-name="T14">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p>
      <text:p text:style-name="Code"><text:span text:style-name="T12">ApplicationError</text:span><text:span text:style-name="T10">::</text:span><text:span text:style-name="T11">Error</text:span><text:span text:style-name="T10">,</text:span></text:p>
      <text:p text:style-name="Code"><text:span text:style-name="T10">'</text:span><text:span text:style-name="T16">Database error: </text:span><text:span text:style-name="T10">'</text:span> <text:span text:style-name="T10">.</text:span> <text:span text:style-name="T10">$</text:span><text:span text:style-name="T14">e</text:span><text:span text:style-name="T10">-&gt;</text:span><text:span text:style-name="T15">getMessage</text:span><text:span text:style-name="T10">()</text:span> <text:span text:style-name="T10">.</text:span> <text:span text:style-name="T10">'</text:span><text:span text:style-name="T16">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p>
      <text:p text:style-name="Code">);</text:p>
      <text:p text:style-name="Code"><text:span text:style-name="T9">return</text:span> <text:span text:style-name="T11">false</text:span><text:span text:style-name="T10">;</text:span></text:p>
      <text:p text:style-name="Code">}</text:p>
      <text:p text:style-name="Code">}</text:p>
      <text:p text:style-name="Code"><text:soft-page-break/></text:p>
      <text:p text:style-name="Code"><text:span text:style-name="T9">public</text:span> <text:span text:style-name="T14">function</text:span> <text:span text:style-name="T15">setSetting</text:span><text:span text:style-name="T10">(</text:span><text:span text:style-name="T9">string</text:span> <text:span text:style-name="T10">$</text:span><text:span text:style-name="T14">name</text:span><text:span text:style-name="T10">,</text:span> <text:span text:style-name="T9">string</text:span> <text:span text:style-name="T10">$</text:span><text:span text:style-name="T14">value</text:span><text:span text:style-name="T10">):</text:span> <text:span text:style-name="T9">void</text:span></text:p>
      <text:p text:style-name="Code">{</text:p>
      <text:p text:style-name="Code"><text:span text:style-name="T9">if</text:span> <text:span text:style-name="T10">($</text:span><text:span text:style-name="T11">this</text:span><text:span text:style-name="T10">-&gt;</text:span><text:span text:style-name="T15">get</text:span><text:span text:style-name="T10">('</text:span><text:span text:style-name="T16">Settings</text:span><text:span text:style-name="T10">',</text:span> <text:span text:style-name="T10">['</text:span><text:span text:style-name="T16">Name</text:span><text:span text:style-name="T10">'</text:span> <text:span text:style-name="T10">=&gt;</text:span> <text:span text:style-name="T10">$</text:span><text:span text:style-name="T14">name</text:span><text:span text:style-name="T10">],</text:span> <text:span text:style-name="T10">'</text:span><text:span text:style-name="T16">Id</text:span><text:span text:style-name="T10">'))</text:span> <text:span text:style-name="T10">{</text:span></text:p>
      <text:p text:style-name="Code"><text:span text:style-name="T10">$</text:span><text:span text:style-name="T11">this</text:span><text:span text:style-name="T10">-&gt;</text:span><text:span text:style-name="T15">set</text:span><text:span text:style-name="T10">('</text:span><text:span text:style-name="T16">Settings</text:span><text:span text:style-name="T10">',</text:span> <text:span text:style-name="T10">['</text:span><text:span text:style-name="T16">Value</text:span><text:span text:style-name="T10">'</text:span> <text:span text:style-name="T10">=&gt;</text:span> <text:span text:style-name="T10">$</text:span><text:span text:style-name="T14">value</text:span><text:span text:style-name="T10">],</text:span> <text:span text:style-name="T10">['</text:span><text:span text:style-name="T16">Name</text:span><text:span text:style-name="T10">'</text:span> <text:span text:style-name="T10">=&gt;</text:span> <text:span text:style-name="T10">$</text:span><text:span text:style-name="T14">name</text:span><text:span text:style-name="T10">]);</text:span></text:p>
      <text:p text:style-name="Code"><text:span text:style-name="T10">}</text:span> <text:span text:style-name="T9">else</text:span> <text:span text:style-name="T10">{</text:span></text:p>
      <text:p text:style-name="Code"><text:span text:style-name="T10">$</text:span><text:span text:style-name="T11">this</text:span><text:span text:style-name="T10">-&gt;</text:span><text:span text:style-name="T15">set</text:span><text:span text:style-name="T10">('</text:span><text:span text:style-name="T16">Settings</text:span><text:span text:style-name="T10">',</text:span> <text:span text:style-name="T10">[</text:span></text:p>
      <text:p text:style-name="Code"><text:span text:style-name="T10">'</text:span><text:span text:style-name="T16">Name</text:span><text:span text:style-name="T10">'</text:span> <text:span text:style-name="T10">=&gt;</text:span> <text:span text:style-name="T10">$</text:span><text:span text:style-name="T14">name</text:span><text:span text:style-name="T10">,</text:span></text:p>
      <text:p text:style-name="Code"><text:span text:style-name="T10">'</text:span><text:span text:style-name="T16">Value</text:span><text:span text:style-name="T10">'</text:span> <text:span text:style-name="T10">=&gt;</text:span> <text:span text:style-name="T10">$</text:span><text:span text:style-name="T14">value</text:span></text:p>
      <text:p text:style-name="Code">]);</text:p>
      <text:p text:style-name="Code">}</text:p>
      <text:p text:style-name="Code">}</text:p>
      <text:p text:style-name="Code"/>
      <text:p text:style-name="Code"><text:span text:style-name="T9">static</text:span> <text:span text:style-name="T14">function</text:span> <text:span text:style-name="T15">requireFields</text:span><text:span text:style-name="T10">(</text:span><text:span text:style-name="T9">array</text:span> <text:span text:style-name="T10">$</text:span><text:span text:style-name="T14">data</text:span><text:span text:style-name="T10">,</text:span> <text:span text:style-name="T9">array</text:span> <text:span text:style-name="T10">$</text:span><text:span text:style-name="T14">fields</text:span><text:span text:style-name="T10">):</text:span> <text:span text:style-name="T9">bool</text:span></text:p>
      <text:p text:style-name="Code">{</text:p>
      <text:p text:style-name="Code"><text:span text:style-name="T9">foreach</text:span> <text:span text:style-name="T10">($</text:span><text:span text:style-name="T14">fields</text:span> <text:span text:style-name="T10">as</text:span> <text:span text:style-name="T10">$</text:span><text:span text:style-name="T14">field</text:span><text:span text:style-name="T10">)</text:span> <text:span text:style-name="T10">{</text:span></text:p>
      <text:p text:style-name="Code"><text:span text:style-name="T9">if</text:span> <text:span text:style-name="T10">(!</text:span><text:span text:style-name="T15">array_key_exists</text:span><text:span text:style-name="T10">($</text:span><text:span text:style-name="T14">field</text:span><text:span text:style-name="T10">,</text:span> <text:span text:style-name="T10">$</text:span><text:span text:style-name="T14">data</text:span><text:span text:style-name="T10">))</text:span> <text:span text:style-name="T10">{</text:span></text:p>
      <text:p text:style-name="Code"><text:span text:style-name="T9">return</text:span> <text:span text:style-name="T11">false</text:span><text:span text:style-name="T10">;</text:span></text:p>
      <text:p text:style-name="Code">}</text:p>
      <text:p text:style-name="Code">}</text:p>
      <text:p text:style-name="Code"><text:span text:style-name="T9">return</text:span> <text:span text:style-name="T11">true</text:span><text:span text:style-name="T10">;</text:span></text:p>
      <text:p text:style-name="Code">}</text:p>
      <text:p text:style-name="Code">}</text:p>
      <text:h text:style-name="P5" text:outline-level="2">Les autorisations</text:h>
      <text:p text:style-name="P15">Designer vs Manager vs User</text:p>
      <text:p text:style-name="P15">A chaque nouvelle autorisation, il faut mettre à jour :</text:p>
      <text:p text:style-name="P16">&lt;?php</text:p>
      <text:p text:style-name="P17"/>
      <text:p text:style-name="P18"><text:span text:style-name="T9">declare</text:span><text:span text:style-name="T10">(</text:span><text:span text:style-name="T11">strict_types</text:span><text:span text:style-name="T10">=</text:span><text:span text:style-name="T11">1</text:span><text:span text:style-name="T10">);</text:span></text:p>
      <text:p text:style-name="P17"/>
      <text:p text:style-name="P18"><text:span text:style-name="T9">namespace</text:span> <text:span text:style-name="T12">app</text:span><text:span text:style-name="T13">\</text:span><text:span text:style-name="T12">enums</text:span><text:span text:style-name="T10">;</text:span></text:p>
      <text:p text:style-name="P17"/>
      <text:p text:style-name="P18"><text:span text:style-name="T14">enum</text:span> <text:span text:style-name="T12">Authorization</text:span><text:span text:style-name="T10">:</text:span> <text:span text:style-name="T9">string</text:span></text:p>
      <text:p text:style-name="P19">{</text:p>
      <text:p text:style-name="P18"><text:span text:style-name="T14">case</text:span> <text:span text:style-name="T11">CommunicationManager</text:span> <text:span text:style-name="T10">=</text:span> <text:span text:style-name="T10">'</text:span><text:span text:style-name="T16">CommunicationManager</text:span><text:span text:style-name="T10">';</text:span></text:p>
      <text:p text:style-name="P18"><text:span text:style-name="T14">case</text:span> <text:span text:style-name="T11">Editor</text:span> <text:span text:style-name="T10">=</text:span> <text:span text:style-name="T10">'</text:span><text:span text:style-name="T16">Editor</text:span><text:span text:style-name="T10">';</text:span></text:p>
      <text:p text:style-name="P18"><text:span text:style-name="T14">case</text:span> <text:span text:style-name="T11">EventDesigner</text:span> <text:span text:style-name="T10">=</text:span> <text:span text:style-name="T10">'</text:span><text:span text:style-name="T16">EventDesigner</text:span><text:span text:style-name="T10">';</text:span></text:p>
      <text:p text:style-name="P18"><text:span text:style-name="T14">case</text:span> <text:span text:style-name="T11">EventManager</text:span> <text:span text:style-name="T10">=</text:span> <text:span text:style-name="T10">'</text:span><text:span text:style-name="T16">EventManager</text:span><text:span text:style-name="T10">';</text:span></text:p>
      <text:p text:style-name="P18"><text:span text:style-name="T14">case</text:span> <text:span text:style-name="T11">HomeDesigner</text:span> <text:span text:style-name="T10">=</text:span> <text:span text:style-name="T10">'</text:span><text:span text:style-name="T16">HomeDesigner</text:span><text:span text:style-name="T10">';</text:span></text:p>
      <text:p text:style-name="P18"><text:span text:style-name="T14">case</text:span> <text:span text:style-name="T11">KanbanDesigner</text:span> <text:span text:style-name="T10">=</text:span> <text:span text:style-name="T10">'</text:span><text:span text:style-name="T16">KanbanDesigner</text:span><text:span text:style-name="T10">';</text:span></text:p>
      <text:p text:style-name="P18"><text:span text:style-name="T14">case</text:span> <text:span text:style-name="T11">MenuDesigner</text:span> <text:span text:style-name="T10">=</text:span> <text:span text:style-name="T10">'</text:span><text:span text:style-name="T16">MenuDesigner</text:span><text:span text:style-name="T10">';</text:span></text:p>
      <text:p text:style-name="P18"><text:span text:style-name="T14">case</text:span> <text:span text:style-name="T11">PersonManager</text:span> <text:span text:style-name="T10">=</text:span> <text:span text:style-name="T10">'</text:span><text:span text:style-name="T16">PersonManager</text:span><text:span text:style-name="T10">';</text:span></text:p>
      <text:p text:style-name="P18"><text:span text:style-name="T14">case</text:span> <text:span text:style-name="T11">Redactor</text:span> <text:span text:style-name="T10">=</text:span> <text:span text:style-name="T10">'</text:span><text:span text:style-name="T16">Redactor</text:span><text:span text:style-name="T10">';</text:span></text:p>
      <text:p text:style-name="P18"><text:span text:style-name="T14">case</text:span> <text:span text:style-name="T11">Translator</text:span> <text:span text:style-name="T10">=</text:span> <text:span text:style-name="T10">'</text:span><text:span text:style-name="T16">Translator</text:span><text:span text:style-name="T10">';</text:span></text:p>
      <text:p text:style-name="P18"><text:span text:style-name="T14">case</text:span> <text:span text:style-name="T11">VisitorInsights</text:span> <text:span text:style-name="T10">=</text:span> <text:span text:style-name="T10">'</text:span><text:span text:style-name="T16">VisitorInsights</text:span><text:span text:style-name="T10">';</text:span></text:p>
      <text:p text:style-name="P18"><text:span text:style-name="T14">case</text:span> <text:span text:style-name="T11">Webmaster</text:span> <text:span text:style-name="T10">=</text:span> <text:span text:style-name="T10">'</text:span><text:span text:style-name="T16">Webmaster</text:span><text:span text:style-name="T10">';</text:span></text:p>
      <text:p text:style-name="P19">}</text:p>
      <text:p text:style-name="P20"/>
      <text:p text:style-name="P21"><text:span text:style-name="T9">CREATE</text:span> <text:span text:style-name="T9">TABLE</text:span> <text:span text:style-name="T15">IF</text:span> <text:span text:style-name="T9">NOT</text:span> <text:span text:style-name="T9">EXISTS</text:span> <text:span text:style-name="T10">"</text:span><text:span text:style-name="T16">Authorization</text:span><text:span text:style-name="T10">"</text:span> (</text:p>
      <text:p text:style-name="P18"><text:span text:style-name="T10">"</text:span><text:span text:style-name="T16">Id</text:span><text:span text:style-name="T10">"</text:span> <text:span text:style-name="T14">INTEGER</text:span>,</text:p>
      <text:p text:style-name="P18"><text:span text:style-name="T10">"</text:span><text:span text:style-name="T16">Name</text:span><text:span text:style-name="T10">"</text:span> <text:span text:style-name="T14">TEXT</text:span> <text:span text:style-name="T9">NOT NULL</text:span>,</text:p>
      <text:p text:style-name="P18"><text:span text:style-name="T9">PRIMARY KEY</text:span>(<text:span text:style-name="T10">"</text:span><text:span text:style-name="T16">Id</text:span><text:span text:style-name="T10">"</text:span>)</text:p>
      <text:p text:style-name="P18"><text:soft-page-break/>);</text:p>
      <text:p text:style-name="P20"/>
      <text:p text:style-name="P21"><text:span text:style-name="T9">INSERT INTO</text:span> <text:span text:style-name="T10">"</text:span><text:span text:style-name="T16">Authorization</text:span><text:span text:style-name="T10">"</text:span> <text:span text:style-name="T9">VALUES</text:span> (<text:span text:style-name="T11">1</text:span>,<text:span text:style-name="T10">'</text:span><text:span text:style-name="T16">Webmast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2</text:span>,<text:span text:style-name="T10">'</text:span><text:span text:style-name="T16">PersonManag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3</text:span>,<text:span text:style-name="T10">'</text:span><text:span text:style-name="T16">EventManag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4</text:span>,<text:span text:style-name="T10">'</text:span><text:span text:style-name="T16">Redacto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5</text:span>,<text:span text:style-name="T10">'</text:span><text:span text:style-name="T16">Edito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6</text:span>,<text:span text:style-name="T10">'</text:span><text:span text:style-name="T16">HomeDesign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7</text:span>,<text:span text:style-name="T10">'</text:span><text:span text:style-name="T16">EventDesign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8</text:span>,<text:span text:style-name="T10">'</text:span><text:span text:style-name="T16">VisitorInsights</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9</text:span>,<text:span text:style-name="T10">'</text:span><text:span text:style-name="T16">MenuDesign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10</text:span>,<text:span text:style-name="T10">'</text:span><text:span text:style-name="T16">KanbanDesigne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11</text:span>,<text:span text:style-name="T10">'</text:span><text:span text:style-name="T16">Translator</text:span><text:span text:style-name="T10">'</text:span>);</text:p>
      <text:p text:style-name="P18"><text:span text:style-name="T9">INSERT INTO</text:span> <text:span text:style-name="T10">"</text:span><text:span text:style-name="T16">Authorization</text:span><text:span text:style-name="T10">"</text:span> <text:span text:style-name="T9">VALUES</text:span> (<text:span text:style-name="T11">12</text:span>,<text:span text:style-name="T10">'</text:span><text:span text:style-name="T16">CommunicationManager</text:span><text:span text:style-name="T10">'</text:span>);</text:p>
      <text:h text:style-name="Heading_20_2" text:outline-level="2">Exemple de helper</text:h>
      <text:p text:style-name="Code">&lt;?php</text:p>
      <text:p text:style-name="Code"><text:span text:style-name="T9">declare</text:span><text:span text:style-name="T10">(</text:span><text:span text:style-name="T11">strict_types</text:span><text:span text:style-name="T10">=</text:span><text:span text:style-name="T11">1</text:span><text:span text:style-name="T10">);</text:span></text:p>
      <text:p text:style-name="Code"><text:span text:style-name="T9">namespace</text:span> <text:span text:style-name="T12">app</text:span><text:span text:style-name="T13">\</text:span><text:span text:style-name="T12">helpers</text:span><text:span text:style-name="T10">;</text:span></text:p>
      <text:p text:style-name="Code"/>
      <text:p text:style-name="Code"><text:span text:style-name="T9">use</text:span> app<text:span text:style-name="T10">\</text:span>enums<text:span text:style-name="T10">\</text:span><text:span text:style-name="T12">ApplicationError</text:span><text:span text:style-name="T10">;</text:span></text:p>
      <text:p text:style-name="Code"><text:span text:style-name="T9">use</text:span> app<text:span text:style-name="T10">\</text:span>models<text:span text:style-name="T10">\</text:span><text:span text:style-name="T12">LanguagesDataHelper</text:span><text:span text:style-name="T10">;</text:span></text:p>
      <text:p text:style-name="Code"><text:span text:style-name="T9">use</text:span> app<text:span text:style-name="T10">\</text:span>models<text:span text:style-name="T10">\</text:span><text:span text:style-name="T12">LogDataWriterHelper</text:span><text:span text:style-name="T10">;</text:span></text:p>
      <text:p text:style-name="Code"><text:span text:style-name="T9">use</text:span> app<text:span text:style-name="T10">\</text:span>modules<text:span text:style-name="T10">\</text:span>Common<text:span text:style-name="T10">\</text:span><text:span text:style-name="T12">EmptyController</text:span><text:span text:style-name="T10">;</text:span></text:p>
      <text:p text:style-name="Code"/>
      <text:p text:style-name="Code"><text:span text:style-name="T14">class</text:span> <text:span text:style-name="T12">ErrorManager</text:span></text:p>
      <text:p text:style-name="Code">{</text:p>
      <text:p text:style-name="Code"><text:span text:style-name="T9">private</text:span> <text:span text:style-name="T12">LanguagesDataHelper</text:span> <text:span text:style-name="T10">$</text:span><text:span text:style-name="T14">languagesDataHelper</text:span><text:span text:style-name="T10">;</text:span></text:p>
      <text:p text:style-name="Code"><text:span text:style-name="T9">private</text:span> <text:span text:style-name="T12">LogDataWriterHelper</text:span> <text:span text:style-name="T10">$</text:span><text:span text:style-name="T14">logDataWriterHelper</text:span><text:span text:style-name="T10">;</text:span></text:p>
      <text:p text:style-name="Code"><text:span text:style-name="T9">private</text:span> <text:span text:style-name="T12">EmptyController</text:span> <text:span text:style-name="T10">$</text:span><text:span text:style-name="T14">emptyController</text:span><text:span text:style-name="T10">;</text:span></text:p>
      <text:p text:style-name="Code"/>
      <text:p text:style-name="Code"><text:span text:style-name="T9">public</text:span> <text:span text:style-name="T14">function</text:span> <text:span text:style-name="T15">__construct</text:span><text:span text:style-name="T10">(</text:span><text:span text:style-name="T9">private</text:span> <text:span text:style-name="T12">Application</text:span> <text:span text:style-name="T10">$</text:span><text:span text:style-name="T14">application</text:span><text:span text:style-name="T10">)</text:span></text:p>
      <text:p text:style-name="Code">{</text:p>
      <text:p text:style-name="Code"><text:span text:style-name="T10">$</text:span><text:span text:style-name="T11">this</text:span><text:span text:style-name="T10">-&gt;</text:span><text:span text:style-name="T14">logDataWriterHelper</text:span> <text:span text:style-name="T10">=</text:span> <text:span text:style-name="T9">new</text:span> <text:span text:style-name="T12">LogDataWriterHelper</text:span><text:span text:style-name="T10">($</text:span><text:span text:style-name="T14">application</text:span><text:span text:style-name="T10">);</text:span></text:p>
      <text:p text:style-name="Code"><text:span text:style-name="T10">$</text:span><text:span text:style-name="T11">this</text:span><text:span text:style-name="T10">-&gt;</text:span><text:span text:style-name="T14">languagesDataHelper</text:span> <text:span text:style-name="T10">=</text:span> <text:span text:style-name="T9">new</text:span> <text:span text:style-name="T12">LanguagesDataHelper</text:span><text:span text:style-name="T10">($</text:span><text:span text:style-name="T14">application</text:span><text:span text:style-name="T10">);</text:span></text:p>
      <text:p text:style-name="Code"><text:span text:style-name="T10">$</text:span><text:span text:style-name="T11">this</text:span><text:span text:style-name="T10">-&gt;</text:span><text:span text:style-name="T14">emptyController</text:span> <text:span text:style-name="T10">=</text:span> <text:span text:style-name="T9">new</text:span> <text:span text:style-name="T12">EmptyController</text:span><text:span text:style-name="T10">($</text:span><text:span text:style-name="T14">application</text:span><text:span text:style-name="T10">);</text:span></text:p>
      <text:p text:style-name="Code">}</text:p>
      <text:p text:style-name="Code"/>
      <text:p text:style-name="Code"><text:span text:style-name="T9">public</text:span> <text:span text:style-name="T14">function</text:span> <text:span text:style-name="T15">raise</text:span><text:span text:style-name="T10">(</text:span><text:span text:style-name="T12">ApplicationError</text:span> <text:span text:style-name="T10">$</text:span><text:span text:style-name="T14">code</text:span><text:span text:style-name="T10">,</text:span> <text:span text:style-name="T9">string</text:span> <text:span text:style-name="T10">$</text:span><text:span text:style-name="T14">message</text:span><text:span text:style-name="T10">,</text:span> <text:span text:style-name="T9">int</text:span> <text:span text:style-name="T10">$</text:span><text:span text:style-name="T14">timeout</text:span> <text:span text:style-name="T10">=</text:span> <text:span text:style-name="T11">1000</text:span><text:span text:style-name="T10">,</text:span> <text:span text:style-name="T9">bool</text:span> <text:span text:style-name="T10">$</text:span><text:span text:style-name="T14">displayCode</text:span> <text:span text:style-name="T10">=</text:span> <text:span text:style-name="T11">true</text:span><text:span text:style-name="T10">,</text:span> <text:span text:style-name="T9">bool</text:span> <text:span text:style-name="T10">$</text:span><text:span text:style-name="T14">isWebmaster</text:span> <text:span text:style-name="T10">=</text:span> <text:span text:style-name="T11">false</text:span><text:span text:style-name="T10">):</text:span> <text:span text:style-name="T9">void</text:span></text:p>
      <text:p text:style-name="Code">{</text:p>
      <text:p text:style-name="Code"><text:span text:style-name="T10">$</text:span><text:span text:style-name="T11">this</text:span><text:span text:style-name="T10">-&gt;</text:span><text:span text:style-name="T14">logDataWriterHelper</text:span><text:span text:style-name="T10">-&gt;</text:span><text:span text:style-name="T15">add</text:span><text:span text:style-name="T10">((</text:span><text:span text:style-name="T14">string</text:span><text:span text:style-name="T10">)$</text:span><text:span text:style-name="T14">code</text:span><text:span text:style-name="T10">-&gt;</text:span><text:span text:style-name="T14">value</text:span><text:span text:style-name="T10">,</text:span> <text:span text:style-name="T10">$</text:span><text:span text:style-name="T14">message</text:span><text:span text:style-name="T10">);</text:span></text:p>
      <text:p text:style-name="Code"><text:span text:style-name="T9">if</text:span> <text:span text:style-name="T10">($</text:span><text:span text:style-name="T11">this</text:span><text:span text:style-name="T10">-&gt;</text:span><text:span text:style-name="T15">isJsonExpected</text:span><text:span text:style-name="T10">())</text:span> <text:span text:style-name="T10">{</text:span></text:p>
      <text:p text:style-name="Code"><text:span text:style-name="T15">http_response_code</text:span><text:span text:style-name="T10">($</text:span><text:span text:style-name="T14">code</text:span><text:span text:style-name="T10">-&gt;</text:span><text:span text:style-name="T14">value</text:span><text:span text:style-name="T10">);</text:span></text:p>
      <text:p text:style-name="Code"><text:span text:style-name="T15">header</text:span><text:span text:style-name="T10">('</text:span><text:span text:style-name="T16">Content-Type: application/json; charset=utf-8</text:span><text:span text:style-name="T10">');</text:span></text:p>
      <text:p text:style-name="Code"><text:span text:style-name="T15">echo</text:span> <text:span text:style-name="T15">json_encode</text:span><text:span text:style-name="T10">([</text:span></text:p>
      <text:p text:style-name="Code"><text:span text:style-name="T10">'</text:span><text:span text:style-name="T16">code</text:span><text:span text:style-name="T10">'</text:span> <text:span text:style-name="T10">=&gt;</text:span> <text:span text:style-name="T10">$</text:span><text:span text:style-name="T14">code</text:span><text:span text:style-name="T10">-&gt;</text:span><text:span text:style-name="T14">value</text:span><text:span text:style-name="T10">,</text:span></text:p>
      <text:p text:style-name="Code"><text:span text:style-name="T10">'</text:span><text:span text:style-name="T16">message</text:span><text:span text:style-name="T10">'</text:span> <text:span text:style-name="T10">=&gt;</text:span> <text:span text:style-name="T10">$</text:span><text:span text:style-name="T14">message</text:span></text:p>
      <text:p text:style-name="Code">]);</text:p>
      <text:p text:style-name="Code"><text:span text:style-name="T9">return</text:span><text:span text:style-name="T10">;</text:span></text:p>
      <text:p text:style-name="Code">}</text:p>
      <text:p text:style-name="Code">// for test with curl</text:p>
      <text:p text:style-name="Code"><text:span text:style-name="T10">$</text:span><text:span text:style-name="T14">ua</text:span> <text:span text:style-name="T10">=</text:span> <text:span text:style-name="T10">$</text:span><text:span text:style-name="T14">_SERVER</text:span><text:span text:style-name="T10">['</text:span><text:span text:style-name="T16">HTTP_USER_AGENT</text:span><text:span text:style-name="T10">']</text:span> <text:span text:style-name="T10">??</text:span> <text:span text:style-name="T10">'';</text:span></text:p>
      <text:p text:style-name="Code"><text:span text:style-name="T9">if</text:span> <text:span text:style-name="T10">(</text:span><text:span text:style-name="T15">stripos</text:span><text:span text:style-name="T10">($</text:span><text:span text:style-name="T14">ua</text:span><text:span text:style-name="T10">,</text:span> <text:span text:style-name="T10">'</text:span><text:span text:style-name="T16">TestDevice</text:span><text:span text:style-name="T10">')</text:span> <text:span text:style-name="T10">!==</text:span> <text:span text:style-name="T11">false</text:span><text:span text:style-name="T10">)</text:span> <text:span text:style-name="T10">{</text:span></text:p>
      <text:p text:style-name="Code"><text:span text:style-name="T10">$</text:span><text:span text:style-name="T11">this</text:span><text:span text:style-name="T10">-&gt;</text:span><text:span text:style-name="T14">application</text:span><text:span text:style-name="T10">-&gt;</text:span><text:span text:style-name="T15">getFlight</text:span><text:span text:style-name="T10">()-&gt;</text:span><text:span text:style-name="T15">response</text:span><text:span text:style-name="T10">()-&gt;</text:span><text:span text:style-name="T15">status</text:span><text:span text:style-name="T10">($</text:span><text:span text:style-name="T14">code</text:span><text:span text:style-name="T10">-&gt;</text:span><text:span text:style-name="T14">value</text:span><text:span text:style-name="T10">);</text:span></text:p>
      <text:p text:style-name="Code"><text:soft-page-break/><text:span text:style-name="T10">$</text:span><text:span text:style-name="T11">this</text:span><text:span text:style-name="T10">-&gt;</text:span><text:span text:style-name="T14">application</text:span><text:span text:style-name="T10">-&gt;</text:span><text:span text:style-name="T15">getFlight</text:span><text:span text:style-name="T10">()-&gt;</text:span><text:span text:style-name="T15">response</text:span><text:span text:style-name="T10">()-&gt;</text:span><text:span text:style-name="T15">write</text:span><text:span text:style-name="T10">($</text:span><text:span text:style-name="T14">message</text:span><text:span text:style-name="T10">);</text:span></text:p>
      <text:p text:style-name="Code"><text:span text:style-name="T9">return</text:span><text:span text:style-name="T10">;</text:span></text:p>
      <text:p text:style-name="Code">}</text:p>
      <text:p text:style-name="Code"><text:span text:style-name="T10">$</text:span><text:span text:style-name="T14">translation</text:span> <text:span text:style-name="T10">=</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6">Error</text:span><text:span text:style-name="T10">'</text:span> <text:span text:style-name="T10">.</text:span> <text:span text:style-name="T10">$</text:span><text:span text:style-name="T14">code</text:span><text:span text:style-name="T10">-&gt;</text:span><text:span text:style-name="T14">value</text:span><text:span text:style-name="T10">);</text:span></text:p>
      <text:p text:style-name="Code"><text:span text:style-name="T10">$</text:span><text:span text:style-name="T14">result</text:span> <text:span text:style-name="T10">=</text:span> <text:span text:style-name="T10">'';</text:span></text:p>
      <text:p text:style-name="Code"><text:span text:style-name="T9">if</text:span> <text:span text:style-name="T10">($</text:span><text:span text:style-name="T14">translation</text:span> <text:span text:style-name="T10">!=</text:span> <text:span text:style-name="T10">"</text:span><text:span text:style-name="T16">-- Error</text:span><text:span text:style-name="T10">{$</text:span><text:span text:style-name="T14">code</text:span><text:span text:style-name="T10">-&gt;</text:span><text:span text:style-name="T14">value</text:span><text:span text:style-name="T10">}</text:span><text:span text:style-name="T16"> --</text:span><text:span text:style-name="T10">")</text:span> <text:span text:style-name="T10">$</text:span><text:span text:style-name="T14">result</text:span> <text:span text:style-name="T10">=</text:span> <text:span text:style-name="T10">$</text:span><text:span text:style-name="T14">translation</text:span><text:span text:style-name="T10">;</text:span></text:p>
      <text:p text:style-name="Code"><text:span text:style-name="T9">if</text:span> <text:span text:style-name="T10">($</text:span><text:span text:style-name="T14">result</text:span> <text:span text:style-name="T10">===</text:span> <text:span text:style-name="T10">'')</text:span> <text:span text:style-name="T10">{</text:span></text:p>
      <text:p text:style-name="Code"><text:span text:style-name="T9">if</text:span> <text:span text:style-name="T10">($</text:span><text:span text:style-name="T14">displayCode</text:span><text:span text:style-name="T10">)</text:span> <text:span text:style-name="T10">$</text:span><text:span text:style-name="T14">result</text:span> <text:span text:style-name="T10">.=</text:span> <text:span text:style-name="T10">"</text:span><text:span text:style-name="T16">&lt;h1&gt;</text:span><text:span text:style-name="T10">{$</text:span><text:span text:style-name="T14">code</text:span><text:span text:style-name="T10">-&gt;</text:span><text:span text:style-name="T14">value</text:span><text:span text:style-name="T10">}</text:span><text:span text:style-name="T16">&lt;/h1&gt;</text:span><text:span text:style-name="T10">";</text:span></text:p>
      <text:p text:style-name="Code"><text:span text:style-name="T10">$</text:span><text:span text:style-name="T14">result</text:span> <text:span text:style-name="T10">.=</text:span> <text:span text:style-name="T10">"</text:span><text:span text:style-name="T16">&lt;h2&gt;</text:span><text:span text:style-name="T10">$</text:span><text:span text:style-name="T14">message</text:span><text:span text:style-name="T16">&lt;/h2&gt;</text:span><text:span text:style-name="T10">";</text:span></text:p>
      <text:p text:style-name="Code"><text:span text:style-name="T10">}</text:span> <text:span text:style-name="T9">else</text:span> <text:span text:style-name="T10">$</text:span><text:span text:style-name="T14">timeout</text:span> <text:span text:style-name="T10">=</text:span> <text:span text:style-name="T15">max</text:span><text:span text:style-name="T10">($</text:span><text:span text:style-name="T14">code</text:span> <text:span text:style-name="T10">===</text:span> <text:span text:style-name="T12">ApplicationError</text:span><text:span text:style-name="T10">::</text:span><text:span text:style-name="T11">Error</text:span> <text:span text:style-name="T10">?</text:span> <text:span text:style-name="T11">30000</text:span> <text:span text:style-name="T10">:</text:span> <text:span text:style-name="T11">5000</text:span><text:span text:style-name="T10">,</text:span> <text:span text:style-name="T10">$</text:span><text:span text:style-name="T14">timeout</text:span><text:span text:style-name="T10">);</text:span></text:p>
      <text:p text:style-name="Code"><text:span text:style-name="T9">if</text:span> <text:span text:style-name="T10">($</text:span><text:span text:style-name="T14">code</text:span> <text:span text:style-name="T10">==</text:span> <text:span text:style-name="T12">ApplicationError</text:span><text:span text:style-name="T10">::</text:span><text:span text:style-name="T11">ServiceUnavailable</text:span> <text:span text:style-name="T10">&amp;&amp;</text:span> <text:span text:style-name="T10">$</text:span><text:span text:style-name="T14">isWebmaster</text:span><text:span text:style-name="T10">)</text:span> <text:span text:style-name="T10">{</text:span></text:p>
      <text:p text:style-name="Code"><text:span text:style-name="T10">$</text:span><text:span text:style-name="T14">result</text:span> <text:span text:style-name="T10">=</text:span> <text:span text:style-name="T15">str_replace</text:span><text:span text:style-name="T10">(</text:span></text:p>
      <text:p text:style-name="Code"><text:span text:style-name="T10">'</text:span><text:span text:style-name="T16">&lt;a href="/" class="btn btn-primary mt-3"&gt;Retourner à l’accueil maintenant&lt;/a&gt;</text:span><text:span text:style-name="T10">',</text:span></text:p>
      <text:p text:style-name="Code"><text:span text:style-name="T10">'</text:span><text:span text:style-name="T16">&lt;a href="/" class="btn btn-primary mt-3"&gt;Retourner à l’accueil maintenant&lt;/a&gt;</text:span></text:p>
      <text:p text:style-name="Code"><text:span text:style-name="T16">&lt;p&gt;&lt;a href="/maintenance/unset" class="btn btn-danger mt-3"&gt;Cancel maintenance&lt;/a&gt;&lt;/p&gt;</text:span><text:span text:style-name="T10">',</text:span></text:p>
      <text:p text:style-name="Code"><text:span text:style-name="T10">$</text:span><text:span text:style-name="T14">result</text:span></text:p>
      <text:p text:style-name="Code">);</text:p>
      <text:p text:style-name="Code">}</text:p>
      <text:p text:style-name="Code"><text:span text:style-name="T10">$</text:span><text:span text:style-name="T11">this</text:span><text:span text:style-name="T10">-&gt;</text:span><text:span text:style-name="T14">application</text:span><text:span text:style-name="T10">-&gt;</text:span><text:span text:style-name="T15">getFlight</text:span><text:span text:style-name="T10">()-&gt;</text:span><text:span text:style-name="T15">response</text:span><text:span text:style-name="T10">()-&gt;</text:span><text:span text:style-name="T15">status</text:span><text:span text:style-name="T10">($</text:span><text:span text:style-name="T14">code</text:span><text:span text:style-name="T10">-&gt;</text:span><text:span text:style-name="T14">value</text:span><text:span text:style-name="T10">);</text:span></text:p>
      <text:p text:style-name="Code"><text:span text:style-name="T10">$</text:span><text:span text:style-name="T11">this</text:span><text:span text:style-name="T10">-&gt;</text:span><text:span text:style-name="T14">emptyController</text:span><text:span text:style-name="T10">-&gt;</text:span><text:span text:style-name="T15">render</text:span><text:span text:style-name="T10">('</text:span><text:span text:style-name="T16">Common/views/info.latte</text:span><text:span text:style-name="T10">',</text:span> <text:span text:style-name="T10">[</text:span></text:p>
      <text:p text:style-name="Code"><text:span text:style-name="T10">'</text:span><text:span text:style-name="T16">content</text:span><text:span text:style-name="T10">'</text:span> <text:span text:style-name="T10">=&gt;</text:span> <text:span text:style-name="T10">$</text:span><text:span text:style-name="T14">result</text:span><text:span text:style-name="T10">,</text:span></text:p>
      <text:p text:style-name="Code"><text:span text:style-name="T10">'</text:span><text:span text:style-name="T16">hasAuthorization</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hasAutorization</text:span><text:span text:style-name="T10">()</text:span> <text:span text:style-name="T10">??</text:span> <text:span text:style-name="T11">false</text:span><text:span text:style-name="T10">,</text:span></text:p>
      <text:p text:style-name="Code"><text:span text:style-name="T10">'</text:span><text:span text:style-name="T16">currentVersion</text:span><text:span text:style-name="T10">'</text:span> <text:span text:style-name="T10">=&gt;</text:span> <text:span text:style-name="T12">Application</text:span><text:span text:style-name="T10">::</text:span><text:span text:style-name="T11">VERSION</text:span><text:span text:style-name="T10">,</text:span></text:p>
      <text:p text:style-name="Code"><text:span text:style-name="T10">'</text:span><text:span text:style-name="T16">timer</text:span><text:span text:style-name="T10">'</text:span> <text:span text:style-name="T10">=&gt;</text:span> <text:span text:style-name="T10">$</text:span><text:span text:style-name="T14">timeout</text:span><text:span text:style-name="T10">,</text:span></text:p>
      <text:p text:style-name="Code"><text:span text:style-name="T10">'</text:span><text:span text:style-name="T16">previousPage</text:span><text:span text:style-name="T10">'</text:span> <text:span text:style-name="T10">=&gt;</text:span> <text:span text:style-name="T11">false</text:span><text:span text:style-name="T10">,</text:span></text:p>
      <text:p text:style-name="Code"><text:span text:style-name="T10">'</text:span><text:span text:style-name="T16">page</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getPage</text:span><text:span text:style-name="T10">(),</text:span></text:p>
      <text:p text:style-name="Code">]);</text:p>
      <text:p text:style-name="Code"><text:span text:style-name="T9">if</text:span> <text:span text:style-name="T10">($</text:span><text:span text:style-name="T14">code</text:span> <text:span text:style-name="T10">!=</text:span> <text:span text:style-name="T12">ApplicationError</text:span><text:span text:style-name="T10">::</text:span><text:span text:style-name="T11">Ok</text:span><text:span text:style-name="T10">)</text:span> <text:span text:style-name="T9">exit</text:span><text:span text:style-name="T10">;</text:span></text:p>
      <text:p text:style-name="Code"><text:span text:style-name="T12">Application</text:span><text:span text:style-name="T10">::</text:span><text:span text:style-name="T15">unreachable</text:span><text:span text:style-name="T10">("</text:span><text:span text:style-name="T16">Ok isn't an error</text:span><text:span text:style-name="T10">",</text:span> <text:span text:style-name="T11">__FILE__</text:span><text:span text:style-name="T10">,</text:span> <text:span text:style-name="T11">__LINE__</text:span><text:span text:style-name="T10">);</text:span></text:p>
      <text:p text:style-name="Code">}</text:p>
      <text:p text:style-name="Code"/>
      <text:p text:style-name="Code"><text:span text:style-name="T9">private</text:span> <text:span text:style-name="T14">function</text:span> <text:span text:style-name="T15">isJsonExpected</text:span><text:span text:style-name="T10">():</text:span> <text:span text:style-name="T9">bool</text:span></text:p>
      <text:p text:style-name="Code">{</text:p>
      <text:p text:style-name="Code"><text:span text:style-name="T10">$</text:span><text:span text:style-name="T14">accept</text:span> <text:span text:style-name="T10">=</text:span> <text:span text:style-name="T10">$</text:span><text:span text:style-name="T14">_SERVER</text:span><text:span text:style-name="T10">['</text:span><text:span text:style-name="T16">HTTP_ACCEPT</text:span><text:span text:style-name="T10">']</text:span> <text:span text:style-name="T10">??</text:span> <text:span text:style-name="T10">'';</text:span></text:p>
      <text:p text:style-name="Code"><text:span text:style-name="T9">return</text:span> <text:span text:style-name="T15">str_contains</text:span><text:span text:style-name="T10">($</text:span><text:span text:style-name="T14">accept</text:span><text:span text:style-name="T10">,</text:span> <text:span text:style-name="T10">'</text:span><text:span text:style-name="T16">application/json</text:span><text:span text:style-name="T10">');</text:span></text:p>
      <text:p text:style-name="Code">}</text:p>
      <text:p text:style-name="Code">}</text:p>
      <text:h text:style-name="P22" text:outline-level="2">Exemple de <text:span text:style-name="T26">enum</text:span></text:h>
      <text:p text:style-name="Code">&lt;?php</text:p>
      <text:p text:style-name="Code"/>
      <text:p text:style-name="Code"><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enums</text:span><text:span text:style-name="T10">;</text:span></text:p>
      <text:p text:style-name="Code"/>
      <text:p text:style-name="Code"><text:span text:style-name="T9">use</text:span> <text:span text:style-name="T12">DateTimeImmutable</text:span><text:span text:style-name="T10">;</text:span></text:p>
      <text:p text:style-name="Code"><text:span text:style-name="T9">use</text:span> <text:span text:style-name="T10">\</text:span>flight<text:span text:style-name="T10">\</text:span>net<text:span text:style-name="T10">\</text:span><text:span text:style-name="T12">Request</text:span><text:span text:style-name="T10">;</text:span></text:p>
      <text:p text:style-name="Code"/>
      <text:p text:style-name="Code"><text:span text:style-name="T9">use</text:span> app<text:span text:style-name="T10">\</text:span>helpers<text:span text:style-name="T10">\</text:span><text:span text:style-name="T12">Application</text:span><text:span text:style-name="T10">;</text:span></text:p>
      <text:p text:style-name="Code"><text:span text:style-name="T9">use</text:span> app<text:span text:style-name="T10">\</text:span>helpers<text:span text:style-name="T10">\</text:span><text:span text:style-name="T12">WebApp</text:span><text:span text:style-name="T10">;</text:span></text:p>
      <text:p text:style-name="Code"><text:span text:style-name="T9">use</text:span> app<text:span text:style-name="T10">\</text:span>models<text:span text:style-name="T10">\</text:span><text:span text:style-name="T12">LanguagesDataHelper</text:span><text:span text:style-name="T10">;</text:span></text:p>
      <text:p text:style-name="Code"/>
      <text:p text:style-name="Code"><text:span text:style-name="T14">enum</text:span> <text:span text:style-name="T12">Period</text:span><text:span text:style-name="T10">:</text:span> <text:span text:style-name="T9">string</text:span></text:p>
      <text:p text:style-name="Code">{</text:p>
      <text:p text:style-name="Code"><text:span text:style-name="T14">case</text:span> <text:span text:style-name="T11">Day</text:span> <text:span text:style-name="T10">=</text:span> <text:span text:style-name="T10">'</text:span><text:span text:style-name="T16">day</text:span><text:span text:style-name="T10">';</text:span></text:p>
      <text:p text:style-name="Code"><text:span text:style-name="T14">case</text:span> <text:span text:style-name="T11">Week</text:span> <text:span text:style-name="T10">=</text:span> <text:span text:style-name="T10">'</text:span><text:span text:style-name="T16">week</text:span><text:span text:style-name="T10">';</text:span></text:p>
      <text:p text:style-name="Code"><text:soft-page-break/><text:span text:style-name="T14">case</text:span> <text:span text:style-name="T11">Month</text:span> <text:span text:style-name="T10">=</text:span> <text:span text:style-name="T10">'</text:span><text:span text:style-name="T16">month</text:span><text:span text:style-name="T10">';</text:span></text:p>
      <text:p text:style-name="Code"><text:span text:style-name="T14">case</text:span> <text:span text:style-name="T11">Quarter</text:span> <text:span text:style-name="T10">=</text:span> <text:span text:style-name="T10">'</text:span><text:span text:style-name="T16">quarter</text:span><text:span text:style-name="T10">';</text:span></text:p>
      <text:p text:style-name="Code"><text:span text:style-name="T14">case</text:span> <text:span text:style-name="T11">Year</text:span> <text:span text:style-name="T10">=</text:span> <text:span text:style-name="T10">'</text:span><text:span text:style-name="T16">year</text:span><text:span text:style-name="T10">';</text:span></text:p>
      <text:p text:style-name="Code"/>
      <text:p text:style-name="Code"><text:span text:style-name="T14">case</text:span> <text:span text:style-name="T11">BeforeYesterday</text:span> <text:span text:style-name="T10">=</text:span> <text:span text:style-name="T10">'</text:span><text:span text:style-name="T16">beforeYesterday</text:span><text:span text:style-name="T10">';</text:span></text:p>
      <text:p text:style-name="Code"><text:span text:style-name="T14">case</text:span> <text:span text:style-name="T11">Yesterday</text:span> <text:span text:style-name="T10">=</text:span> <text:span text:style-name="T10">'</text:span><text:span text:style-name="T16">yesterday</text:span><text:span text:style-name="T10">';</text:span></text:p>
      <text:p text:style-name="Code"><text:span text:style-name="T14">case</text:span> <text:span text:style-name="T11">Today</text:span> <text:span text:style-name="T10">=</text:span> <text:span text:style-name="T10">'</text:span><text:span text:style-name="T16">today</text:span><text:span text:style-name="T10">';</text:span></text:p>
      <text:p text:style-name="Code"><text:span text:style-name="T14">case</text:span> <text:span text:style-name="T11">Tomorrow</text:span> <text:span text:style-name="T10">=</text:span> <text:span text:style-name="T10">'</text:span><text:span text:style-name="T16">tomorrow</text:span><text:span text:style-name="T10">';</text:span></text:p>
      <text:p text:style-name="Code"><text:span text:style-name="T14">case</text:span> <text:span text:style-name="T11">NextWeek</text:span> <text:span text:style-name="T10">=</text:span> <text:span text:style-name="T10">'</text:span><text:span text:style-name="T16">nextWeek</text:span><text:span text:style-name="T10">';</text:span></text:p>
      <text:p text:style-name="Code"/>
      <text:p text:style-name="Code"><text:span text:style-name="T14">case</text:span> <text:span text:style-name="T11">Signin</text:span> <text:span text:style-name="T10">=</text:span> <text:span text:style-name="T10">'</text:span><text:span text:style-name="T16">signin</text:span><text:span text:style-name="T10">';</text:span></text:p>
      <text:p text:style-name="Code"><text:span text:style-name="T14">case</text:span> <text:span text:style-name="T11">Signout</text:span> <text:span text:style-name="T10">=</text:span> <text:span text:style-name="T10">'</text:span><text:span text:style-name="T16">signout</text:span><text:span text:style-name="T10">';</text:span></text:p>
      <text:p text:style-name="Code"/>
      <text:p text:style-name="Code"><text:span text:style-name="T9">public</text:span> <text:span text:style-name="T14">function</text:span> <text:span text:style-name="T15">dateRange</text:span><text:span text:style-name="T10">():</text:span> <text:span text:style-name="T9">array</text:span></text:p>
      <text:p text:style-name="Code">{</text:p>
      <text:p text:style-name="Code"><text:span text:style-name="T10">$</text:span><text:span text:style-name="T14">end</text:span> <text:span text:style-name="T10">=</text:span> <text:span text:style-name="T15">date</text:span><text:span text:style-name="T10">('</text:span><text:span text:style-name="T16">Y-m-d H:i:s</text:span><text:span text:style-name="T10">');</text:span></text:p>
      <text:p text:style-name="Code"><text:span text:style-name="T10">$</text:span><text:span text:style-name="T14">start</text:span> <text:span text:style-name="T10">=</text:span> <text:span text:style-name="T9">match</text:span> <text:span text:style-name="T10">($</text:span><text:span text:style-name="T11">this</text:span><text:span text:style-name="T10">)</text:span> <text:span text:style-name="T10">{</text:span></text:p>
      <text:p text:style-name="Code"><text:span text:style-name="T14">self</text:span><text:span text:style-name="T10">::</text:span><text:span text:style-name="T11">Week</text:span> <text:span text:style-name="T9">=&gt;</text:span> <text:span text:style-name="T15">date</text:span><text:span text:style-name="T10">('</text:span><text:span text:style-name="T16">Y-m-d H:i:s</text:span><text:span text:style-name="T10">',</text:span> <text:span text:style-name="T15">strtotime</text:span><text:span text:style-name="T10">('</text:span><text:span text:style-name="T16">-1 week</text:span><text:span text:style-name="T10">')),</text:span></text:p>
      <text:p text:style-name="Code"><text:span text:style-name="T14">self</text:span><text:span text:style-name="T10">::</text:span><text:span text:style-name="T11">Month</text:span> <text:span text:style-name="T9">=&gt;</text:span> <text:span text:style-name="T15">date</text:span><text:span text:style-name="T10">('</text:span><text:span text:style-name="T16">Y-m-d H:i:s</text:span><text:span text:style-name="T10">',</text:span> <text:span text:style-name="T15">strtotime</text:span><text:span text:style-name="T10">('</text:span><text:span text:style-name="T16">-1 month</text:span><text:span text:style-name="T10">')),</text:span></text:p>
      <text:p text:style-name="Code"><text:span text:style-name="T14">self</text:span><text:span text:style-name="T10">::</text:span><text:span text:style-name="T11">Quarter</text:span> <text:span text:style-name="T9">=&gt;</text:span> <text:span text:style-name="T15">date</text:span><text:span text:style-name="T10">('</text:span><text:span text:style-name="T16">Y-m-d H:i:s</text:span><text:span text:style-name="T10">',</text:span> <text:span text:style-name="T15">strtotime</text:span><text:span text:style-name="T10">('</text:span><text:span text:style-name="T16">-3 months</text:span><text:span text:style-name="T10">')),</text:span></text:p>
      <text:p text:style-name="Code"><text:span text:style-name="T14">self</text:span><text:span text:style-name="T10">::</text:span><text:span text:style-name="T11">Year</text:span> <text:span text:style-name="T9">=&gt;</text:span> <text:span text:style-name="T15">date</text:span><text:span text:style-name="T10">('</text:span><text:span text:style-name="T16">Y-m-d H:i:s</text:span><text:span text:style-name="T10">',</text:span> <text:span text:style-name="T15">strtotime</text:span><text:span text:style-name="T10">('</text:span><text:span text:style-name="T16">-1 year</text:span><text:span text:style-name="T10">')),</text:span></text:p>
      <text:p text:style-name="Code"><text:span text:style-name="T9">default</text:span> <text:span text:style-name="T9">=&gt;</text:span> <text:span text:style-name="T10">'</text:span><text:span text:style-name="T16">1970-01-01 00:00:00</text:span><text:span text:style-name="T10">',</text:span></text:p>
      <text:p text:style-name="Code">};</text:p>
      <text:p text:style-name="Code"><text:span text:style-name="T9">return</text:span> <text:span text:style-name="T10">['</text:span><text:span text:style-name="T16">start</text:span><text:span text:style-name="T10">'</text:span> <text:span text:style-name="T10">=&gt;</text:span> <text:span text:style-name="T10">$</text:span><text:span text:style-name="T14">start</text:span><text:span text:style-name="T10">,</text:span> <text:span text:style-name="T10">'</text:span><text:span text:style-name="T16">end</text:span><text:span text:style-name="T10">'</text:span> <text:span text:style-name="T10">=&gt;</text:span> <text:span text:style-name="T10">$</text:span><text:span text:style-name="T14">end</text:span><text:span text:style-name="T10">];</text:span></text:p>
      <text:p text:style-name="Code">}</text:p>
      <text:p text:style-name="Code"/>
      <text:p text:style-name="Code"><text:span text:style-name="T9">public</text:span> <text:span text:style-name="T14">function</text:span> <text:span text:style-name="T15">dateConditions</text:span><text:span text:style-name="T10">(</text:span><text:span text:style-name="T9">string</text:span> <text:span text:style-name="T10">$</text:span><text:span text:style-name="T14">field</text:span><text:span text:style-name="T10">):</text:span> <text:span text:style-name="T9">string</text:span></text:p>
      <text:p text:style-name="Code">{</text:p>
      <text:p text:style-name="Code"><text:span text:style-name="T9">return</text:span> <text:span text:style-name="T9">match</text:span> <text:span text:style-name="T10">($</text:span><text:span text:style-name="T11">this</text:span><text:span text:style-name="T10">)</text:span> <text:span text:style-name="T10">{</text:span></text:p>
      <text:p text:style-name="Code"><text:span text:style-name="T14">self</text:span><text:span text:style-name="T10">::</text:span><text:span text:style-name="T11">Today</text:span> <text:span text:style-name="T9">=&gt;</text:span> <text:span text:style-name="T10">"</text:span><text:span text:style-name="T16">date(</text:span><text:span text:style-name="T10">{$</text:span><text:span text:style-name="T14">field</text:span><text:span text:style-name="T10">}</text:span><text:span text:style-name="T16">) = date('now')</text:span><text:span text:style-name="T10">",</text:span></text:p>
      <text:p text:style-name="Code"><text:span text:style-name="T14">self</text:span><text:span text:style-name="T10">::</text:span><text:span text:style-name="T11">Yesterday</text:span> <text:span text:style-name="T9">=&gt;</text:span> <text:span text:style-name="T10">"</text:span><text:span text:style-name="T16">date(</text:span><text:span text:style-name="T10">{$</text:span><text:span text:style-name="T14">field</text:span><text:span text:style-name="T10">}</text:span><text:span text:style-name="T16">) = date('now', '-1 days')</text:span><text:span text:style-name="T10">",</text:span></text:p>
      <text:p text:style-name="Code"><text:span text:style-name="T14">self</text:span><text:span text:style-name="T10">::</text:span><text:span text:style-name="T11">BeforeYesterday</text:span> <text:span text:style-name="T9">=&gt;</text:span> <text:span text:style-name="T10">"</text:span><text:span text:style-name="T16">date(</text:span><text:span text:style-name="T10">{$</text:span><text:span text:style-name="T14">field</text:span><text:span text:style-name="T10">}</text:span><text:span text:style-name="T16">) = date('now', '-2 days')</text:span><text:span text:style-name="T10">",</text:span></text:p>
      <text:p text:style-name="Code"><text:span text:style-name="T14">self</text:span><text:span text:style-name="T10">::</text:span><text:span text:style-name="T11">Week</text:span> <text:span text:style-name="T9">=&gt;</text:span> <text:span text:style-name="T10">"</text:span><text:span text:style-name="T16">date(</text:span><text:span text:style-name="T10">{$</text:span><text:span text:style-name="T14">field</text:span><text:span text:style-name="T10">}</text:span><text:span text:style-name="T16">) &gt;= date('now', '-7 days')</text:span><text:span text:style-name="T10">",</text:span></text:p>
      <text:p text:style-name="Code"><text:span text:style-name="T14">self</text:span><text:span text:style-name="T10">::</text:span><text:span text:style-name="T11">Month</text:span> <text:span text:style-name="T9">=&gt;</text:span> <text:span text:style-name="T10">"</text:span><text:span text:style-name="T16">date(</text:span><text:span text:style-name="T10">{$</text:span><text:span text:style-name="T14">field</text:span><text:span text:style-name="T10">}</text:span><text:span text:style-name="T16">) &gt;= date('now', '-30 days')</text:span><text:span text:style-name="T10">",</text:span></text:p>
      <text:p text:style-name="Code"><text:span text:style-name="T14">self</text:span><text:span text:style-name="T10">::</text:span><text:span text:style-name="T11">Quarter</text:span> <text:span text:style-name="T9">=&gt;</text:span> <text:span text:style-name="T10">"</text:span><text:span text:style-name="T16">date(</text:span><text:span text:style-name="T10">{$</text:span><text:span text:style-name="T14">field</text:span><text:span text:style-name="T10">}</text:span><text:span text:style-name="T16">) &gt;= date('now', '-3 months')</text:span><text:span text:style-name="T10">",</text:span></text:p>
      <text:p text:style-name="Code"><text:span text:style-name="T14">self</text:span><text:span text:style-name="T10">::</text:span><text:span text:style-name="T11">Year</text:span> <text:span text:style-name="T9">=&gt;</text:span> <text:span text:style-name="T10">"</text:span><text:span text:style-name="T16">date(</text:span><text:span text:style-name="T10">{$</text:span><text:span text:style-name="T14">field</text:span><text:span text:style-name="T10">}</text:span><text:span text:style-name="T16">) &gt;= date('now', '-1 years')</text:span><text:span text:style-name="T10">",</text:span></text:p>
      <text:p text:style-name="Code"><text:span text:style-name="T9">default</text:span> <text:span text:style-name="T9">=&gt;</text:span> <text:span text:style-name="T10">'</text:span><text:span text:style-name="T16">1=1</text:span><text:span text:style-name="T10">',</text:span></text:p>
      <text:p text:style-name="Code">};</text:p>
      <text:p text:style-name="Code">}</text:p>
      <text:p text:style-name="Code"/>
      <text:p text:style-name="Code"><text:span text:style-name="T9">public</text:span> <text:span text:style-name="T9">static</text:span> <text:span text:style-name="T14">function</text:span> <text:span text:style-name="T15">fromRequest</text:span><text:span text:style-name="T10">(</text:span><text:span text:style-name="T12">Application</text:span> <text:span text:style-name="T10">$</text:span><text:span text:style-name="T14">application</text:span><text:span text:style-name="T10">,</text:span> <text:span text:style-name="T12">Request</text:span> <text:span text:style-name="T10">$</text:span><text:span text:style-name="T14">request</text:span><text:span text:style-name="T10">):</text:span> <text:span text:style-name="T14">self</text:span></text:p>
      <text:p text:style-name="Code">{</text:p>
      <text:p text:style-name="Code"><text:span text:style-name="T10">$</text:span><text:span text:style-name="T14">value</text:span> <text:span text:style-name="T10">=</text:span> <text:span text:style-name="T12">WebApp</text:span><text:span text:style-name="T10">::</text:span><text:span text:style-name="T15">getFiltered</text:span><text:span text:style-name="T10">(</text:span></text:p>
      <text:p text:style-name="Code"><text:span text:style-name="T10">'</text:span><text:span text:style-name="T16">period</text:span><text:span text:style-name="T10">',</text:span></text:p>
      <text:p text:style-name="Code"><text:span text:style-name="T10">$</text:span><text:span text:style-name="T14">application</text:span><text:span text:style-name="T10">-&gt;</text:span><text:span text:style-name="T15">enumToValues</text:span><text:span text:style-name="T10">(</text:span><text:span text:style-name="T14">self</text:span><text:span text:style-name="T10">::</text:span><text:span text:style-name="T9">class</text:span><text:span text:style-name="T10">),</text:span></text:p>
      <text:p text:style-name="Code"><text:span text:style-name="T10">$</text:span><text:span text:style-name="T14">request</text:span><text:span text:style-name="T10">-&gt;</text:span><text:span text:style-name="T14">query</text:span><text:span text:style-name="T10">-&gt;</text:span><text:span text:style-name="T15">getData</text:span><text:span text:style-name="T10">()</text:span></text:p>
      <text:p text:style-name="Code">);</text:p>
      <text:p text:style-name="Code"><text:span text:style-name="T9">return</text:span> <text:span text:style-name="T15">is_string</text:span><text:span text:style-name="T10">($</text:span><text:span text:style-name="T14">value</text:span><text:span text:style-name="T10">)</text:span></text:p>
      <text:p text:style-name="Code"><text:span text:style-name="T10">?</text:span> <text:span text:style-name="T10">(</text:span><text:span text:style-name="T14">self</text:span><text:span text:style-name="T10">::</text:span><text:span text:style-name="T15">tryFrom</text:span><text:span text:style-name="T10">($</text:span><text:span text:style-name="T14">value</text:span><text:span text:style-name="T10">)</text:span> <text:span text:style-name="T10">??</text:span> <text:span text:style-name="T14">self</text:span><text:span text:style-name="T10">::</text:span><text:span text:style-name="T11">Week</text:span><text:span text:style-name="T10">)</text:span></text:p>
      <text:p text:style-name="Code"><text:span text:style-name="T10">:</text:span> <text:span text:style-name="T14">self</text:span><text:span text:style-name="T10">::</text:span><text:span text:style-name="T11">Week</text:span><text:span text:style-name="T10">;</text:span></text:p>
      <text:p text:style-name="Code">}</text:p>
      <text:p text:style-name="Code"/>
      <text:p text:style-name="Code"><text:span text:style-name="T9">public</text:span> <text:span text:style-name="T14">function</text:span> <text:span text:style-name="T15">getStart</text:span><text:span text:style-name="T10">():</text:span> <text:span text:style-name="T12">DateTimeImmutable</text:span></text:p>
      <text:p text:style-name="Code">{</text:p>
      <text:p text:style-name="Code"><text:span text:style-name="T9">return</text:span> <text:span text:style-name="T9">new</text:span> <text:span text:style-name="T12">DateTimeImmutable</text:span><text:span text:style-name="T10">(</text:span><text:span text:style-name="T9">match</text:span> <text:span text:style-name="T10">($</text:span><text:span text:style-name="T11">this</text:span><text:span text:style-name="T10">)</text:span> <text:span text:style-name="T10">{</text:span></text:p>
      <text:p text:style-name="Code"><text:span text:style-name="T14">self</text:span><text:span text:style-name="T10">::</text:span><text:span text:style-name="T11">Today</text:span> <text:span text:style-name="T9">=&gt;</text:span> <text:span text:style-name="T10">'</text:span><text:span text:style-name="T16">today 00:00:00</text:span><text:span text:style-name="T10">',</text:span></text:p>
      <text:p text:style-name="Code"><text:span text:style-name="T14">self</text:span><text:span text:style-name="T10">::</text:span><text:span text:style-name="T11">Yesterday</text:span> <text:span text:style-name="T9">=&gt;</text:span> <text:span text:style-name="T10">'</text:span><text:span text:style-name="T16">yesterday 00:00:00</text:span><text:span text:style-name="T10">',</text:span></text:p>
      <text:p text:style-name="Code"><text:soft-page-break/><text:span text:style-name="T14">self</text:span><text:span text:style-name="T10">::</text:span><text:span text:style-name="T11">BeforeYesterday</text:span> <text:span text:style-name="T9">=&gt;</text:span> <text:span text:style-name="T15">date</text:span><text:span text:style-name="T10">('</text:span><text:span text:style-name="T16">Y-m-d 00:00:00</text:span><text:span text:style-name="T10">',</text:span> <text:span text:style-name="T15">strtotime</text:span><text:span text:style-name="T10">('</text:span><text:span text:style-name="T16">-2 days</text:span><text:span text:style-name="T10">')),</text:span></text:p>
      <text:p text:style-name="Code"><text:span text:style-name="T14">self</text:span><text:span text:style-name="T10">::</text:span><text:span text:style-name="T11">Week</text:span> <text:span text:style-name="T9">=&gt;</text:span> <text:span text:style-name="T15">date</text:span><text:span text:style-name="T10">('</text:span><text:span text:style-name="T16">Y-m-d 00:00:00</text:span><text:span text:style-name="T10">',</text:span> <text:span text:style-name="T15">strtotime</text:span><text:span text:style-name="T10">('</text:span><text:span text:style-name="T16">-7 days</text:span><text:span text:style-name="T10">')),</text:span></text:p>
      <text:p text:style-name="Code"><text:span text:style-name="T14">self</text:span><text:span text:style-name="T10">::</text:span><text:span text:style-name="T11">Month</text:span> <text:span text:style-name="T9">=&gt;</text:span> <text:span text:style-name="T15">date</text:span><text:span text:style-name="T10">('</text:span><text:span text:style-name="T16">Y-m-d 00:00:00</text:span><text:span text:style-name="T10">',</text:span> <text:span text:style-name="T15">strtotime</text:span><text:span text:style-name="T10">('</text:span><text:span text:style-name="T16">-30 days</text:span><text:span text:style-name="T10">')),</text:span></text:p>
      <text:p text:style-name="Code"><text:span text:style-name="T14">self</text:span><text:span text:style-name="T10">::</text:span><text:span text:style-name="T11">Quarter</text:span> <text:span text:style-name="T9">=&gt;</text:span> <text:span text:style-name="T15">date</text:span><text:span text:style-name="T10">('</text:span><text:span text:style-name="T16">Y-m-d 00:00:00</text:span><text:span text:style-name="T10">',</text:span> <text:span text:style-name="T15">strtotime</text:span><text:span text:style-name="T10">('</text:span><text:span text:style-name="T16">-3 months</text:span><text:span text:style-name="T10">')),</text:span></text:p>
      <text:p text:style-name="Code"><text:span text:style-name="T14">self</text:span><text:span text:style-name="T10">::</text:span><text:span text:style-name="T11">Year</text:span> <text:span text:style-name="T9">=&gt;</text:span> <text:span text:style-name="T15">date</text:span><text:span text:style-name="T10">('</text:span><text:span text:style-name="T16">Y-m-d 00:00:00</text:span><text:span text:style-name="T10">',</text:span> <text:span text:style-name="T15">strtotime</text:span><text:span text:style-name="T10">('</text:span><text:span text:style-name="T16">-1 year</text:span><text:span text:style-name="T10">')),</text:span></text:p>
      <text:p text:style-name="Code"><text:span text:style-name="T9">default</text:span> <text:span text:style-name="T9">=&gt;</text:span> <text:span text:style-name="T10">'</text:span><text:span text:style-name="T16">1970-01-01 00:00:00</text:span><text:span text:style-name="T10">',</text:span></text:p>
      <text:p text:style-name="Code">});</text:p>
      <text:p text:style-name="Code">}</text:p>
      <text:p text:style-name="Code"/>
      <text:p text:style-name="Code"><text:span text:style-name="T9">public</text:span> <text:span text:style-name="T14">function</text:span> <text:span text:style-name="T15">getEnd</text:span><text:span text:style-name="T10">():</text:span> <text:span text:style-name="T12">DateTimeImmutable</text:span></text:p>
      <text:p text:style-name="Code">{</text:p>
      <text:p text:style-name="Code"><text:span text:style-name="T9">return</text:span> <text:span text:style-name="T9">new</text:span> <text:span text:style-name="T12">DateTimeImmutable</text:span><text:span text:style-name="T10">('</text:span><text:span text:style-name="T16">today 23:59:59</text:span><text:span text:style-name="T10">');</text:span></text:p>
      <text:p text:style-name="Code">}</text:p>
      <text:p text:style-name="Code"/>
      <text:p text:style-name="Code"><text:span text:style-name="T21">/** </text:span><text:span text:style-name="T22">@return</text:span><text:span text:style-name="T16"> </text:span><text:span text:style-name="T22">array</text:span><text:span text:style-name="T21">&lt;</text:span><text:span text:style-name="T22">string</text:span><text:span text:style-name="T21">, string&gt; */</text:span></text:p>
      <text:p text:style-name="Code"><text:span text:style-name="T9">public</text:span> <text:span text:style-name="T9">static</text:span> <text:span text:style-name="T14">function</text:span> <text:span text:style-name="T15">gets</text:span><text:span text:style-name="T10">(</text:span><text:span text:style-name="T12">LanguagesDataHelper</text:span> <text:span text:style-name="T10">$</text:span><text:span text:style-name="T14">lang</text:span><text:span text:style-name="T10">):</text:span> <text:span text:style-name="T9">array</text:span></text:p>
      <text:p text:style-name="Code">{</text:p>
      <text:p text:style-name="Code"><text:span text:style-name="T9">return</text:span> <text:span text:style-name="T15">array_column</text:span><text:span text:style-name="T10">(</text:span></text:p>
      <text:p text:style-name="Code"><text:span text:style-name="T15">array_map</text:span><text:span text:style-name="T10">(</text:span></text:p>
      <text:p text:style-name="Code"><text:span text:style-name="T14">fn</text:span><text:span text:style-name="T10">(</text:span><text:span text:style-name="T14">self</text:span> <text:span text:style-name="T10">$</text:span><text:span text:style-name="T14">p</text:span><text:span text:style-name="T10">)</text:span> <text:span text:style-name="T10">=&gt;</text:span> <text:span text:style-name="T10">[$</text:span><text:span text:style-name="T14">p</text:span><text:span text:style-name="T10">-&gt;</text:span><text:span text:style-name="T14">value</text:span><text:span text:style-name="T10">,</text:span> <text:span text:style-name="T10">$</text:span><text:span text:style-name="T14">lang</text:span><text:span text:style-name="T10">-&gt;</text:span><text:span text:style-name="T15">translate</text:span><text:span text:style-name="T10">('</text:span><text:span text:style-name="T16">period.</text:span><text:span text:style-name="T10">'</text:span> <text:span text:style-name="T10">.</text:span> <text:span text:style-name="T10">$</text:span><text:span text:style-name="T14">p</text:span><text:span text:style-name="T10">-&gt;</text:span><text:span text:style-name="T14">value</text:span><text:span text:style-name="T10">)],</text:span></text:p>
      <text:p text:style-name="Code"><text:span text:style-name="T10">[</text:span><text:span text:style-name="T14">self</text:span><text:span text:style-name="T10">::</text:span><text:span text:style-name="T11">Week</text:span><text:span text:style-name="T10">,</text:span> <text:span text:style-name="T14">self</text:span><text:span text:style-name="T10">::</text:span><text:span text:style-name="T11">Month</text:span><text:span text:style-name="T10">,</text:span> <text:span text:style-name="T14">self</text:span><text:span text:style-name="T10">::</text:span><text:span text:style-name="T11">Quarter</text:span><text:span text:style-name="T10">,</text:span> <text:span text:style-name="T14">self</text:span><text:span text:style-name="T10">::</text:span><text:span text:style-name="T11">Year</text:span><text:span text:style-name="T10">]</text:span></text:p>
      <text:p text:style-name="Code">),</text:p>
      <text:p text:style-name="Code"><text:span text:style-name="T11">1</text:span><text:span text:style-name="T10">,</text:span></text:p>
      <text:p text:style-name="Code">0</text:p>
      <text:p text:style-name="Code">);</text:p>
      <text:p text:style-name="Code">}</text:p>
      <text:p text:style-name="Code"/>
      <text:p text:style-name="Code"><text:span text:style-name="T9">public</text:span> <text:span text:style-name="T14">function</text:span> <text:span text:style-name="T15">next</text:span><text:span text:style-name="T10">(</text:span><text:span text:style-name="T12">DateTimeImmutable</text:span> <text:span text:style-name="T10">$</text:span><text:span text:style-name="T14">from</text:span><text:span text:style-name="T10">):</text:span> <text:span text:style-name="T12">DateTimeImmutable</text:span></text:p>
      <text:p text:style-name="Code">{</text:p>
      <text:p text:style-name="Code"><text:span text:style-name="T9">return</text:span> <text:span text:style-name="T9">match</text:span> <text:span text:style-name="T10">($</text:span><text:span text:style-name="T11">this</text:span><text:span text:style-name="T10">)</text:span> <text:span text:style-name="T10">{</text:span></text:p>
      <text:p text:style-name="Code"><text:span text:style-name="T14">self</text:span><text:span text:style-name="T10">::</text:span><text:span text:style-name="T11">Today</text:span> <text:span text:style-name="T9">=&gt;</text:span> <text:span text:style-name="T9">new</text:span> <text:span text:style-name="T12">DateTimeImmutable</text:span><text:span text:style-name="T10">('</text:span><text:span text:style-name="T16">today 23:59</text:span><text:span text:style-name="T10">'),</text:span></text:p>
      <text:p text:style-name="Code"><text:span text:style-name="T14">self</text:span><text:span text:style-name="T10">::</text:span><text:span text:style-name="T11">Tomorrow</text:span> <text:span text:style-name="T9">=&gt;</text:span> <text:span text:style-name="T10">$</text:span><text:span text:style-name="T14">from</text:span><text:span text:style-name="T10">-&gt;</text:span><text:span text:style-name="T15">modify</text:span><text:span text:style-name="T10">('</text:span><text:span text:style-name="T16">+1 day</text:span><text:span text:style-name="T10">'),</text:span></text:p>
      <text:p text:style-name="Code"><text:span text:style-name="T14">self</text:span><text:span text:style-name="T10">::</text:span><text:span text:style-name="T11">NextWeek</text:span> <text:span text:style-name="T9">=&gt;</text:span> <text:span text:style-name="T10">$</text:span><text:span text:style-name="T11">this</text:span><text:span text:style-name="T10">-&gt;</text:span><text:span text:style-name="T15">nextWeek</text:span><text:span text:style-name="T10">($</text:span><text:span text:style-name="T14">from</text:span><text:span text:style-name="T10">),</text:span></text:p>
      <text:p text:style-name="Code"><text:span text:style-name="T9">default</text:span> <text:span text:style-name="T9">=&gt;</text:span> <text:span text:style-name="T10">$</text:span><text:span text:style-name="T14">from</text:span><text:span text:style-name="T10">,</text:span></text:p>
      <text:p text:style-name="Code">};</text:p>
      <text:p text:style-name="Code">}</text:p>
      <text:p text:style-name="Code"/>
      <text:p text:style-name="Code">#region Private functions</text:p>
      <text:p text:style-name="Code"><text:span text:style-name="T9">private</text:span> <text:span text:style-name="T14">function</text:span> <text:span text:style-name="T15">nextWeek</text:span><text:span text:style-name="T10">(</text:span><text:span text:style-name="T12">DateTimeImmutable</text:span> <text:span text:style-name="T10">$</text:span><text:span text:style-name="T14">from</text:span><text:span text:style-name="T10">):</text:span> <text:span text:style-name="T12">DateTimeImmutable</text:span></text:p>
      <text:p text:style-name="Code">{</text:p>
      <text:p text:style-name="Code">// Compute the next occurrence of the same weekday.</text:p>
      <text:p text:style-name="Code">// NOTE: PHP bug (observed in PHP 8.1–8.3):</text:p>
      <text:p text:style-name="Code">// DateTimeImmutable::modify('next &lt;weekday&gt;') may reset the time to 00:00:00.</text:p>
      <text:p text:style-name="Code">// We detect this behavior and restore the original time if needed.</text:p>
      <text:p text:style-name="Code"><text:span text:style-name="T10">$</text:span><text:span text:style-name="T14">next</text:span> <text:span text:style-name="T10">=</text:span> <text:span text:style-name="T10">$</text:span><text:span text:style-name="T14">from</text:span><text:span text:style-name="T10">-&gt;</text:span><text:span text:style-name="T15">modify</text:span><text:span text:style-name="T10">('</text:span><text:span text:style-name="T16">next </text:span><text:span text:style-name="T10">'</text:span> <text:span text:style-name="T10">.</text:span> <text:span text:style-name="T10">$</text:span><text:span text:style-name="T14">from</text:span><text:span text:style-name="T10">-&gt;</text:span><text:span text:style-name="T15">format</text:span><text:span text:style-name="T10">('</text:span><text:span text:style-name="T16">l</text:span><text:span text:style-name="T10">'));</text:span></text:p>
      <text:p text:style-name="Code"/>
      <text:p text:style-name="Code">// If the time was unexpectedly reset to midnight, restore the original time.</text:p>
      <text:p text:style-name="Code"><text:span text:style-name="T9">if</text:span> <text:span text:style-name="T10">($</text:span><text:span text:style-name="T14">next</text:span><text:span text:style-name="T10">-&gt;</text:span><text:span text:style-name="T15">format</text:span><text:span text:style-name="T10">('</text:span><text:span text:style-name="T16">H:i:s</text:span><text:span text:style-name="T10">')</text:span> <text:span text:style-name="T10">===</text:span> <text:span text:style-name="T10">'</text:span><text:span text:style-name="T16">00:00:00</text:span><text:span text:style-name="T10">')</text:span> <text:span text:style-name="T10">{</text:span></text:p>
      <text:p text:style-name="Code"><text:span text:style-name="T10">$</text:span><text:span text:style-name="T14">next</text:span> <text:span text:style-name="T10">=</text:span> <text:span text:style-name="T10">$</text:span><text:span text:style-name="T14">next</text:span><text:span text:style-name="T10">-&gt;</text:span><text:span text:style-name="T15">setTime</text:span><text:span text:style-name="T10">(</text:span></text:p>
      <text:p text:style-name="Code"><text:span text:style-name="T10">(</text:span><text:span text:style-name="T14">int</text:span><text:span text:style-name="T10">)$</text:span><text:span text:style-name="T14">from</text:span><text:span text:style-name="T10">-&gt;</text:span><text:span text:style-name="T15">format</text:span><text:span text:style-name="T10">('</text:span><text:span text:style-name="T16">H</text:span><text:span text:style-name="T10">'),</text:span></text:p>
      <text:p text:style-name="Code"><text:span text:style-name="T10">(</text:span><text:span text:style-name="T14">int</text:span><text:span text:style-name="T10">)$</text:span><text:span text:style-name="T14">from</text:span><text:span text:style-name="T10">-&gt;</text:span><text:span text:style-name="T15">format</text:span><text:span text:style-name="T10">('</text:span><text:span text:style-name="T16">i</text:span><text:span text:style-name="T10">'),</text:span></text:p>
      <text:p text:style-name="Code"><text:span text:style-name="T10">(</text:span><text:span text:style-name="T14">int</text:span><text:span text:style-name="T10">)$</text:span><text:span text:style-name="T14">from</text:span><text:span text:style-name="T10">-&gt;</text:span><text:span text:style-name="T15">format</text:span><text:span text:style-name="T10">('</text:span><text:span text:style-name="T16">s</text:span><text:span text:style-name="T10">')</text:span></text:p>
      <text:p text:style-name="Code">);</text:p>
      <text:p text:style-name="Code">}</text:p>
      <text:p text:style-name="Code"/>
      <text:p text:style-name="Code">// If the result is still in the past (e.g. $from was an old date),</text:p>
      <text:p text:style-name="Code">// keep jumping forward by 7 days until we land in the future.</text:p>
      <text:p text:style-name="Code"><text:soft-page-break/><text:span text:style-name="T10">$</text:span><text:span text:style-name="T14">now</text:span> <text:span text:style-name="T10">=</text:span> <text:span text:style-name="T9">new</text:span> <text:span text:style-name="T12">DateTimeImmutable</text:span><text:span text:style-name="T10">();</text:span></text:p>
      <text:p text:style-name="Code"><text:span text:style-name="T9">while</text:span> <text:span text:style-name="T10">($</text:span><text:span text:style-name="T14">next</text:span> <text:span text:style-name="T10">&lt;=</text:span> <text:span text:style-name="T10">$</text:span><text:span text:style-name="T14">now</text:span><text:span text:style-name="T10">)</text:span> <text:span text:style-name="T10">{</text:span></text:p>
      <text:p text:style-name="Code"><text:span text:style-name="T10">$</text:span><text:span text:style-name="T14">next</text:span> <text:span text:style-name="T10">=</text:span> <text:span text:style-name="T10">$</text:span><text:span text:style-name="T14">next</text:span><text:span text:style-name="T10">-&gt;</text:span><text:span text:style-name="T15">modify</text:span><text:span text:style-name="T10">('</text:span><text:span text:style-name="T16">+7 days</text:span><text:span text:style-name="T10">');</text:span></text:p>
      <text:p text:style-name="Code">}</text:p>
      <text:p text:style-name="Code"><text:span text:style-name="T9">return</text:span> <text:span text:style-name="T10">$</text:span><text:span text:style-name="T14">next</text:span><text:span text:style-name="T10">;</text:span></text:p>
      <text:p text:style-name="Code">}</text:p>
      <text:p text:style-name="Code">}</text:p>
      <text:h text:style-name="P23" text:outline-level="2">Exemple de <text:span text:style-name="T27">service</text:span></text:h>
      <text:p text:style-name="Code">&lt;?php</text:p>
      <text:p text:style-name="Code"/>
      <text:p text:style-name="Code"><text:span text:style-name="T9">declare</text:span><text:span text:style-name="T10">(</text:span><text:span text:style-name="T11">strict_types</text:span><text:span text:style-name="T10">=</text:span><text:span text:style-name="T11">1</text:span><text:span text:style-name="T10">);</text:span></text:p>
      <text:p text:style-name="Code"/>
      <text:p text:style-name="Code"><text:span text:style-name="T9">namespace</text:span> <text:span text:style-name="T12">app</text:span><text:span text:style-name="T13">\</text:span><text:span text:style-name="T12">modules</text:span><text:span text:style-name="T13">\</text:span><text:span text:style-name="T12">Common</text:span><text:span text:style-name="T13">\</text:span><text:span text:style-name="T12">services</text:span><text:span text:style-name="T10">;</text:span></text:p>
      <text:p text:style-name="Code"/>
      <text:p text:style-name="Code"><text:span text:style-name="T9">use</text:span> <text:span text:style-name="T12">DateTime</text:span><text:span text:style-name="T10">;</text:span></text:p>
      <text:p text:style-name="Code"><text:span text:style-name="T9">use</text:span> <text:span text:style-name="T12">Throwable</text:span><text:span text:style-name="T10">;</text:span></text:p>
      <text:p text:style-name="Code"/>
      <text:p text:style-name="Code"><text:span text:style-name="T9">use</text:span> app<text:span text:style-name="T10">\</text:span>enums<text:span text:style-name="T10">\</text:span><text:span text:style-name="T12">FilterInputRule</text:span><text:span text:style-name="T10">;</text:span></text:p>
      <text:p text:style-name="Code"><text:span text:style-name="T9">use</text:span> app<text:span text:style-name="T10">\</text:span>exceptions<text:span text:style-name="T10">\</text:span><text:span text:style-name="T12">EmailException</text:span><text:span text:style-name="T10">;</text:span></text:p>
      <text:p text:style-name="Code"><text:span text:style-name="T9">use</text:span> app<text:span text:style-name="T10">\</text:span>helpers<text:span text:style-name="T10">\</text:span><text:span text:style-name="T12">Application</text:span><text:span text:style-name="T10">;</text:span></text:p>
      <text:p text:style-name="Code"><text:span text:style-name="T9">use</text:span> app<text:span text:style-name="T10">\</text:span>helpers<text:span text:style-name="T10">\</text:span><text:span text:style-name="T12">Password</text:span><text:span text:style-name="T10">;</text:span></text:p>
      <text:p text:style-name="Code"><text:span text:style-name="T9">use</text:span> app<text:span text:style-name="T10">\</text:span>helpers<text:span text:style-name="T10">\</text:span><text:span text:style-name="T12">WebApp</text:span><text:span text:style-name="T10">;</text:span></text:p>
      <text:p text:style-name="Code"><text:span text:style-name="T9">use</text:span> app<text:span text:style-name="T10">\</text:span>models<text:span text:style-name="T10">\</text:span><text:span text:style-name="T12">AuthResult</text:span><text:span text:style-name="T10">;</text:span></text:p>
      <text:p text:style-name="Code"><text:span text:style-name="T9">use</text:span> app<text:span text:style-name="T10">\</text:span>models<text:span text:style-name="T10">\</text:span><text:span text:style-name="T12">DataHelper</text:span><text:span text:style-name="T10">;</text:span></text:p>
      <text:p text:style-name="Code"><text:span text:style-name="T9">use</text:span> app<text:span text:style-name="T10">\</text:span>modules<text:span text:style-name="T10">\</text:span>Common<text:span text:style-name="T10">\</text:span>services<text:span text:style-name="T10">\</text:span><text:span text:style-name="T12">EmailService</text:span><text:span text:style-name="T10">;</text:span></text:p>
      <text:p text:style-name="Code"><text:span text:style-name="T9">use</text:span> app<text:span text:style-name="T10">\</text:span>valueObjects<text:span text:style-name="T10">\</text:span><text:span text:style-name="T12">EmailMessage</text:span><text:span text:style-name="T10">;</text:span></text:p>
      <text:p text:style-name="Code"/>
      <text:p text:style-name="Code"><text:span text:style-name="T14">class</text:span> <text:span text:style-name="T12">AuthenticationService</text:span></text:p>
      <text:p text:style-name="Code">{</text:p>
      <text:p text:style-name="Code"><text:span text:style-name="T9">public</text:span> <text:span text:style-name="T14">function</text:span> <text:span text:style-name="T15">__construct</text:span><text:span text:style-name="T10">(</text:span><text:span text:style-name="T9">private</text:span> <text:span text:style-name="T12">DataHelper</text:span> <text:span text:style-name="T10">$</text:span><text:span text:style-name="T14">dataHelper</text:span><text:span text:style-name="T10">,</text:span> <text:span text:style-name="T9">private</text:span> <text:span text:style-name="T12">EmailService</text:span> <text:span text:style-name="T10">$</text:span><text:span text:style-name="T14">emailService</text:span><text:span text:style-name="T10">)</text:span> <text:span text:style-name="T10">{}</text:span></text:p>
      <text:p text:style-name="Code"/>
      <text:p text:style-name="Code"><text:span text:style-name="T9">public</text:span> <text:span text:style-name="T14">function</text:span> <text:span text:style-name="T15">handleForgotPassword</text:span><text:span text:style-name="T10">(</text:span><text:span text:style-name="T9">string</text:span> <text:span text:style-name="T10">$</text:span><text:span text:style-name="T14">email</text:span><text:span text:style-name="T10">):</text:span> <text:span text:style-name="T9">bool</text:span></text:p>
      <text:p text:style-name="Code">{</text:p>
      <text:p text:style-name="Code"><text:span text:style-name="T10">$</text:span><text:span text:style-name="T14">person</text:span> <text:span text:style-name="T10">=</text:span> <text:span text:style-name="T10">$</text:span><text:span text:style-name="T11">this</text:span><text:span text:style-name="T10">-&gt;</text:span><text:span text:style-name="T15">findPersonByEmail</text:span><text:span text:style-name="T10">($</text:span><text:span text:style-name="T14">email</text:span><text:span text:style-name="T10">);</text:span></text:p>
      <text:p text:style-name="Code"><text:span text:style-name="T9">if</text:span> <text:span text:style-name="T10">($</text:span><text:span text:style-name="T14">person</text:span> <text:span text:style-name="T10">===</text:span> <text:span text:style-name="T11">false</text:span><text:span text:style-name="T10">)</text:span> <text:span text:style-name="T9">throw</text:span> <text:span text:style-name="T9">new</text:span> <text:span text:style-name="T12">EmailException</text:span><text:span text:style-name="T10">();</text:span></text:p>
      <text:p text:style-name="Code"/>
      <text:p text:style-name="Code"><text:span text:style-name="T10">$</text:span><text:span text:style-name="T14">token</text:span> <text:span text:style-name="T10">=</text:span> <text:span text:style-name="T15">bin2hex</text:span><text:span text:style-name="T10">(</text:span><text:span text:style-name="T15">random_bytes</text:span><text:span text:style-name="T10">(</text:span><text:span text:style-name="T11">32</text:span><text:span text:style-name="T10">));</text:span></text:p>
      <text:p text:style-name="Code"><text:span text:style-name="T10">$</text:span><text:span text:style-name="T11">this</text:span><text:span text:style-name="T10">-&gt;</text:span><text:span text:style-name="T14">dataHelper</text:span><text:span text:style-name="T10">-&gt;</text:span><text:span text:style-name="T15">set</text:span><text:span text:style-name="T10">(</text:span></text:p>
      <text:p text:style-name="Code"><text:span text:style-name="T10">'</text:span><text:span text:style-name="T16">Person</text:span><text:span text:style-name="T10">',</text:span></text:p>
      <text:p text:style-name="Code">[</text:p>
      <text:p text:style-name="Code"><text:span text:style-name="T10">'</text:span><text:span text:style-name="T16">Token</text:span><text:span text:style-name="T10">'</text:span> <text:span text:style-name="T10">=&gt;</text:span> <text:span text:style-name="T10">$</text:span><text:span text:style-name="T14">token</text:span><text:span text:style-name="T10">,</text:span></text:p>
      <text:p text:style-name="Code"><text:span text:style-name="T10">'</text:span><text:span text:style-name="T16">TokenCreatedAt</text:span><text:span text:style-name="T10">'</text:span> <text:span text:style-name="T10">=&gt;</text:span> <text:span text:style-name="T10">(</text:span><text:span text:style-name="T9">new</text:span> <text:span text:style-name="T12">DateTime</text:span><text:span text:style-name="T10">())-&gt;</text:span><text:span text:style-name="T15">format</text:span><text:span text:style-name="T10">('</text:span><text:span text:style-name="T16">Y-m-d H:i:s</text:span><text:span text:style-name="T10">')</text:span></text:p>
      <text:p text:style-name="Code">],</text:p>
      <text:p text:style-name="Code"><text:span text:style-name="T10">['</text:span><text:span text:style-name="T16">Id</text:span><text:span text:style-name="T10">'</text:span> <text:span text:style-name="T10">=&gt;</text:span> <text:span text:style-name="T10">$</text:span><text:span text:style-name="T14">person</text:span><text:span text:style-name="T10">-&gt;</text:span><text:span text:style-name="T14">Id</text:span><text:span text:style-name="T10">]</text:span></text:p>
      <text:p text:style-name="Code">);</text:p>
      <text:p text:style-name="Code"><text:span text:style-name="T10">$</text:span><text:span text:style-name="T14">resetLink</text:span> <text:span text:style-name="T10">=</text:span> <text:span text:style-name="T12">Application</text:span><text:span text:style-name="T10">::$</text:span><text:span text:style-name="T14">root</text:span> <text:span text:style-name="T10">.</text:span> <text:span text:style-name="T10">'</text:span><text:span text:style-name="T16">/user/setPassword/</text:span><text:span text:style-name="T10">'</text:span> <text:span text:style-name="T10">.</text:span> <text:span text:style-name="T10">$</text:span><text:span text:style-name="T14">token</text:span><text:span text:style-name="T10">;</text:span></text:p>
      <text:p text:style-name="Code"><text:span text:style-name="T10">$</text:span><text:span text:style-name="T14">subject</text:span> <text:span text:style-name="T10">=</text:span> <text:span text:style-name="T10">"</text:span><text:span text:style-name="T16">Initialisation du mot de passe</text:span><text:span text:style-name="T10">";</text:span></text:p>
      <text:p text:style-name="Code"><text:span text:style-name="T10">$</text:span><text:span text:style-name="T14">message</text:span> <text:span text:style-name="T10">=</text:span> <text:span text:style-name="T10">"</text:span><text:span text:style-name="T16">Cliquez sur ce lien pour initialiser votre mot de passe : </text:span><text:span text:style-name="T10">$</text:span><text:span text:style-name="T14">resetLink</text:span><text:span text:style-name="T10">";</text:span></text:p>
      <text:p text:style-name="Code"/>
      <text:p text:style-name="Code"><text:span text:style-name="T10">$</text:span><text:span text:style-name="T14">host</text:span> <text:span text:style-name="T10">=</text:span> <text:span text:style-name="T15">parse_url</text:span><text:span text:style-name="T10">(</text:span><text:span text:style-name="T12">Application</text:span><text:span text:style-name="T10">::$</text:span><text:span text:style-name="T14">root</text:span><text:span text:style-name="T10">,</text:span> <text:span text:style-name="T11">PHP_URL_HOST</text:span><text:span text:style-name="T10">);</text:span></text:p>
      <text:p text:style-name="Code"><text:span text:style-name="T9">if</text:span> <text:span text:style-name="T10">($</text:span><text:span text:style-name="T14">host</text:span> <text:span text:style-name="T10">===</text:span> <text:span text:style-name="T10">'</text:span><text:span text:style-name="T16">localhost</text:span><text:span text:style-name="T10">'</text:span> <text:span text:style-name="T10">||</text:span> <text:span text:style-name="T10">$</text:span><text:span text:style-name="T14">host</text:span> <text:span text:style-name="T10">===</text:span> <text:span text:style-name="T11">null</text:span><text:span text:style-name="T10">)</text:span> <text:span text:style-name="T10">{</text:span></text:p>
      <text:p text:style-name="Code"><text:span text:style-name="T10">$</text:span><text:span text:style-name="T14">host</text:span> <text:span text:style-name="T10">=</text:span> <text:span text:style-name="T10">'</text:span><text:span text:style-name="T16">myclub.foo</text:span><text:span text:style-name="T10">';</text:span></text:p>
      <text:p text:style-name="Code">}</text:p>
      <text:p text:style-name="Code"/>
      <text:p text:style-name="Code"><text:soft-page-break/><text:span text:style-name="T10">$</text:span><text:span text:style-name="T14">emailMessage</text:span> <text:span text:style-name="T10">=</text:span> <text:span text:style-name="T9">new</text:span> <text:span text:style-name="T12">EmailMessage</text:span><text:span text:style-name="T10">(</text:span></text:p>
      <text:p text:style-name="Code">from<text:span text:style-name="T10">:</text:span> <text:span text:style-name="T11">null</text:span><text:span text:style-name="T10">,</text:span></text:p>
      <text:p text:style-name="Code">to<text:span text:style-name="T10">:</text:span> <text:span text:style-name="T10">$</text:span><text:span text:style-name="T14">email</text:span><text:span text:style-name="T10">,</text:span></text:p>
      <text:p text:style-name="Code">subject<text:span text:style-name="T10">:</text:span> <text:span text:style-name="T10">$</text:span><text:span text:style-name="T14">subject</text:span><text:span text:style-name="T10">,</text:span></text:p>
      <text:p text:style-name="Code">body<text:span text:style-name="T10">:</text:span> <text:span text:style-name="T10">$</text:span><text:span text:style-name="T14">message</text:span><text:span text:style-name="T10">,</text:span></text:p>
      <text:p text:style-name="Code">isHtml<text:span text:style-name="T10">:</text:span> <text:span text:style-name="T11">true</text:span></text:p>
      <text:p text:style-name="Code">);</text:p>
      <text:p text:style-name="Code"><text:span text:style-name="T9">return</text:span> <text:span text:style-name="T10">$</text:span><text:span text:style-name="T11">this</text:span><text:span text:style-name="T10">-&gt;</text:span><text:span text:style-name="T14">emailService</text:span><text:span text:style-name="T10">-&gt;</text:span><text:span text:style-name="T15">send</text:span><text:span text:style-name="T10">($</text:span><text:span text:style-name="T14">emailMessage</text:span><text:span text:style-name="T10">);</text:span></text:p>
      <text:p text:style-name="Code">}</text:p>
      <text:p text:style-name="Code"/>
      <text:p text:style-name="Code"><text:span text:style-name="T9">public</text:span> <text:span text:style-name="T14">function</text:span> <text:span text:style-name="T15">handleRememberMeLogin</text:span><text:span text:style-name="T10">():</text:span> <text:span text:style-name="T10">?</text:span><text:span text:style-name="T12">AuthResult</text:span></text:p>
      <text:p text:style-name="Code">{</text:p>
      <text:p text:style-name="Code"><text:span text:style-name="T9">if</text:span> <text:span text:style-name="T10">(!</text:span><text:span text:style-name="T15">isset</text:span><text:span text:style-name="T10">($</text:span><text:span text:style-name="T14">_COOKIE</text:span><text:span text:style-name="T10">['</text:span><text:span text:style-name="T16">rememberMe</text:span><text:span text:style-name="T10">']))</text:span> <text:span text:style-name="T9">return</text:span> <text:span text:style-name="T11">null</text:span><text:span text:style-name="T10">;</text:span></text:p>
      <text:p text:style-name="Code"><text:span text:style-name="T10">$</text:span><text:span text:style-name="T14">token</text:span> <text:span text:style-name="T10">=</text:span> <text:span text:style-name="T10">$</text:span><text:span text:style-name="T14">_COOKIE</text:span><text:span text:style-name="T10">['</text:span><text:span text:style-name="T16">rememberMe</text:span><text:span text:style-name="T10">'];</text:span></text:p>
      <text:p text:style-name="Code"><text:span text:style-name="T10">$</text:span><text:span text:style-name="T14">person</text:span> <text:span text:style-name="T10">=</text:span> <text:span text:style-name="T10">$</text:span><text:span text:style-name="T11">this</text:span><text:span text:style-name="T10">-&gt;</text:span><text:span text:style-name="T14">dataHelper</text:span><text:span text:style-name="T10">-&gt;</text:span><text:span text:style-name="T15">get</text:span><text:span text:style-name="T10">(</text:span></text:p>
      <text:p text:style-name="Code"><text:span text:style-name="T10">'</text:span><text:span text:style-name="T16">Person</text:span><text:span text:style-name="T10">',</text:span></text:p>
      <text:p text:style-name="Code"><text:span text:style-name="T10">['</text:span><text:span text:style-name="T16">Token</text:span><text:span text:style-name="T10">'</text:span> <text:span text:style-name="T10">=&gt;</text:span> <text:span text:style-name="T10">$</text:span><text:span text:style-name="T14">token</text:span><text:span text:style-name="T10">],</text:span></text:p>
      <text:p text:style-name="Code"><text:span text:style-name="T10">'</text:span><text:span text:style-name="T16">Id, Inactivated, Email</text:span><text:span text:style-name="T10">'</text:span></text:p>
      <text:p text:style-name="Code">);</text:p>
      <text:p text:style-name="Code"><text:span text:style-name="T9">if</text:span> <text:span text:style-name="T10">(!$</text:span><text:span text:style-name="T14">person</text:span> <text:span text:style-name="T10">||</text:span> <text:span text:style-name="T10">$</text:span><text:span text:style-name="T14">person</text:span><text:span text:style-name="T10">-&gt;</text:span><text:span text:style-name="T14">Inactivated</text:span> <text:span text:style-name="T10">==</text:span> <text:span text:style-name="T11">1</text:span><text:span text:style-name="T10">)</text:span> <text:span text:style-name="T10">{</text:span></text:p>
      <text:p text:style-name="Code"><text:span text:style-name="T10">$</text:span><text:span text:style-name="T11">this</text:span><text:span text:style-name="T10">-&gt;</text:span><text:span text:style-name="T15">clearRememberMeCookie</text:span><text:span text:style-name="T10">();</text:span></text:p>
      <text:p text:style-name="Code"><text:span text:style-name="T9">return</text:span> <text:span text:style-name="T11">null</text:span><text:span text:style-name="T10">;</text:span></text:p>
      <text:p text:style-name="Code">}</text:p>
      <text:p text:style-name="Code"><text:span text:style-name="T10">$</text:span><text:span text:style-name="T11">this</text:span><text:span text:style-name="T10">-&gt;</text:span><text:span text:style-name="T14">dataHelper</text:span><text:span text:style-name="T10">-&gt;</text:span><text:span text:style-name="T15">set</text:span><text:span text:style-name="T10">(</text:span></text:p>
      <text:p text:style-name="Code"><text:span text:style-name="T10">'</text:span><text:span text:style-name="T16">Person</text:span><text:span text:style-name="T10">',</text:span></text:p>
      <text:p text:style-name="Code"><text:span text:style-name="T10">['</text:span><text:span text:style-name="T16">LastSignIn</text:span><text:span text:style-name="T10">'</text:span> <text:span text:style-name="T10">=&gt;</text:span> <text:span text:style-name="T15">date</text:span><text:span text:style-name="T10">('</text:span><text:span text:style-name="T16">Y-m-d H:i:s</text:span><text:span text:style-name="T10">')],</text:span></text:p>
      <text:p text:style-name="Code"><text:span text:style-name="T10">['</text:span><text:span text:style-name="T16">Id</text:span><text:span text:style-name="T10">'</text:span> <text:span text:style-name="T10">=&gt;</text:span> <text:span text:style-name="T10">$</text:span><text:span text:style-name="T14">person</text:span><text:span text:style-name="T10">-&gt;</text:span><text:span text:style-name="T14">Id</text:span><text:span text:style-name="T10">]</text:span></text:p>
      <text:p text:style-name="Code">);</text:p>
      <text:p text:style-name="Code"><text:span text:style-name="T10">$</text:span><text:span text:style-name="T14">_SESSION</text:span><text:span text:style-name="T10">['</text:span><text:span text:style-name="T16">user</text:span><text:span text:style-name="T10">']</text:span> <text:span text:style-name="T10">=</text:span> <text:span text:style-name="T10">$</text:span><text:span text:style-name="T14">person</text:span><text:span text:style-name="T10">-&gt;</text:span><text:span text:style-name="T14">Email</text:span><text:span text:style-name="T10">;</text:span></text:p>
      <text:p text:style-name="Code"><text:span text:style-name="T10">$</text:span><text:span text:style-name="T14">_SESSION</text:span><text:span text:style-name="T10">['</text:span><text:span text:style-name="T16">navbar</text:span><text:span text:style-name="T10">']</text:span> <text:span text:style-name="T10">=</text:span> <text:span text:style-name="T10">'';</text:span></text:p>
      <text:p text:style-name="Code"><text:span text:style-name="T9">return</text:span> <text:span text:style-name="T12">AuthResult</text:span><text:span text:style-name="T10">::</text:span><text:span text:style-name="T15">success</text:span><text:span text:style-name="T10">($</text:span><text:span text:style-name="T14">person</text:span><text:span text:style-name="T10">);</text:span></text:p>
      <text:p text:style-name="Code">}</text:p>
      <text:p text:style-name="Code"/>
      <text:p text:style-name="Code"><text:span text:style-name="T9">public</text:span> <text:span text:style-name="T14">function</text:span> <text:span text:style-name="T15">handleSignIn</text:span><text:span text:style-name="T10">(</text:span><text:span text:style-name="T9">array</text:span> <text:span text:style-name="T10">$</text:span><text:span text:style-name="T14">requestData</text:span><text:span text:style-name="T10">):</text:span> <text:span text:style-name="T12">AuthResult</text:span></text:p>
      <text:p text:style-name="Code">{</text:p>
      <text:p text:style-name="Code"><text:span text:style-name="T10">$</text:span><text:span text:style-name="T14">schema</text:span> <text:span text:style-name="T10">=</text:span> <text:span text:style-name="T10">[</text:span></text:p>
      <text:p text:style-name="Code"><text:span text:style-name="T10">'</text:span><text:span text:style-name="T16">email</text:span><text:span text:style-name="T10">'</text:span> <text:span text:style-name="T10">=&gt;</text:span> <text:span text:style-name="T12">FilterInputRule</text:span><text:span text:style-name="T10">::</text:span><text:span text:style-name="T11">Email</text:span><text:span text:style-name="T10">-&gt;</text:span><text:span text:style-name="T14">value</text:span><text:span text:style-name="T10">,</text:span></text:p>
      <text:p text:style-name="Code"><text:span text:style-name="T10">'</text:span><text:span text:style-name="T16">password</text:span><text:span text:style-name="T10">'</text:span> <text:span text:style-name="T10">=&gt;</text:span> <text:span text:style-name="T12">FilterInputRule</text:span><text:span text:style-name="T10">::</text:span><text:span text:style-name="T11">Password</text:span><text:span text:style-name="T10">-&gt;</text:span><text:span text:style-name="T14">value</text:span><text:span text:style-name="T10">,</text:span></text:p>
      <text:p text:style-name="Code"><text:span text:style-name="T10">'</text:span><text:span text:style-name="T16">rememberMe</text:span><text:span text:style-name="T10">'</text:span> <text:span text:style-name="T10">=&gt;</text:span> <text:span text:style-name="T10">['</text:span><text:span text:style-name="T16">on</text:span><text:span text:style-name="T10">'],</text:span></text:p>
      <text:p text:style-name="Code">];</text:p>
      <text:p text:style-name="Code"><text:span text:style-name="T10">$</text:span><text:span text:style-name="T14">input</text:span> <text:span text:style-name="T10">=</text:span> <text:span text:style-name="T12">WebApp</text:span><text:span text:style-name="T10">::</text:span><text:span text:style-name="T15">filterInput</text:span><text:span text:style-name="T10">($</text:span><text:span text:style-name="T14">schema</text:span><text:span text:style-name="T10">,</text:span> <text:span text:style-name="T10">$</text:span><text:span text:style-name="T14">requestData</text:span><text:span text:style-name="T10">);</text:span></text:p>
      <text:p text:style-name="Code"><text:span text:style-name="T9">if</text:span> <text:span text:style-name="T10">($</text:span><text:span text:style-name="T14">input</text:span><text:span text:style-name="T10">['</text:span><text:span text:style-name="T16">email</text:span><text:span text:style-name="T10">']</text:span> <text:span text:style-name="T10">==</text:span> <text:span text:style-name="T11">null</text:span><text:span text:style-name="T10">)</text:span> <text:span text:style-name="T9">return</text:span> <text:span text:style-name="T12">AuthResult</text:span><text:span text:style-name="T10">::</text:span><text:span text:style-name="T15">error</text:span><text:span text:style-name="T10">('</text:span><text:span text:style-name="T16">Invalid email address</text:span><text:span text:style-name="T10">');</text:span></text:p>
      <text:p text:style-name="Code"><text:span text:style-name="T9">if</text:span> <text:span text:style-name="T10">($</text:span><text:span text:style-name="T14">input</text:span><text:span text:style-name="T10">['</text:span><text:span text:style-name="T16">password</text:span><text:span text:style-name="T10">']</text:span> <text:span text:style-name="T10">==</text:span> <text:span text:style-name="T11">null</text:span><text:span text:style-name="T10">)</text:span> <text:span text:style-name="T9">return</text:span> <text:span text:style-name="T12">AuthResult</text:span><text:span text:style-name="T10">::</text:span><text:span text:style-name="T15">error</text:span><text:span text:style-name="T10">('</text:span><text:span text:style-name="T16">Password rules are not respected [6..30] characters</text:span><text:span text:style-name="T10">');</text:span></text:p>
      <text:p text:style-name="Code"><text:span text:style-name="T9">return</text:span> <text:span text:style-name="T10">$</text:span><text:span text:style-name="T11">this</text:span><text:span text:style-name="T10">-&gt;</text:span><text:span text:style-name="T15">authenticate</text:span><text:span text:style-name="T10">(</text:span></text:p>
      <text:p text:style-name="Code"><text:span text:style-name="T10">$</text:span><text:span text:style-name="T14">input</text:span><text:span text:style-name="T10">['</text:span><text:span text:style-name="T16">email</text:span><text:span text:style-name="T10">'],</text:span></text:p>
      <text:p text:style-name="Code"><text:span text:style-name="T10">$</text:span><text:span text:style-name="T14">input</text:span><text:span text:style-name="T10">['</text:span><text:span text:style-name="T16">password</text:span><text:span text:style-name="T10">'],</text:span></text:p>
      <text:p text:style-name="Code"><text:span text:style-name="T10">($</text:span><text:span text:style-name="T14">input</text:span><text:span text:style-name="T10">['</text:span><text:span text:style-name="T16">rememberMe</text:span><text:span text:style-name="T10">']</text:span> <text:span text:style-name="T10">??</text:span> <text:span text:style-name="T10">'')</text:span> <text:span text:style-name="T10">===</text:span> <text:span text:style-name="T10">'</text:span><text:span text:style-name="T16">on</text:span><text:span text:style-name="T10">'</text:span></text:p>
      <text:p text:style-name="Code">);</text:p>
      <text:p text:style-name="Code">}</text:p>
      <text:p text:style-name="Code"/>
      <text:p text:style-name="Code"><text:span text:style-name="T9">public</text:span> <text:span text:style-name="T14">function</text:span> <text:span text:style-name="T15">resetPassword</text:span><text:span text:style-name="T10">(</text:span><text:span text:style-name="T9">string</text:span> <text:span text:style-name="T10">$</text:span><text:span text:style-name="T14">token</text:span><text:span text:style-name="T10">,</text:span> <text:span text:style-name="T9">string</text:span> <text:span text:style-name="T10">$</text:span><text:span text:style-name="T14">newPassword</text:span><text:span text:style-name="T10">):</text:span> <text:span text:style-name="T9">bool</text:span></text:p>
      <text:p text:style-name="Code">{</text:p>
      <text:p text:style-name="Code"><text:span text:style-name="T10">$</text:span><text:span text:style-name="T14">person</text:span> <text:span text:style-name="T10">=</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Person</text:span><text:span text:style-name="T10">',</text:span> <text:span text:style-name="T10">['</text:span><text:span text:style-name="T16">Token</text:span><text:span text:style-name="T10">'</text:span> <text:span text:style-name="T10">=&gt;</text:span> <text:span text:style-name="T10">$</text:span><text:span text:style-name="T14">token</text:span><text:span text:style-name="T10">],</text:span> <text:span text:style-name="T10">'</text:span><text:span text:style-name="T16">Id, TokenCreatedAt</text:span><text:span text:style-name="T10">');</text:span></text:p>
      <text:p text:style-name="Code"><text:span text:style-name="T9">if</text:span> <text:span text:style-name="T10">(!$</text:span><text:span text:style-name="T14">person</text:span> <text:span text:style-name="T10">||</text:span> <text:span text:style-name="T10">$</text:span><text:span text:style-name="T14">person</text:span><text:span text:style-name="T10">-&gt;</text:span><text:span text:style-name="T14">TokenCreatedAt</text:span> <text:span text:style-name="T10">===</text:span> <text:span text:style-name="T11">null</text:span> <text:span text:style-name="T10">||</text:span> <text:span text:style-name="T10">(</text:span><text:span text:style-name="T9">new</text:span> <text:span text:style-name="T12">DateTime</text:span><text:span text:style-name="T10">($</text:span><text:span text:style-name="T14">person</text:span><text:span text:style-name="T10">-&gt;</text:span><text:span text:style-name="T14">TokenCreatedAt</text:span><text:span text:style-name="T10">))-&gt;</text:span><text:span text:style-name="T15">diff</text:span><text:span text:style-name="T10">(</text:span><text:span text:style-name="T9">new</text:span> <text:span text:style-name="T12">DateTime</text:span><text:span text:style-name="T10">())-&gt;</text:span><text:span text:style-name="T14">h</text:span> <text:span text:style-name="T10">&gt;=</text:span> <text:span text:style-name="T11">1</text:span><text:span text:style-name="T10">)</text:span> <text:span text:style-name="T9">return</text:span> <text:span text:style-name="T11">false</text:span><text:span text:style-name="T10">;</text:span></text:p>
      <text:p text:style-name="Code"><text:span text:style-name="T10">$</text:span><text:span text:style-name="T11">this</text:span><text:span text:style-name="T10">-&gt;</text:span><text:span text:style-name="T14">dataHelper</text:span><text:span text:style-name="T10">-&gt;</text:span><text:span text:style-name="T15">set</text:span><text:span text:style-name="T10">('</text:span><text:span text:style-name="T16">Person</text:span><text:span text:style-name="T10">',</text:span> <text:span text:style-name="T10">[</text:span></text:p>
      <text:p text:style-name="Code"><text:soft-page-break/><text:span text:style-name="T10">'</text:span><text:span text:style-name="T16">Password</text:span><text:span text:style-name="T10">'</text:span> <text:span text:style-name="T10">=&gt;</text:span> <text:span text:style-name="T12">Password</text:span><text:span text:style-name="T10">::</text:span><text:span text:style-name="T15">signPassword</text:span><text:span text:style-name="T10">($</text:span><text:span text:style-name="T14">newPassword</text:span><text:span text:style-name="T10">),</text:span></text:p>
      <text:p text:style-name="Code"><text:span text:style-name="T10">'</text:span><text:span text:style-name="T16">Token</text:span><text:span text:style-name="T10">'</text:span> <text:span text:style-name="T10">=&gt;</text:span> <text:span text:style-name="T11">null</text:span><text:span text:style-name="T10">,</text:span></text:p>
      <text:p text:style-name="Code"><text:span text:style-name="T10">'</text:span><text:span text:style-name="T16">TokenCreatedAt</text:span><text:span text:style-name="T10">'</text:span> <text:span text:style-name="T10">=&gt;</text:span> <text:span text:style-name="T11">null</text:span></text:p>
      <text:p text:style-name="Code"><text:span text:style-name="T10">],</text:span> <text:span text:style-name="T10">['</text:span><text:span text:style-name="T16">Id</text:span><text:span text:style-name="T10">'</text:span> <text:span text:style-name="T10">=&gt;</text:span> <text:span text:style-name="T10">$</text:span><text:span text:style-name="T14">person</text:span><text:span text:style-name="T10">-&gt;</text:span><text:span text:style-name="T14">Id</text:span><text:span text:style-name="T10">]);</text:span></text:p>
      <text:p text:style-name="Code"><text:span text:style-name="T9">return</text:span> <text:span text:style-name="T11">true</text:span><text:span text:style-name="T10">;</text:span></text:p>
      <text:p text:style-name="Code">}</text:p>
      <text:p text:style-name="Code"/>
      <text:p text:style-name="Code"><text:span text:style-name="T9">public</text:span> <text:span text:style-name="T14">function</text:span> <text:span text:style-name="T15">signOut</text:span><text:span text:style-name="T10">():</text:span> <text:span text:style-name="T9">void</text:span></text:p>
      <text:p text:style-name="Code">{</text:p>
      <text:p text:style-name="Code"><text:span text:style-name="T10">$</text:span><text:span text:style-name="T14">userEmail</text:span> <text:span text:style-name="T10">=</text:span> <text:span text:style-name="T10">$</text:span><text:span text:style-name="T14">_SESSION</text:span><text:span text:style-name="T10">['</text:span><text:span text:style-name="T16">user</text:span><text:span text:style-name="T10">']</text:span> <text:span text:style-name="T10">??</text:span> <text:span text:style-name="T10">'';</text:span></text:p>
      <text:p text:style-name="Code"><text:span text:style-name="T9">if</text:span> <text:span text:style-name="T10">($</text:span><text:span text:style-name="T14">userEmail</text:span><text:span text:style-name="T10">)</text:span> <text:span text:style-name="T10">{</text:span></text:p>
      <text:p text:style-name="Code"><text:span text:style-name="T10">$</text:span><text:span text:style-name="T11">this</text:span><text:span text:style-name="T10">-&gt;</text:span><text:span text:style-name="T14">dataHelper</text:span><text:span text:style-name="T10">-&gt;</text:span><text:span text:style-name="T15">set</text:span><text:span text:style-name="T10">(</text:span></text:p>
      <text:p text:style-name="Code"><text:span text:style-name="T10">'</text:span><text:span text:style-name="T16">Person</text:span><text:span text:style-name="T10">',</text:span></text:p>
      <text:p text:style-name="Code"><text:span text:style-name="T10">['</text:span><text:span text:style-name="T16">LastSignOut</text:span><text:span text:style-name="T10">'</text:span> <text:span text:style-name="T10">=&gt;</text:span> <text:span text:style-name="T15">date</text:span><text:span text:style-name="T10">('</text:span><text:span text:style-name="T16">Y-m-d H:i:s</text:span><text:span text:style-name="T10">')],</text:span></text:p>
      <text:p text:style-name="Code"><text:span text:style-name="T10">['</text:span><text:span text:style-name="T16">Email</text:span><text:span text:style-name="T10">'</text:span> <text:span text:style-name="T10">=&gt;</text:span> <text:span text:style-name="T10">$</text:span><text:span text:style-name="T14">userEmail</text:span><text:span text:style-name="T10">]</text:span></text:p>
      <text:p text:style-name="Code">);</text:p>
      <text:p text:style-name="Code">}</text:p>
      <text:p text:style-name="Code"><text:span text:style-name="T15">unset</text:span><text:span text:style-name="T10">($</text:span><text:span text:style-name="T14">_SESSION</text:span><text:span text:style-name="T10">['</text:span><text:span text:style-name="T16">user</text:span><text:span text:style-name="T10">']);</text:span></text:p>
      <text:p text:style-name="Code"><text:span text:style-name="T10">$</text:span><text:span text:style-name="T14">_SESSION</text:span><text:span text:style-name="T10">['</text:span><text:span text:style-name="T16">navbar</text:span><text:span text:style-name="T10">']</text:span> <text:span text:style-name="T10">=</text:span> <text:span text:style-name="T10">'';</text:span></text:p>
      <text:p text:style-name="Code">}</text:p>
      <text:p text:style-name="Code"/>
      <text:p text:style-name="Code">#region Private methodes</text:p>
      <text:p text:style-name="Code"><text:span text:style-name="T9">private</text:span> <text:span text:style-name="T14">function</text:span> <text:span text:style-name="T15">authenticate</text:span><text:span text:style-name="T10">(</text:span><text:span text:style-name="T9">string</text:span> <text:span text:style-name="T10">$</text:span><text:span text:style-name="T14">email</text:span><text:span text:style-name="T10">,</text:span> <text:span text:style-name="T9">string</text:span> <text:span text:style-name="T10">$</text:span><text:span text:style-name="T14">password</text:span><text:span text:style-name="T10">,</text:span> <text:span text:style-name="T9">bool</text:span> <text:span text:style-name="T10">$</text:span><text:span text:style-name="T14">rememberMe</text:span><text:span text:style-name="T10">):</text:span> <text:span text:style-name="T12">AuthResult</text:span></text:p>
      <text:p text:style-name="Code">{</text:p>
      <text:p text:style-name="Code"><text:span text:style-name="T9">try</text:span> <text:span text:style-name="T10">{</text:span></text:p>
      <text:p text:style-name="Code"><text:span text:style-name="T10">$</text:span><text:span text:style-name="T14">person</text:span> <text:span text:style-name="T10">=</text:span> <text:span text:style-name="T10">$</text:span><text:span text:style-name="T11">this</text:span><text:span text:style-name="T10">-&gt;</text:span><text:span text:style-name="T15">findPersonByEmail</text:span><text:span text:style-name="T10">($</text:span><text:span text:style-name="T14">email</text:span><text:span text:style-name="T10">);</text:span></text:p>
      <text:p text:style-name="Code"><text:span text:style-name="T9">if</text:span> <text:span text:style-name="T10">($</text:span><text:span text:style-name="T14">person</text:span> <text:span text:style-name="T10">===</text:span> <text:span text:style-name="T11">false</text:span><text:span text:style-name="T10">)</text:span> <text:span text:style-name="T9">return</text:span> <text:span text:style-name="T12">AuthResult</text:span><text:span text:style-name="T10">::</text:span><text:span text:style-name="T15">error</text:span><text:span text:style-name="T10">("</text:span><text:span text:style-name="T16">Sign in failed: unknown email </text:span><text:span text:style-name="T10">{$</text:span><text:span text:style-name="T14">email</text:span><text:span text:style-name="T10">}");</text:span></text:p>
      <text:p text:style-name="Code"><text:span text:style-name="T9">if</text:span> <text:span text:style-name="T10">($</text:span><text:span text:style-name="T14">person</text:span><text:span text:style-name="T10">-&gt;</text:span><text:span text:style-name="T14">Inactivated</text:span> <text:span text:style-name="T10">==</text:span> <text:span text:style-name="T11">1</text:span><text:span text:style-name="T10">)</text:span> <text:span text:style-name="T9">return</text:span> <text:span text:style-name="T12">AuthResult</text:span><text:span text:style-name="T10">::</text:span><text:span text:style-name="T15">error</text:span><text:span text:style-name="T10">("</text:span><text:span text:style-name="T16">Sign in failed: inactivated user </text:span><text:span text:style-name="T10">{$</text:span><text:span text:style-name="T14">email</text:span><text:span text:style-name="T10">}");</text:span></text:p>
      <text:p text:style-name="Code"><text:span text:style-name="T9">if</text:span> <text:span text:style-name="T10">(!</text:span><text:span text:style-name="T12">Password</text:span><text:span text:style-name="T10">::</text:span><text:span text:style-name="T15">verifyPassword</text:span><text:span text:style-name="T10">($</text:span><text:span text:style-name="T14">password</text:span><text:span text:style-name="T10">,</text:span> <text:span text:style-name="T10">$</text:span><text:span text:style-name="T14">person</text:span><text:span text:style-name="T10">-&gt;</text:span><text:span text:style-name="T14">Password</text:span> <text:span text:style-name="T10">??</text:span> <text:span text:style-name="T10">''))</text:span> <text:span text:style-name="T9">return</text:span> <text:span text:style-name="T12">AuthResult</text:span><text:span text:style-name="T10">::</text:span><text:span text:style-name="T15">error</text:span><text:span text:style-name="T10">("</text:span><text:span text:style-name="T16">Sign in failed: wrong password for </text:span><text:span text:style-name="T10">{$</text:span><text:span text:style-name="T14">email</text:span><text:span text:style-name="T10">}");</text:span></text:p>
      <text:p text:style-name="Code"><text:span text:style-name="T9">return</text:span> <text:span text:style-name="T10">$</text:span><text:span text:style-name="T11">this</text:span><text:span text:style-name="T10">-&gt;</text:span><text:span text:style-name="T15">loginUser</text:span><text:span text:style-name="T10">($</text:span><text:span text:style-name="T14">person</text:span><text:span text:style-name="T10">,</text:span> <text:span text:style-name="T10">$</text:span><text:span text:style-name="T14">rememberMe</text:span><text:span text:style-name="T10">);</text:span></text:p>
      <text:p text:style-name="Code"><text:span text:style-name="T10">}</text:span> <text:span text:style-name="T9">catch</text:span> <text:span text:style-name="T10">(</text:span><text:span text:style-name="T12">Throwable</text:span> <text:span text:style-name="T10">$</text:span><text:span text:style-name="T14">e</text:span><text:span text:style-name="T10">)</text:span> <text:span text:style-name="T10">{</text:span></text:p>
      <text:p text:style-name="Code"><text:span text:style-name="T9">return</text:span> <text:span text:style-name="T12">AuthResult</text:span><text:span text:style-name="T10">::</text:span><text:span text:style-name="T15">error</text:span><text:span text:style-name="T10">("</text:span><text:span text:style-name="T16">Authentication error: </text:span><text:span text:style-name="T10">{$</text:span><text:span text:style-name="T14">e</text:span><text:span text:style-name="T10">-&gt;</text:span><text:span text:style-name="T15">getMessage</text:span><text:span text:style-name="T10">()}</text:span><text:span text:style-name="T16"> in </text:span><text:span text:style-name="T10">{$</text:span><text:span text:style-name="T14">e</text:span><text:span text:style-name="T10">-&gt;</text:span><text:span text:style-name="T15">getFile</text:span><text:span text:style-name="T10">()}</text:span><text:span text:style-name="T16"> at line </text:span><text:span text:style-name="T10">{$</text:span><text:span text:style-name="T14">e</text:span><text:span text:style-name="T10">-&gt;</text:span><text:span text:style-name="T15">getLine</text:span><text:span text:style-name="T10">()}");</text:span></text:p>
      <text:p text:style-name="Code">}</text:p>
      <text:p text:style-name="Code">}</text:p>
      <text:p text:style-name="Code"/>
      <text:p text:style-name="Code"><text:span text:style-name="T9">private</text:span> <text:span text:style-name="T14">function</text:span> <text:span text:style-name="T15">clearRememberMeCookie</text:span><text:span text:style-name="T10">():</text:span> <text:span text:style-name="T9">void</text:span></text:p>
      <text:p text:style-name="Code">{</text:p>
      <text:p text:style-name="Code"><text:span text:style-name="T15">setcookie</text:span><text:span text:style-name="T10">('</text:span><text:span text:style-name="T16">rememberMe</text:span><text:span text:style-name="T10">',</text:span> <text:span text:style-name="T10">'',</text:span> <text:span text:style-name="T15">time</text:span><text:span text:style-name="T10">()</text:span> <text:span text:style-name="T10">-</text:span> <text:span text:style-name="T11">3600</text:span><text:span text:style-name="T10">,</text:span> <text:span text:style-name="T10">'</text:span><text:span text:style-name="T16">/</text:span><text:span text:style-name="T10">');</text:span></text:p>
      <text:p text:style-name="Code">}</text:p>
      <text:p text:style-name="Code"/>
      <text:p text:style-name="Code"><text:span text:style-name="T9">private</text:span> <text:span text:style-name="T14">function</text:span> <text:span text:style-name="T15">findPersonByEmail</text:span><text:span text:style-name="T10">(</text:span><text:span text:style-name="T9">string</text:span> <text:span text:style-name="T10">$</text:span><text:span text:style-name="T14">email</text:span><text:span text:style-name="T10">):</text:span> <text:span text:style-name="T9">object</text:span><text:span text:style-name="T10">|</text:span><text:span text:style-name="T9">false</text:span></text:p>
      <text:p text:style-name="Code">{</text:p>
      <text:p text:style-name="Code"><text:span text:style-name="T9">return</text:span> <text:span text:style-name="T10">$</text:span><text:span text:style-name="T11">this</text:span><text:span text:style-name="T10">-&gt;</text:span><text:span text:style-name="T14">dataHelper</text:span><text:span text:style-name="T10">-&gt;</text:span><text:span text:style-name="T15">get</text:span><text:span text:style-name="T10">(</text:span></text:p>
      <text:p text:style-name="Code"><text:span text:style-name="T10">'</text:span><text:span text:style-name="T16">Person</text:span><text:span text:style-name="T10">',</text:span></text:p>
      <text:p text:style-name="Code"><text:span text:style-name="T10">['</text:span><text:span text:style-name="T16">Email</text:span><text:span text:style-name="T10">'</text:span> <text:span text:style-name="T10">=&gt;</text:span> <text:span text:style-name="T10">$</text:span><text:span text:style-name="T14">email</text:span><text:span text:style-name="T10">],</text:span></text:p>
      <text:p text:style-name="Code"><text:span text:style-name="T10">'</text:span><text:span text:style-name="T16">Id, Email, Password, Inactivated, LastSignIn, LastSignOut</text:span><text:span text:style-name="T10">'</text:span></text:p>
      <text:p text:style-name="Code">);</text:p>
      <text:p text:style-name="Code">}</text:p>
      <text:p text:style-name="Code"/>
      <text:p text:style-name="Code"><text:span text:style-name="T9">private</text:span> <text:span text:style-name="T14">function</text:span> <text:span text:style-name="T15">generateRememberMeToken</text:span><text:span text:style-name="T10">():</text:span> <text:span text:style-name="T9">string</text:span></text:p>
      <text:p text:style-name="Code">{</text:p>
      <text:p text:style-name="Code"><text:span text:style-name="T9">return</text:span> <text:span text:style-name="T15">bin2hex</text:span><text:span text:style-name="T10">(</text:span><text:span text:style-name="T15">random_bytes</text:span><text:span text:style-name="T10">(</text:span><text:span text:style-name="T11">32</text:span><text:span text:style-name="T10">));</text:span></text:p>
      <text:p text:style-name="Code"><text:soft-page-break/>}</text:p>
      <text:p text:style-name="Code"/>
      <text:p text:style-name="Code"><text:span text:style-name="T9">private</text:span> <text:span text:style-name="T14">function</text:span> <text:span text:style-name="T15">loginUser</text:span><text:span text:style-name="T10">(</text:span><text:span text:style-name="T9">object</text:span> <text:span text:style-name="T10">$</text:span><text:span text:style-name="T14">person</text:span><text:span text:style-name="T10">,</text:span> <text:span text:style-name="T9">bool</text:span> <text:span text:style-name="T10">$</text:span><text:span text:style-name="T14">rememberMe</text:span><text:span text:style-name="T10">):</text:span> <text:span text:style-name="T12">AuthResult</text:span></text:p>
      <text:p text:style-name="Code">{</text:p>
      <text:p text:style-name="Code"><text:span text:style-name="T10">$</text:span><text:span text:style-name="T11">this</text:span><text:span text:style-name="T10">-&gt;</text:span><text:span text:style-name="T14">dataHelper</text:span><text:span text:style-name="T10">-&gt;</text:span><text:span text:style-name="T15">set</text:span><text:span text:style-name="T10">(</text:span></text:p>
      <text:p text:style-name="Code"><text:span text:style-name="T10">'</text:span><text:span text:style-name="T16">Person</text:span><text:span text:style-name="T10">',</text:span></text:p>
      <text:p text:style-name="Code"><text:span text:style-name="T10">['</text:span><text:span text:style-name="T16">LastSignIn</text:span><text:span text:style-name="T10">'</text:span> <text:span text:style-name="T10">=&gt;</text:span> <text:span text:style-name="T15">date</text:span><text:span text:style-name="T10">('</text:span><text:span text:style-name="T16">Y-m-d H:i:s</text:span><text:span text:style-name="T10">')],</text:span></text:p>
      <text:p text:style-name="Code"><text:span text:style-name="T10">['</text:span><text:span text:style-name="T16">Id</text:span><text:span text:style-name="T10">'</text:span> <text:span text:style-name="T10">=&gt;</text:span> <text:span text:style-name="T10">$</text:span><text:span text:style-name="T14">person</text:span><text:span text:style-name="T10">-&gt;</text:span><text:span text:style-name="T14">Id</text:span><text:span text:style-name="T10">]</text:span></text:p>
      <text:p text:style-name="Code">);</text:p>
      <text:p text:style-name="Code"><text:span text:style-name="T9">if</text:span> <text:span text:style-name="T10">($</text:span><text:span text:style-name="T14">rememberMe</text:span><text:span text:style-name="T10">)</text:span> <text:span text:style-name="T10">$</text:span><text:span text:style-name="T11">this</text:span><text:span text:style-name="T10">-&gt;</text:span><text:span text:style-name="T15">setRememberMeToken</text:span><text:span text:style-name="T10">((</text:span><text:span text:style-name="T14">int</text:span><text:span text:style-name="T10">)$</text:span><text:span text:style-name="T14">person</text:span><text:span text:style-name="T10">-&gt;</text:span><text:span text:style-name="T14">Id</text:span><text:span text:style-name="T10">);</text:span></text:p>
      <text:p text:style-name="Code"><text:span text:style-name="T10">$</text:span><text:span text:style-name="T14">_SESSION</text:span><text:span text:style-name="T10">['</text:span><text:span text:style-name="T16">user</text:span><text:span text:style-name="T10">']</text:span> <text:span text:style-name="T10">=</text:span> <text:span text:style-name="T10">$</text:span><text:span text:style-name="T14">person</text:span><text:span text:style-name="T10">-&gt;</text:span><text:span text:style-name="T14">Email</text:span><text:span text:style-name="T10">;</text:span></text:p>
      <text:p text:style-name="Code"><text:span text:style-name="T10">$</text:span><text:span text:style-name="T14">_SESSION</text:span><text:span text:style-name="T10">['</text:span><text:span text:style-name="T16">navbar</text:span><text:span text:style-name="T10">']</text:span> <text:span text:style-name="T10">=</text:span> <text:span text:style-name="T10">'';</text:span></text:p>
      <text:p text:style-name="Code"><text:span text:style-name="T9">return</text:span> <text:span text:style-name="T12">AuthResult</text:span><text:span text:style-name="T10">::</text:span><text:span text:style-name="T15">success</text:span><text:span text:style-name="T10">($</text:span><text:span text:style-name="T14">person</text:span><text:span text:style-name="T10">);</text:span></text:p>
      <text:p text:style-name="Code">}</text:p>
      <text:p text:style-name="Code"/>
      <text:p text:style-name="Code"><text:span text:style-name="T9">private</text:span> <text:span text:style-name="T14">function</text:span> <text:span text:style-name="T15">setRememberMeToken</text:span><text:span text:style-name="T10">(</text:span><text:span text:style-name="T9">int</text:span> <text:span text:style-name="T10">$</text:span><text:span text:style-name="T14">personId</text:span><text:span text:style-name="T10">):</text:span> <text:span text:style-name="T9">void</text:span></text:p>
      <text:p text:style-name="Code">{</text:p>
      <text:p text:style-name="Code"><text:span text:style-name="T10">$</text:span><text:span text:style-name="T14">token</text:span> <text:span text:style-name="T10">=</text:span> <text:span text:style-name="T10">$</text:span><text:span text:style-name="T11">this</text:span><text:span text:style-name="T10">-&gt;</text:span><text:span text:style-name="T15">generateRememberMeToken</text:span><text:span text:style-name="T10">();</text:span></text:p>
      <text:p text:style-name="Code"><text:span text:style-name="T10">$</text:span><text:span text:style-name="T11">this</text:span><text:span text:style-name="T10">-&gt;</text:span><text:span text:style-name="T14">dataHelper</text:span><text:span text:style-name="T10">-&gt;</text:span><text:span text:style-name="T15">set</text:span><text:span text:style-name="T10">(</text:span></text:p>
      <text:p text:style-name="Code"><text:span text:style-name="T10">'</text:span><text:span text:style-name="T16">Person</text:span><text:span text:style-name="T10">',</text:span></text:p>
      <text:p text:style-name="Code"><text:span text:style-name="T10">['</text:span><text:span text:style-name="T16">Token</text:span><text:span text:style-name="T10">'</text:span> <text:span text:style-name="T10">=&gt;</text:span> <text:span text:style-name="T10">$</text:span><text:span text:style-name="T14">token</text:span><text:span text:style-name="T10">],</text:span></text:p>
      <text:p text:style-name="Code"><text:span text:style-name="T10">['</text:span><text:span text:style-name="T16">Id</text:span><text:span text:style-name="T10">'</text:span> <text:span text:style-name="T10">=&gt;</text:span> <text:span text:style-name="T10">$</text:span><text:span text:style-name="T14">personId</text:span><text:span text:style-name="T10">]</text:span></text:p>
      <text:p text:style-name="Code">);</text:p>
      <text:p text:style-name="Code"><text:span text:style-name="T15">setcookie</text:span><text:span text:style-name="T10">('</text:span><text:span text:style-name="T16">rememberMe</text:span><text:span text:style-name="T10">',</text:span> <text:span text:style-name="T10">$</text:span><text:span text:style-name="T14">token</text:span><text:span text:style-name="T10">,</text:span> <text:span text:style-name="T15">time</text:span><text:span text:style-name="T10">()</text:span> <text:span text:style-name="T10">+</text:span> <text:span text:style-name="T10">(</text:span><text:span text:style-name="T11">30</text:span> <text:span text:style-name="T10">*</text:span> <text:span text:style-name="T11">24</text:span> <text:span text:style-name="T10">*</text:span> <text:span text:style-name="T11">60</text:span> <text:span text:style-name="T10">*</text:span> <text:span text:style-name="T11">60</text:span><text:span text:style-name="T10">),</text:span> <text:span text:style-name="T10">'</text:span><text:span text:style-name="T16">/</text:span><text:span text:style-name="T10">');</text:span></text:p>
      <text:p text:style-name="Code">}</text:p>
      <text:p text:style-name="Code">}</text:p>
      <text:h text:style-name="Heading_20_2" text:outline-level="2"><text:span text:style-name="T5">S</text:span><text:span text:style-name="T3">tructure :</text:span></text:h>
      <text:p text:style-name="Code"><text:span text:style-name="T28">├── </text:span><text:span text:style-name="T29">app</text:span><text:span text:style-name="T30"> </text:span><text:span text:style-name="T31"><text:line-break/></text:span><text:span text:style-name="T30">│   ├── </text:span><text:span text:style-name="T29">apis</text:span><text:span text:style-name="T30"> </text:span><text:span text:style-name="T31"><text:line-break/></text:span><text:span text:style-name="T30">│   ├── </text:span><text:span text:style-name="T29">config</text:span><text:span text:style-name="T30"> </text:span><text:span text:style-name="T31"><text:line-break/></text:span><text:span text:style-name="T30">│   │   └── </text:span><text:span text:style-name="T29">routes</text:span><text:span text:style-name="T30"> </text:span><text:span text:style-name="T31"><text:line-break/></text:span><text:span text:style-name="T30">│   ├── </text:span><text:span text:style-name="T29">enums</text:span><text:span text:style-name="T30"> </text:span><text:span text:style-name="T31"><text:line-break/></text:span><text:span text:style-name="T30">│   ├── </text:span><text:span text:style-name="T29">exceptions</text:span><text:span text:style-name="T30"> </text:span><text:span text:style-name="T31"><text:line-break/></text:span><text:span text:style-name="T30">│   ├── </text:span><text:span text:style-name="T29">helpers</text:span><text:span text:style-name="T30"> </text:span><text:span text:style-name="T31"><text:line-break/></text:span><text:span text:style-name="T30">│   ├── </text:span><text:span text:style-name="T29">images</text:span><text:span text:style-name="T30"> </text:span><text:span text:style-name="T31"><text:line-break/></text:span><text:span text:style-name="T30">│   ├── </text:span><text:span text:style-name="T29">interfaces</text:span><text:span text:style-name="T30"> </text:span><text:span text:style-name="T31"><text:line-break/></text:span><text:span text:style-name="T30">│   ├── </text:span><text:span text:style-name="T29">js</text:span><text:span text:style-name="T30"> </text:span><text:span text:style-name="T31"><text:line-break/></text:span><text:span text:style-name="T30">│   │   ├── </text:span><text:span text:style-name="T29">designs</text:span><text:span text:style-name="T30"> </text:span><text:span text:style-name="T31"><text:line-break/></text:span><text:span text:style-name="T30">│   │   ├── </text:span><text:span text:style-name="T29">event</text:span><text:span text:style-name="T30"> </text:span><text:span text:style-name="T31"><text:line-break/></text:span><text:span text:style-name="T30">│   │   ├── </text:span><text:span text:style-name="T29">navbar</text:span><text:span text:style-name="T30"> </text:span><text:span text:style-name="T31"><text:line-break/></text:span><text:span text:style-name="T30">│   │   └── </text:span><text:span text:style-name="T29">quill</text:span><text:span text:style-name="T30"> </text:span><text:span text:style-name="T31"><text:line-break/></text:span><text:span text:style-name="T30">│   ├── </text:span><text:span text:style-name="T29">models</text:span><text:span text:style-name="T30"> </text:span><text:span text:style-name="T31"><text:line-break/></text:span><text:span text:style-name="T30">│   │   └── </text:span><text:span text:style-name="T29">database</text:span><text:span text:style-name="T30"> </text:span><text:span text:style-name="T31"><text:line-break/></text:span><text:span text:style-name="T30">│   │       └── </text:span><text:span text:style-name="T29">migrators</text:span><text:span text:style-name="T30"> </text:span><text:span text:style-name="T31"><text:line-break/></text:span><text:span text:style-name="T30">│   ├── </text:span><text:span text:style-name="T29">modules</text:span><text:span text:style-name="T30"> </text:span><text:span text:style-name="T31"><text:line-break/></text:span><text:span text:style-name="T30">│   │   ├── </text:span><text:span text:style-name="T29">Article</text:span><text:span text:style-name="T30"> </text:span><text:span text:style-name="T31"><text:line-break/></text:span><text:span text:style-name="T30">│   │   │   ├── </text:span><text:span text:style-name="T29">js</text:span><text:span text:style-name="T30"> </text:span><text:span text:style-name="T31"><text:line-break/></text:span><text:span text:style-name="T30">│   │   │   │   └── </text:span><text:span text:style-name="T29">designs</text:span><text:span text:style-name="T30"> </text:span><text:span text:style-name="T31"><text:line-break/></text:span><text:span text:style-name="T30">│   │   │   ├── </text:span><text:span text:style-name="T29">service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Common</text:span><text:span text:style-name="T30"> </text:span><text:span text:style-name="T31"><text:line-break/></text:span><text:span text:style-name="T30">│   │   │   ├── </text:span><text:span text:style-name="T29">css</text:span><text:span text:style-name="T30"> </text:span><text:span text:style-name="T31"><text:line-break/></text:span><text:span text:style-name="T30">│   │   │   ├── </text:span><text:span text:style-name="T29">js</text:span><text:span text:style-name="T30"> </text:span><text:span text:style-name="T31"><text:line-break/></text:span><text:span text:style-name="T30">│   │   │   │   ├── </text:span><text:span text:style-name="T29">active-users</text:span><text:span text:style-name="T30"> </text:span><text:span text:style-name="T31"><text:line-break/></text:span><text:span text:style-name="T30">│   │   │   │   ├── </text:span><text:span text:style-name="T29">messages</text:span><text:span text:style-name="T30"> </text:span><text:span text:style-name="T31"><text:line-break/></text:span><text:span text:style-name="T30">│   │   │   │   └── </text:span><text:span text:style-name="T29">tinymce</text:span><text:span text:style-name="T30"> </text:span><text:span text:style-name="T31"><text:line-break/></text:span><text:soft-page-break/><text:span text:style-name="T30">│   │   │   ├── </text:span><text:span text:style-name="T29">service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Communication</text:span><text:span text:style-name="T30"> </text:span><text:span text:style-name="T31"><text:line-break/></text:span><text:span text:style-name="T30">│   │   │   ├── </text:span><text:span text:style-name="T29">j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Designer</text:span><text:span text:style-name="T30"> </text:span><text:span text:style-name="T31"><text:line-break/></text:span><text:span text:style-name="T30">│   │   │   ├── </text:span><text:span text:style-name="T29">js</text:span><text:span text:style-name="T30"> </text:span><text:span text:style-name="T31"><text:line-break/></text:span><text:span text:style-name="T30">│   │   │   └── </text:span><text:span text:style-name="T29">views</text:span><text:span text:style-name="T30"> </text:span><text:span text:style-name="T31"><text:line-break/></text:span><text:span text:style-name="T30">│   │   │       └── </text:span><text:span text:style-name="T29">partials</text:span><text:span text:style-name="T30"> </text:span><text:span text:style-name="T31"><text:line-break/></text:span><text:span text:style-name="T30">│   │   ├── </text:span><text:span text:style-name="T29">Event</text:span><text:span text:style-name="T30"> </text:span><text:span text:style-name="T31"><text:line-break/></text:span><text:span text:style-name="T30">│   │   │   ├── </text:span><text:span text:style-name="T29">js</text:span><text:span text:style-name="T30"> </text:span><text:span text:style-name="T31"><text:line-break/></text:span><text:span text:style-name="T30">│   │   │   │   ├── </text:span><text:span text:style-name="T29">detail</text:span><text:span text:style-name="T30"> </text:span><text:span text:style-name="T31"><text:line-break/></text:span><text:span text:style-name="T30">│   │   │   │   ├── </text:span><text:span text:style-name="T29">eventType</text:span><text:span text:style-name="T30"> </text:span><text:span text:style-name="T31"><text:line-break/></text:span><text:span text:style-name="T30">│   │   │   │   ├── </text:span><text:span text:style-name="T29">modules</text:span><text:span text:style-name="T30"> </text:span><text:span text:style-name="T31"><text:line-break/></text:span><text:span text:style-name="T30">│   │   │   │   └── </text:span><text:span text:style-name="T29">services</text:span><text:span text:style-name="T30"> </text:span><text:span text:style-name="T31"><text:line-break/></text:span><text:span text:style-name="T30">│   │   │   │       ├── </text:span><text:span text:style-name="T29">calendar</text:span><text:span text:style-name="T30"> </text:span><text:span text:style-name="T31"><text:line-break/></text:span><text:span text:style-name="T30">│   │   │   │       └── </text:span><text:span text:style-name="T29">supply</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Games</text:span><text:span text:style-name="T30"> </text:span><text:span text:style-name="T31"><text:line-break/></text:span><text:span text:style-name="T30">│   │   │   ├── </text:span><text:span text:style-name="T29">Karaoke</text:span><text:span text:style-name="T30"> </text:span><text:span text:style-name="T31"><text:line-break/></text:span><text:span text:style-name="T30">│   │   │   │   ├── </text:span><text:span text:style-name="T29">js</text:span><text:span text:style-name="T30"> </text:span><text:span text:style-name="T31"><text:line-break/></text:span><text:span text:style-name="T30">│   │   │   │   │   ├── </text:span><text:span text:style-name="T29">api</text:span><text:span text:style-name="T30"> </text:span><text:span text:style-name="T31"><text:line-break/></text:span><text:span text:style-name="T30">│   │   │   │   │   ├── </text:span><text:span text:style-name="T29">app</text:span><text:span text:style-name="T30"> </text:span><text:span text:style-name="T31"><text:line-break/></text:span><text:span text:style-name="T30">│   │   │   │   │   ├── </text:span><text:span text:style-name="T29">audio</text:span><text:span text:style-name="T30"> </text:span><text:span text:style-name="T31"><text:line-break/></text:span><text:span text:style-name="T30">│   │   │   │   │   ├── </text:span><text:span text:style-name="T29">lyrics</text:span><text:span text:style-name="T30"> </text:span><text:span text:style-name="T31"><text:line-break/></text:span><text:span text:style-name="T30">│   │   │   │   │   ├── </text:span><text:span text:style-name="T29">sync</text:span><text:span text:style-name="T30"> </text:span><text:span text:style-name="T31"><text:line-break/></text:span><text:span text:style-name="T30">│   │   │   │   │   ├── </text:span><text:span text:style-name="T29">ui</text:span><text:span text:style-name="T30"> </text:span><text:span text:style-name="T31"><text:line-break/></text:span><text:span text:style-name="T30">│   │   │   │   │   └── </text:span><text:span text:style-name="T29">utils</text:span><text:span text:style-name="T30"> </text:span><text:span text:style-name="T31"><text:line-break/></text:span><text:span text:style-name="T30">│   │   │   │   └── </text:span><text:span text:style-name="T29">views</text:span><text:span text:style-name="T30"> </text:span><text:span text:style-name="T31"><text:line-break/></text:span><text:span text:style-name="T30">│   │   │   ├── </text:span><text:span text:style-name="T29">Leapfrog</text:span><text:span text:style-name="T30"> </text:span><text:span text:style-name="T31"><text:line-break/></text:span><text:span text:style-name="T30">│   │   │   │   ├── </text:span><text:span text:style-name="T29">js</text:span><text:span text:style-name="T30"> </text:span><text:span text:style-name="T31"><text:line-break/></text:span><text:span text:style-name="T30">│   │   │   │   └── </text:span><text:span text:style-name="T29">views</text:span><text:span text:style-name="T30"> </text:span><text:span text:style-name="T31"><text:line-break/></text:span><text:span text:style-name="T30">│   │   │   └── </text:span><text:span text:style-name="T29">Solfege</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Kanban</text:span><text:span text:style-name="T30"> </text:span><text:span text:style-name="T31"><text:line-break/></text:span><text:span text:style-name="T30">│   │   │   ├── </text:span><text:span text:style-name="T29">js</text:span><text:span text:style-name="T30"> </text:span><text:span text:style-name="T31"><text:line-break/></text:span><text:span text:style-name="T30">│   │   │   │   └── </text:span><text:span text:style-name="T29">project</text:span><text:span text:style-name="T30"> </text:span><text:span text:style-name="T31"><text:line-break/></text:span><text:span text:style-name="T30">│   │   │   │       └── </text:span><text:span text:style-name="T29">cardType</text:span><text:span text:style-name="T30"> </text:span><text:span text:style-name="T31"><text:line-break/></text:span><text:span text:style-name="T30">│   │   │   │           └── </text:span><text:span text:style-name="T29">card</text:span><text:span text:style-name="T30"> </text:span><text:span text:style-name="T31"><text:line-break/></text:span><text:span text:style-name="T30">│   │   │   └── </text:span><text:span text:style-name="T29">views</text:span><text:span text:style-name="T30"> </text:span><text:span text:style-name="T31"><text:line-break/></text:span><text:span text:style-name="T30">│   │   │       └── </text:span><text:span text:style-name="T29">partials</text:span><text:span text:style-name="T30"> </text:span><text:span text:style-name="T31"><text:line-break/></text:span><text:span text:style-name="T30">│   │   ├── </text:span><text:span text:style-name="T29">Notifications</text:span><text:span text:style-name="T30"> </text:span><text:span text:style-name="T31"><text:line-break/></text:span><text:span text:style-name="T30">│   │   ├── </text:span><text:span text:style-name="T29">PersonManager</text:span><text:span text:style-name="T30"> </text:span><text:span text:style-name="T31"><text:line-break/></text:span><text:span text:style-name="T30">│   │   │   ├── </text:span><text:span text:style-name="T29">j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Pwa</text:span><text:span text:style-name="T30"> </text:span><text:span text:style-name="T31"><text:line-break/></text:span><text:span text:style-name="T30">│   │   ├── </text:span><text:span text:style-name="T29">Translator</text:span><text:span text:style-name="T30"> </text:span><text:span text:style-name="T31"><text:line-break/></text:span><text:span text:style-name="T30">│   │   │   ├── </text:span><text:span text:style-name="T29">j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User</text:span><text:span text:style-name="T30"> </text:span><text:span text:style-name="T31"><text:line-break/></text:span><text:span text:style-name="T30">│   │   │   ├── </text:span><text:span text:style-name="T29">j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VisitorInsights</text:span><text:span text:style-name="T30"> </text:span><text:span text:style-name="T31"><text:line-break/></text:span><text:span text:style-name="T30">│   │   │   ├── </text:span><text:span text:style-name="T29">js</text:span><text:span text:style-name="T30"> </text:span><text:span text:style-name="T31"><text:line-break/></text:span><text:span text:style-name="T30">│   │   │   └── </text:span><text:span text:style-name="T29">views</text:span><text:span text:style-name="T30"> </text:span><text:span text:style-name="T31"><text:line-break/></text:span><text:span text:style-name="T30">│   │   └── </text:span><text:span text:style-name="T29">Webmaster</text:span><text:span text:style-name="T30"> </text:span><text:span text:style-name="T31"><text:line-break/></text:span><text:span text:style-name="T30">│   │       ├── </text:span><text:span text:style-name="T29">js</text:span><text:span text:style-name="T30"> </text:span><text:span text:style-name="T31"><text:line-break/></text:span><text:span text:style-name="T30">│   │       └── </text:span><text:span text:style-name="T29">views</text:span><text:span text:style-name="T30"> </text:span><text:span text:style-name="T31"><text:line-break/></text:span><text:soft-page-break/><text:span text:style-name="T30">│   │           ├── </text:span><text:span text:style-name="T29">dbbrowser</text:span><text:span text:style-name="T30"> </text:span><text:span text:style-name="T31"><text:line-break/></text:span><text:span text:style-name="T30">│   │           ├── </text:span><text:span text:style-name="T29">navbar</text:span><text:span text:style-name="T30"> </text:span><text:span text:style-name="T31"><text:line-break/></text:span><text:span text:style-name="T30">│   │           └── </text:span><text:span text:style-name="T29">partials</text:span><text:span text:style-name="T30"> </text:span><text:span text:style-name="T31"><text:line-break/></text:span><text:span text:style-name="T30">│   └── </text:span><text:span text:style-name="T29">valueObjects</text:span><text:span text:style-name="T31"><text:line-break/></text:span></text:p>
      <text:h text:style-name="Heading_20_1" text:outline-level="1">Ancien<text:span text:style-name="T32">s</text:span></text:h>
      <text:h text:style-name="P24" text:outline-level="2"><text:span text:style-name="T33">Installation</text:span><text:span text:style-name="T34">s</text:span></text:h>
      <text:p text:style-name="P25">Ma webapp, demande la dernière version de l’application disponible quand on utilise le menu webmaster.</text:p>
      <text:p text:style-name="P25">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3" text:outline-level="3">Dans les champs on retrouve :</text:h>
      <text:h text:style-name="Heading_20_4" text:outline-level="4">Uri</text:h>
      <table:table table:name="Tableau1" table:style-name="Tableau1">
        <table:table-column table:style-name="Tableau1.A"/>
        <table:table-row>
          <table:table-cell table:style-name="Tableau1.A1" office:value-type="string">
            <text:p text:style-name="P26">/api/lastVersion?cv=0.6.0</text:p>
          </table:table-cell>
        </table:table-row>
        <table:table-row>
          <table:table-cell table:style-name="Tableau1.A2" office:value-type="string">
            <text:p text:style-name="P27">/api/lastVersion</text:p>
          </table:table-cell>
        </table:table-row>
      </table:table>
      <text:p text:style-name="P25">→ les anciennes versions de l’application n’indiquaient pas leur CurrentVersion.</text:p>
      <text:h text:style-name="Heading_20_4" text:outline-level="4">Who :</text:h>
      <table:table table:name="Tableau2" table:style-name="Tableau2">
        <table:table-column table:style-name="Tableau2.A"/>
        <table:table-row>
          <table:table-cell table:style-name="Tableau2.A1" office:value-type="string">
            <text:p text:style-name="P26">2a01:cb10:8e98:6c00:9b78:1ca4:f8a9:ea64</text:p>
          </table:table-cell>
        </table:table-row>
        <table:table-row>
          <table:table-cell table:style-name="Tableau2.A2" office:value-type="string">
            <text:p text:style-name="P27">gwc.cluster100.hosting.ovh.net</text:p>
          </table:table-cell>
        </table:table-row>
      </table:table>
      <text:h text:style-name="Heading_20_4" text:outline-level="4">CreatedAt</text:h>
      <table:table table:name="Tableau3" table:style-name="Tableau3">
        <table:table-column table:style-name="Tableau3.A"/>
        <table:table-row>
          <table:table-cell table:style-name="Tableau3.A1" office:value-type="string">
            <text:p text:style-name="P26">2025-08-23 07:49:56</text:p>
          </table:table-cell>
        </table:table-row>
        <table:table-row>
          <table:table-cell table:style-name="Tableau3.A2" office:value-type="string">
            <text:p text:style-name="P27">2025-08-22 17:22:26</text:p>
          </table:table-cell>
        </table:table-row>
      </table:table>
      <text:h text:style-name="Heading_20_4" text:outline-level="4">Message</text:h>
      <table:table table:name="Tableau4" table:style-name="Tableau4">
        <table:table-column table:style-name="Tableau4.A"/>
        <table:table-row>
          <table:table-cell table:style-name="Tableau4.A1" office:value-type="string">
            <text:p text:style-name="P26">PHP/8.4.5</text:p>
          </table:table-cell>
        </table:table-row>
        <table:table-row>
          <table:table-cell table:style-name="Tableau4.A2" office:value-type="string">
            <text:p text:style-name="P28"><text:s text:c="2"/></text:p>
          </table:table-cell>
        </table:table-row>
      </table:table>
      <text:p text:style-name="P29">→ les anciennes versions de l’application n’indiquaient pas leur <text:span text:style-name="T34">ver</text:span>sion <text:span text:style-name="T34">PHP</text:span>.</text:p>
      <text:p text:style-name="P30">Pour chaque « Who » on veut :</text:p>
      <text:list text:style-name="L1">
        <text:list-item>
          <text:p text:style-name="P31">la date de la dernière interrogation</text:p>
        </text:list-item>
        <text:list-item>
          <text:p text:style-name="P31">les versions de la webapp, et PHP si elles existent</text:p>
        </text:list-item>
        <text:list-item>
          <text:p text:style-name="P31"><text:soft-page-break/>le nombre d’interrogations</text:p>
        </text:list-item>
      </text:list>
      <text:h text:style-name="Heading_20_3" text:outline-level="3">Technique</text:h>
      <text:h text:style-name="Heading_20_4" text:outline-level="4"><text:span text:style-name="T34">Le c</text:span>ontrôleur</text:h>
      <text:p text:style-name="P30">Se baser sur celui qui affiche les visiteurs du site</text:p>
      <text:p text:style-name="Code"><text:span text:style-name="T35">public</text:span> <text:span text:style-name="T35">function</text:span> showLastVisits()</text:p>
      <text:p text:style-name="Code">{</text:p>
      <text:p text:style-name="Code">$person = <text:span text:style-name="T35">$this</text:span>-&gt;connectedUser-&gt;get()-&gt;person ?? <text:span text:style-name="T35">false</text:span>;</text:p>
      <text:p text:style-name="Code"><text:span text:style-name="T35">if</text:span> ($person &amp;&amp; <text:span text:style-name="T35">$this</text:span>-&gt;connectedUser-&gt;isWebmaster()) {</text:p>
      <text:p text:style-name="Code">$activePersons = <text:span text:style-name="T35">$this</text:span>-&gt;dataHelper-&gt;gets(<text:span text:style-name="T36">'Person'</text:span>, [<text:span text:style-name="T36">'Inactivated'</text:span> =&gt; <text:span text:style-name="T37">0</text:span>]);</text:p>
      <text:p text:style-name="Code"><text:span text:style-name="T35">$this</text:span>-&gt;render(<text:span text:style-name="T36">'VisitorInsights/views/lastVisits.latte'</text:span>, Params::getAll([</text:p>
      <text:p text:style-name="Code"><text:span text:style-name="T36">'lastVisits'</text:span> =&gt; <text:span text:style-name="T35">$this</text:span>-&gt;logDataHelper-&gt;getLastVisitPerActivePersonWithTimeAgo($activePersons),</text:p>
      <text:p text:style-name="Code"><text:span text:style-name="T36">'totalActiveUsers'</text:span> =&gt; count($activePersons),</text:p>
      <text:p text:style-name="Code"><text:span text:style-name="T36">'navItems'</text:span> =&gt; <text:span text:style-name="T35">$this</text:span>-&gt;getNavItems($person),</text:p>
      <text:p text:style-name="Code">]));</text:p>
      <text:p text:style-name="Code">} <text:span text:style-name="T35">else</text:span> <text:span text:style-name="T35">$this</text:span>-&gt;application-&gt;getErrorManager()-&gt;raise(ApplicationError::Forbidden, <text:span text:style-name="T36">'Page not allowed in file '</text:span> . <text:span text:style-name="T35">__FILE__</text:span> . <text:span text:style-name="T36">' at line '</text:span> . <text:span text:style-name="T35">__LINE__</text:span>);</text:p>
      <text:p text:style-name="Code">}</text:p>
      <text:h text:style-name="Heading_20_4" text:outline-level="4">La vue</text:h>
      <text:p text:style-name="Code">{<text:span text:style-name="T35">extends </text:span><text:span text:style-name="T36">'../../Webmaster/views/visitorInsights.latte'</text:span>}</text:p>
      <text:p text:style-name="Code"/>
      <text:p text:style-name="Code">{<text:span text:style-name="T35">block </text:span>title}Dernières visites{<text:span text:style-name="T35">/block</text:span>}</text:p>
      <text:p text:style-name="Code"/>
      <text:p text:style-name="Code">{<text:span text:style-name="T35">block </text:span>content}</text:p>
      <text:p text:style-name="Code"><text:span text:style-name="T38">&lt;div</text:span> <text:span text:style-name="T39">class</text:span>=<text:span text:style-name="T35">"d-flexc"</text:span><text:span text:style-name="T38">&gt;</text:span></text:p>
      <text:p text:style-name="Code"><text:span text:style-name="T38">&lt;div</text:span> <text:span text:style-name="T39">class</text:span>=<text:span text:style-name="T35">"container mt-4 d-flex justify-content-between align-items-center mb-3"</text:span><text:span text:style-name="T38">&gt;</text:span></text:p>
      <text:p text:style-name="Code">&lt;h1&gt;</text:p>
      <text:p text:style-name="Code">Dernières visites</text:p>
      <text:p text:style-name="Code"><text:span text:style-name="T38">&lt;span</text:span> <text:span text:style-name="T39">class</text:span>=<text:span text:style-name="T35">"badge bg-primary fs-6"</text:span><text:span text:style-name="T38">&gt;</text:span>{count($lastVisits)} visiteurs<text:span text:style-name="T38">&lt;/span&gt;</text:span></text:p>
      <text:p text:style-name="Code">&lt;/h1&gt;</text:p>
      <text:p text:style-name="Code">&lt;div&gt;</text:p>
      <text:p text:style-name="Code"><text:span text:style-name="T38">&lt;span</text:span> <text:span text:style-name="T39">class</text:span>=<text:span text:style-name="T35">"badge bg-secondary fs-6"</text:span><text:span text:style-name="T38">&gt;</text:span>{$totalActiveUsers} utilisateurs actifs<text:span text:style-name="T38">&lt;/span&gt;</text:span></text:p>
      <text:p text:style-name="Code">&lt;/div&gt;</text:p>
      <text:p text:style-name="Code">&lt;/div&gt;</text:p>
      <text:p text:style-name="Code"/>
      <text:p text:style-name="Code"><text:span text:style-name="T38">&lt;div</text:span> <text:span text:style-name="T39">class</text:span>=<text:span text:style-name="T35">"d-flex"</text:span><text:span text:style-name="T38">&gt;</text:span></text:p>
      <text:p text:style-name="Code"><text:span text:style-name="T38">&lt;div</text:span> <text:span text:style-name="T39">class</text:span>=<text:span text:style-name="T35">"table-responsive"</text:span><text:span text:style-name="T38">&gt;</text:span></text:p>
      <text:p text:style-name="Code"><text:span text:style-name="T38">&lt;table</text:span> <text:span text:style-name="T39">class</text:span>=<text:span text:style-name="T35">"table table-hover"</text:span><text:span text:style-name="T38">&gt;</text:span></text:p>
      <text:p text:style-name="Code"><text:span text:style-name="T38">&lt;thead</text:span> <text:span text:style-name="T39">class</text:span>=<text:span text:style-name="T35">"table-dark"</text:span><text:span text:style-name="T38">&gt;</text:span></text:p>
      <text:p text:style-name="Code">&lt;tr&gt;</text:p>
      <text:p text:style-name="Code"><text:span text:style-name="T38">&lt;th&gt;</text:span>Membre<text:span text:style-name="T38">&lt;/th&gt;</text:span></text:p>
      <text:p text:style-name="Code"><text:span text:style-name="T38">&lt;th&gt;</text:span>Email<text:span text:style-name="T38">&lt;/th&gt;</text:span></text:p>
      <text:p text:style-name="Code"><text:span text:style-name="T38">&lt;th&gt;</text:span>Dernière page<text:span text:style-name="T38">&lt;/th&gt;</text:span></text:p>
      <text:p text:style-name="Code"><text:span text:style-name="T38">&lt;th&gt;</text:span>Dernière activité<text:span text:style-name="T38">&lt;/th&gt;</text:span></text:p>
      <text:p text:style-name="Code"><text:span text:style-name="T38">&lt;th&gt;</text:span>OS<text:span text:style-name="T38">&lt;/th&gt;</text:span></text:p>
      <text:p text:style-name="Code"><text:span text:style-name="T38">&lt;th&gt;</text:span>Navigateur<text:span text:style-name="T38">&lt;/th&gt;</text:span></text:p>
      <text:p text:style-name="Code">&lt;/tr&gt;</text:p>
      <text:p text:style-name="Code">&lt;/thead&gt;</text:p>
      <text:p text:style-name="Code">&lt;tbody&gt;</text:p>
      <text:p text:style-name="Text_20_body"/>
      <text:h text:style-name="P32" text:outline-level="1"><text:soft-page-break/>Notification<text:span text:style-name="T40">s</text:span></text:h>
      <text:h text:style-name="Heading_20_2" text:outline-level="2">Articles</text:h>
      <text:p text:style-name="P33">[x] Nouvel article<text:tab/><text:tab/>[x] avec sondage</text:p>
      <text:p text:style-name="P33">[x] Article mis à jour<text:tab/>[x] avec sondage</text:p>
      <text:p text:style-name="P33">[x] Nouveau vote sur un sondage<text:tab/>[x] si j’ai voté</text:p>
      <text:p text:style-name="P33"><text:tab/><text:tab/><text:tab/><text:tab/><text:tab/><text:tab/><text:tab/><text:tab/><text:tab/><text:tab/><text:tab/>[x] si je suis l’auteur</text:p>
      <text:h text:style-name="Heading_20_2" text:outline-level="2">Messages</text:h>
      <text:p text:style-name="P34">[x] <text:span text:style-name="T41">sur un</text:span> article<text:tab/><text:tab/>[x] <text:span text:style-name="T41">si je suis l’auteur</text:span></text:p>
      <text:p text:style-name="P35">[x] sur un événement<text:tab/>[x] si je suis inscrit</text:p>
      <text:p text:style-name="P35"><text:tab/><text:tab/><text:tab/><text:tab/><text:tab/><text:tab/><text:tab/>[x] si dans mes préférences</text:p>
      <text:p text:style-name="P35"><text:tab/><text:tab/><text:tab/><text:tab/><text:tab/><text:tab/><text:tab/>[x] si je suis le créateur</text:p>
      <text:p text:style-name="P35">[x] sur un groupe ou j’ai été inscrit</text:p>
      <text:p text:style-name="P35"><text:tab/>[x] groupe1</text:p>
      <text:p text:style-name="P35"><text:tab/>[x] groupe2…</text:p>
      <text:p text:style-name="P35">[x] sur un groupe ou je me suis inscrit</text:p>
      <text:p text:style-name="P35"><text:tab/>[x] groupe1</text:p>
      <text:p text:style-name="P35"><text:tab/>[x] groupe2…</text:p>
      <text:p text:style-name="P35">[x] sur un groupe ou je ne me suis pas inscrit</text:p>
      <text:p text:style-name="P36">$groups contient la liste de tous les groupes et leur type</text:p>
      <text:p text:style-name="P36">$currentNotifications contient toutes les notifications de l’utilisateur</text:p>
      <text:p text:style-name="P36"/>
      <text:p text:style-name="P36">Compléter cette vue</text:p>
      <text:p text:style-name="P37">{<text:span text:style-name="T9">extends </text:span><text:span text:style-name="T16">"user.latte"</text:span>}</text:p>
      <text:p text:style-name="P17"/>
      <text:p text:style-name="P38">{<text:span text:style-name="T9">block </text:span>content}</text:p>
      <text:p text:style-name="P38"><text:span text:style-name="T17">&lt;</text:span><text:span text:style-name="T9">form</text:span><text:span text:style-name="T17"> </text:span><text:span text:style-name="T18">method</text:span><text:span text:style-name="T10">="</text:span><text:span text:style-name="T16">POST</text:span><text:span text:style-name="T10">"</text:span><text:span text:style-name="T17"> </text:span><text:span text:style-name="T18">data-form</text:span><text:span text:style-name="T10">="</text:span><text:span text:style-name="T16">checkSave</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row</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col-md-6</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form-check</text:span><text:span text:style-name="T10">"</text:span><text:span text:style-name="T17">&gt;</text:span></text:p>
      <text:p text:style-name="P38"><text:span text:style-name="T17">&lt;</text:span><text:span text:style-name="T9">input</text:span><text:span text:style-name="T17"> </text:span><text:span text:style-name="T18">type</text:span><text:span text:style-name="T10">="</text:span><text:span text:style-name="T16">checkbox</text:span><text:span text:style-name="T10">"</text:span><text:span text:style-name="T17"> </text:span><text:span text:style-name="T18">class</text:span><text:span text:style-name="T10">="</text:span><text:span text:style-name="T16">form-check-input</text:span><text:span text:style-name="T10">"</text:span><text:span text:style-name="T17"> </text:span><text:span text:style-name="T18">id</text:span><text:span text:style-name="T10">="</text:span><text:span text:style-name="T16">noAlerts</text:span><text:span text:style-name="T10">"</text:span><text:span text:style-name="T17"> </text:span><text:span text:style-name="T18">name</text:span><text:span text:style-name="T10">="</text:span><text:span text:style-name="T16">preferences[noAlerts]</text:span><text:span text:style-name="T10">"</text:span><text:span text:style-name="T17"> </text:span><text:span text:style-name="T18">{isset($currentNotifications[</text:span><text:span text:style-name="T42">'noNotification'])</text:span><text:span text:style-name="T17"> </text:span><text:span text:style-name="T18">?</text:span><text:span text:style-name="T17"> </text:span><text:span text:style-name="T18">checked</text:span><text:span text:style-name="T17"> </text:span><text:span text:style-name="T18">:</text:span><text:span text:style-name="T17"> </text:span><text:span text:style-name="T42">''}</text:span><text:span text:style-name="T17">&gt;</text:span></text:p>
      <text:p text:style-name="P38"><text:span text:style-name="T17">&lt;</text:span><text:span text:style-name="T9">label</text:span><text:span text:style-name="T17"> </text:span><text:span text:style-name="T18">class</text:span><text:span text:style-name="T10">="</text:span><text:span text:style-name="T16">form-check-label</text:span><text:span text:style-name="T10">"</text:span><text:span text:style-name="T17"> </text:span><text:span text:style-name="T18">for</text:span><text:span text:style-name="T10">="</text:span><text:span text:style-name="T16">noAlerts</text:span><text:span text:style-name="T10">"</text:span><text:span text:style-name="T17">&gt;</text:span></text:p>
      <text:p text:style-name="P38"><text:span text:style-name="T17">&lt;</text:span><text:span text:style-name="T9">strong</text:span><text:span text:style-name="T17">&gt;</text:span>Ne recevoir aucune notification<text:span text:style-name="T17">&lt;/</text:span><text:span text:style-name="T9">strong</text:span><text:span text:style-name="T17">&gt;</text:span></text:p>
      <text:p text:style-name="P38"><text:span text:style-name="T17">&lt;/</text:span><text:span text:style-name="T9">label</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17"/>
      <text:p text:style-name="P38"><text:span text:style-name="T17">&lt;</text:span><text:span text:style-name="T9">div</text:span><text:span text:style-name="T17"> </text:span><text:span text:style-name="T18">id</text:span><text:span text:style-name="T10">="</text:span><text:span text:style-name="T16">alertOptions</text:span><text:span text:style-name="T10">"</text:span><text:span text:style-name="T17">&gt;</text:span></text:p>
      <text:p text:style-name="P38"><text:soft-page-break/><text:span text:style-name="T17">&lt;</text:span><text:span text:style-name="T9">div</text:span><text:span text:style-name="T17"> </text:span><text:span text:style-name="T18">class</text:span><text:span text:style-name="T10">="</text:span><text:span text:style-name="T16">card mb-3</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card-header</text:span><text:span text:style-name="T10">"</text:span><text:span text:style-name="T17">&gt;</text:span></text:p>
      <text:p text:style-name="P38"><text:span text:style-name="T17">&lt;</text:span><text:span text:style-name="T9">h5</text:span><text:span text:style-name="T17"> </text:span><text:span text:style-name="T18">class</text:span><text:span text:style-name="T10">="</text:span><text:span text:style-name="T16">card-title mb-0</text:span><text:span text:style-name="T10">"</text:span><text:span text:style-name="T17">&gt;</text:span>Sélectionnez les notifications que vous souhaitez recevoir<text:span text:style-name="T17">&lt;/</text:span><text:span text:style-name="T9">h5</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card-body</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Articles</text:span><text:span text:style-name="T10">"</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Events</text:span><text:span text:style-name="T10">"</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essages</text:span><text:span text:style-name="T10">"</text:span><text:span text:style-name="T17">&gt;</text:span></text:p>
      <text:p text:style-name="P38"><text:span text:style-name="T17">&lt;/</text:span><text:span text:style-name="T9">div</text:span><text:span text:style-name="T17">&gt;</text:span> </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9"/>
      <text:p text:style-name="P38"><text:span text:style-name="T17">&lt;/</text:span><text:span text:style-name="T9">div</text:span><text:span text:style-name="T17">&gt;</text:span></text:p>
      <text:p text:style-name="P38"><text:span text:style-name="T17">&lt;/</text:span><text:span text:style-name="T9">div</text:span><text:span text:style-name="T17">&gt;</text:span> </text:p>
      <text:p text:style-name="P38"><text:span text:style-name="T17">&lt;</text:span><text:span text:style-name="T9">div</text:span><text:span text:style-name="T17"> </text:span><text:span text:style-name="T18">class</text:span><text:span text:style-name="T10">="</text:span><text:span text:style-name="T16">mt-4</text:span><text:span text:style-name="T10">"</text:span><text:span text:style-name="T17">&gt;</text:span></text:p>
      <text:p text:style-name="P38"><text:span text:style-name="T17">&lt;</text:span><text:span text:style-name="T9">button</text:span><text:span text:style-name="T17"> </text:span><text:span text:style-name="T18">type</text:span><text:span text:style-name="T10">="</text:span><text:span text:style-name="T16">submit</text:span><text:span text:style-name="T10">"</text:span><text:span text:style-name="T17"> </text:span><text:span text:style-name="T18">class</text:span><text:span text:style-name="T10">="</text:span><text:span text:style-name="T16">btn btn-primary</text:span><text:span text:style-name="T10">"</text:span><text:span text:style-name="T17">&gt;</text:span>Valider<text:span text:style-name="T17">&lt;/</text:span><text:span text:style-name="T9">button</text:span><text:span text:style-name="T17">&gt;</text:span></text:p>
      <text:p text:style-name="P38"><text:span text:style-name="T17">&lt;/</text:span><text:span text:style-name="T9">div</text:span><text:span text:style-name="T17">&gt;</text:span></text:p>
      <text:p text:style-name="P38"><text:span text:style-name="T17">&lt;/</text:span><text:span text:style-name="T9">form</text:span><text:span text:style-name="T17">&gt;</text:span></text:p>
      <text:p text:style-name="P38">{<text:span text:style-name="T9">/block</text:span>}</text:p>
      <text:p text:style-name="P17"/>
      <text:p text:style-name="P38">{<text:span text:style-name="T9">block </text:span>scripts}</text:p>
      <text:p text:style-name="P38"><text:span text:style-name="T17">&lt;</text:span><text:span text:style-name="T9">script</text:span><text:span text:style-name="T17"> </text:span><text:span text:style-name="T18">src</text:span><text:span text:style-name="T10">="</text:span><text:span text:style-name="T16">/app/modules/User/js/notifications.js</text:span><text:span text:style-name="T10">"</text:span><text:span text:style-name="T17">&gt;&lt;/</text:span><text:span text:style-name="T9">script</text:span><text:span text:style-name="T17">&gt;</text:span></text:p>
      <text:p text:style-name="P38">{<text:span text:style-name="T9">/block</text:span>}</text:p>
      <text:p text:style-name="P36"/>
      <text:h text:style-name="P40" text:outline-level="1">Kanban</text:h>
      <text:p text:style-name="P41">Avec ces tables</text:p>
      <text:p text:style-name="P42"><text:span text:style-name="T9">CREATE</text:span> <text:span text:style-name="T9">TABLE</text:span> <text:span text:style-name="T15">IF</text:span> <text:span text:style-name="T9">NOT</text:span> <text:span text:style-name="T9">EXISTS</text:span> <text:span text:style-name="T10">"</text:span><text:span text:style-name="T16">KanbanCard</text:span><text:span text:style-name="T10">"</text:span> (</text:p>
      <text:p text:style-name="P38"><text:span text:style-name="T10">"</text:span><text:span text:style-name="T16">Id</text:span><text:span text:style-name="T10">"</text:span> <text:span text:style-name="T14">INTEGER</text:span>,</text:p>
      <text:p text:style-name="P38"><text:span text:style-name="T10">"</text:span><text:span text:style-name="T16">Title</text:span><text:span text:style-name="T10">"</text:span> <text:span text:style-name="T14">TEXT</text:span> <text:span text:style-name="T9">NOT NULL</text:span>,</text:p>
      <text:p text:style-name="P38"><text:span text:style-name="T10">"</text:span><text:span text:style-name="T16">Detail</text:span><text:span text:style-name="T10">"</text:span> <text:span text:style-name="T14">TEXT</text:span> <text:span text:style-name="T9">NOT NULL</text:span>,</text:p>
      <text:p text:style-name="P38"><text:span text:style-name="T10">"</text:span><text:span text:style-name="T16">IdKanbanCardType</text:span><text:span text:style-name="T10">"</text:span> <text:span text:style-name="T14">INTEGER</text:span> <text:span text:style-name="T9">NOT NULL</text:span>,</text:p>
      <text:p text:style-name="P38"><text:span text:style-name="T9">PRIMARY KEY</text:span>(<text:span text:style-name="T10">"</text:span><text:span text:style-name="T16">Id</text:span><text:span text:style-name="T10">"</text:span>),</text:p>
      <text:p text:style-name="P38"><text:span text:style-name="T9">FOREIGN KEY</text:span>(<text:span text:style-name="T10">"</text:span><text:span text:style-name="T16">IdKanbanCardType</text:span><text:span text:style-name="T10">"</text:span>) <text:span text:style-name="T9">REFERENCES</text:span> <text:span text:style-name="T10">"</text:span><text:span text:style-name="T16">KanbanCardType</text:span><text:span text:style-name="T10">"</text:span>(<text:span text:style-name="T10">"</text:span><text:span text:style-name="T16">Id</text:span><text:span text:style-name="T10">"</text:span>)</text:p>
      <text:p text:style-name="P38">);</text:p>
      <text:p text:style-name="P38"><text:span text:style-name="T9">CREATE</text:span> <text:span text:style-name="T9">TABLE</text:span> <text:span text:style-name="T15">IF</text:span> <text:span text:style-name="T9">NOT</text:span> <text:span text:style-name="T9">EXISTS</text:span> <text:span text:style-name="T10">"</text:span><text:span text:style-name="T16">KanbanCardStatus</text:span><text:span text:style-name="T10">"</text:span> (</text:p>
      <text:p text:style-name="P38"><text:span text:style-name="T10">"</text:span><text:span text:style-name="T16">Id</text:span><text:span text:style-name="T10">"</text:span> <text:span text:style-name="T14">INTEGER</text:span>,</text:p>
      <text:p text:style-name="P38"><text:span text:style-name="T10">"</text:span><text:span text:style-name="T16">IdKanbanCard</text:span><text:span text:style-name="T10">"</text:span> <text:span text:style-name="T14">INTEGER</text:span> <text:span text:style-name="T9">NOT NULL</text:span>,</text:p>
      <text:p text:style-name="P38"><text:span text:style-name="T10">"</text:span><text:span text:style-name="T16">What</text:span><text:span text:style-name="T10">"</text:span> <text:span text:style-name="T14">TEXT</text:span> <text:span text:style-name="T9">NOT NULL</text:span>,</text:p>
      <text:p text:style-name="P38"><text:span text:style-name="T10">"</text:span><text:span text:style-name="T16">Remark</text:span><text:span text:style-name="T10">"</text:span> <text:span text:style-name="T14">TEXT</text:span> <text:span text:style-name="T9">NOT NULL</text:span>,</text:p>
      <text:p text:style-name="P38"><text:span text:style-name="T10">"</text:span><text:span text:style-name="T16">LastUpdate</text:span><text:span text:style-name="T10">"</text:span> <text:span text:style-name="T14">TEXT</text:span> <text:span text:style-name="T9">NOT NULL</text:span> <text:span text:style-name="T9">DEFAULT</text:span> current_timestamp,</text:p>
      <text:p text:style-name="P38"><text:span text:style-name="T9">PRIMARY KEY</text:span>(<text:span text:style-name="T10">"</text:span><text:span text:style-name="T16">Id</text:span><text:span text:style-name="T10">"</text:span>),</text:p>
      <text:p text:style-name="P38"><text:span text:style-name="T9">FOREIGN KEY</text:span>(<text:span text:style-name="T10">"</text:span><text:span text:style-name="T16">IdKanbanCard</text:span><text:span text:style-name="T10">"</text:span>) <text:span text:style-name="T9">REFERENCES</text:span> <text:span text:style-name="T10">"</text:span><text:span text:style-name="T16">KanbanCard</text:span><text:span text:style-name="T10">"</text:span>(<text:span text:style-name="T10">"</text:span><text:span text:style-name="T16">Id</text:span><text:span text:style-name="T10">"</text:span>)</text:p>
      <text:p text:style-name="P38">);</text:p>
      <text:p text:style-name="P38"><text:span text:style-name="T9">CREATE</text:span> <text:span text:style-name="T9">TABLE</text:span> <text:span text:style-name="T15">IF</text:span> <text:span text:style-name="T9">NOT</text:span> <text:span text:style-name="T9">EXISTS</text:span> <text:span text:style-name="T10">"</text:span><text:span text:style-name="T16">KanbanCardType</text:span><text:span text:style-name="T10">"</text:span> (</text:p>
      <text:p text:style-name="P38"><text:span text:style-name="T10">"</text:span><text:span text:style-name="T16">Id</text:span><text:span text:style-name="T10">"</text:span> <text:span text:style-name="T14">INTEGER</text:span>,</text:p>
      <text:p text:style-name="P38"><text:span text:style-name="T10">"</text:span><text:span text:style-name="T16">Label</text:span><text:span text:style-name="T10">"</text:span> <text:span text:style-name="T14">TEXT</text:span> <text:span text:style-name="T9">NOT NULL</text:span>,</text:p>
      <text:p text:style-name="P38"><text:span text:style-name="T10">"</text:span><text:span text:style-name="T16">Detail</text:span><text:span text:style-name="T10">"</text:span> <text:span text:style-name="T14">TEXT</text:span> <text:span text:style-name="T9">NOT NULL</text:span>,</text:p>
      <text:p text:style-name="P38"><text:span text:style-name="T10">"</text:span><text:span text:style-name="T16">IdKanbanProject</text:span><text:span text:style-name="T10">"</text:span> <text:span text:style-name="T14">INTEGER</text:span> <text:span text:style-name="T9">NOT NULL</text:span>,</text:p>
      <text:p text:style-name="P38"><text:span text:style-name="T9">PRIMARY KEY</text:span>(<text:span text:style-name="T10">"</text:span><text:span text:style-name="T16">Id</text:span><text:span text:style-name="T10">"</text:span>),</text:p>
      <text:p text:style-name="P38"><text:soft-page-break/><text:span text:style-name="T9">FOREIGN KEY</text:span>(<text:span text:style-name="T10">"</text:span><text:span text:style-name="T16">IdKanbanProject</text:span><text:span text:style-name="T10">"</text:span>) <text:span text:style-name="T9">REFERENCES</text:span> <text:span text:style-name="T10">"</text:span><text:span text:style-name="T16">KanbanProject</text:span><text:span text:style-name="T10">"</text:span>(<text:span text:style-name="T10">"</text:span><text:span text:style-name="T16">Id</text:span><text:span text:style-name="T10">"</text:span>)</text:p>
      <text:p text:style-name="P38">);</text:p>
      <text:p text:style-name="P38"><text:span text:style-name="T9">CREATE</text:span> <text:span text:style-name="T9">TABLE</text:span> <text:span text:style-name="T15">IF</text:span> <text:span text:style-name="T9">NOT</text:span> <text:span text:style-name="T9">EXISTS</text:span> <text:span text:style-name="T10">"</text:span><text:span text:style-name="T16">KanbanProject</text:span><text:span text:style-name="T10">"</text:span> (</text:p>
      <text:p text:style-name="P38"><text:span text:style-name="T10">"</text:span><text:span text:style-name="T16">Id</text:span><text:span text:style-name="T10">"</text:span> <text:span text:style-name="T14">INTEGER</text:span>,</text:p>
      <text:p text:style-name="P38"><text:span text:style-name="T10">"</text:span><text:span text:style-name="T16">Title</text:span><text:span text:style-name="T10">"</text:span> <text:span text:style-name="T14">TEXT</text:span> <text:span text:style-name="T9">NOT NULL</text:span>,</text:p>
      <text:p text:style-name="P38"><text:span text:style-name="T10">"</text:span><text:span text:style-name="T16">Detail</text:span><text:span text:style-name="T10">"</text:span> <text:span text:style-name="T14">TEXT</text:span> <text:span text:style-name="T9">NOT NULL</text:span>,</text:p>
      <text:p text:style-name="P38"><text:span text:style-name="T10">"</text:span><text:span text:style-name="T16">IdPerson</text:span><text:span text:style-name="T10">"</text:span> <text:span text:style-name="T14">INTEGER</text:span> <text:span text:style-name="T9">NOT NULL</text:span>,</text:p>
      <text:p text:style-name="P38"><text:span text:style-name="T9">PRIMARY KEY</text:span>(<text:span text:style-name="T10">"</text:span><text:span text:style-name="T16">Id</text:span><text:span text:style-name="T10">"</text:span>),</text:p>
      <text:p text:style-name="P38"><text:span text:style-name="T9">FOREIGN KEY</text:span>(<text:span text:style-name="T10">"</text:span><text:span text:style-name="T16">IdPerson</text:span><text:span text:style-name="T10">"</text:span>) <text:span text:style-name="T9">REFERENCES</text:span> <text:span text:style-name="T10">"</text:span><text:span text:style-name="T16">Person</text:span><text:span text:style-name="T10">"</text:span>(<text:span text:style-name="T10">"</text:span><text:span text:style-name="T16">Id</text:span><text:span text:style-name="T10">"</text:span>)</text:p>
      <text:p text:style-name="P38">);</text:p>
      <text:p text:style-name="P41">Mettre à jour la vue. Afficher un plus et un combobox qui contient la liste des projets. Si on sélectionne un projet, le [+] disparaît, on affiche un [+] après la combobox. Celui-ci permet de créer une nouvelle carte dans ce projet. </text:p>
      <text:p text:style-name="P41"/>
      <text:p text:style-name="P42">{<text:span text:style-name="T9">layout </text:span><text:span text:style-name="T16">'../../Common/views/layout.latte'</text:span>}</text:p>
      <text:p text:style-name="P17"/>
      <text:p text:style-name="P38">{<text:span text:style-name="T9">block </text:span>navbar}</text:p>
      <text:p text:style-name="P38">{<text:span text:style-name="T9">include </text:span><text:span text:style-name="T16">'../../Webmaster/views/navbar/designer.latte'</text:span>}</text:p>
      <text:p text:style-name="P38">{<text:span text:style-name="T9">/block</text:span>}</text:p>
      <text:p text:style-name="P17"/>
      <text:p text:style-name="P38">{<text:span text:style-name="T9">block </text:span>head}</text:p>
      <text:p text:style-name="P38"><text:span text:style-name="T17">&lt;</text:span><text:span text:style-name="T9">style</text:span><text:span text:style-name="T17">&gt;</text:span></text:p>
      <text:p text:style-name="P38"><text:span text:style-name="T11">.</text:span><text:span text:style-name="T14">kanban-board</text:span> <text:span text:style-name="T10">{</text:span></text:p>
      <text:p text:style-name="P38"><text:span text:style-name="T11">display</text:span><text:span text:style-name="T10">:</text:span> <text:span text:style-name="T16">grid</text:span><text:span text:style-name="T10">;</text:span></text:p>
      <text:p text:style-name="P38"><text:span text:style-name="T11">grid-template-columns</text:span><text:span text:style-name="T10">:</text:span> <text:span text:style-name="T15">repeat</text:span><text:span text:style-name="T10">(</text:span><text:span text:style-name="T11">4</text:span><text:span text:style-name="T10">,</text:span><text:span text:style-name="T16"> </text:span><text:span text:style-name="T11">1</text:span><text:span text:style-name="T9">fr</text:span><text:span text:style-name="T10">);</text:span></text:p>
      <text:p text:style-name="P38"><text:span text:style-name="T11">gap</text:span><text:span text:style-name="T10">:</text:span> <text:span text:style-name="T11">1</text:span><text:span text:style-name="T9">rem</text:span><text:span text:style-name="T10">;</text:span></text:p>
      <text:p text:style-name="P38"><text:span text:style-name="T11">margin-top</text:span><text:span text:style-name="T10">:</text:span> <text:span text:style-name="T11">1</text:span><text:span text:style-name="T9">rem</text:span><text:span text:style-name="T10">;</text:span></text:p>
      <text:p text:style-name="P43">}</text:p>
      <text:p text:style-name="P17"/>
      <text:p text:style-name="P38"><text:span text:style-name="T11">.</text:span><text:span text:style-name="T14">kanban-column</text:span> <text:span text:style-name="T10">{</text:span></text:p>
      <text:p text:style-name="P38"><text:span text:style-name="T11">background</text:span><text:span text:style-name="T10">:</text:span> <text:span text:style-name="T10">#</text:span><text:span text:style-name="T16">f8f9fa</text:span><text:span text:style-name="T10">;</text:span></text:p>
      <text:p text:style-name="P38"><text:span text:style-name="T11">border-radius</text:span><text:span text:style-name="T10">:</text:span> <text:span text:style-name="T11">8</text:span><text:span text:style-name="T9">px</text:span><text:span text:style-name="T10">;</text:span></text:p>
      <text:p text:style-name="P38"><text:span text:style-name="T11">padding</text:span><text:span text:style-name="T10">:</text:span> <text:span text:style-name="T11">1</text:span><text:span text:style-name="T9">rem</text:span><text:span text:style-name="T10">;</text:span></text:p>
      <text:p text:style-name="P38"><text:span text:style-name="T11">min-height</text:span><text:span text:style-name="T10">:</text:span> <text:span text:style-name="T11">500</text:span><text:span text:style-name="T9">px</text:span><text:span text:style-name="T10">;</text:span></text:p>
      <text:p text:style-name="P43">}</text:p>
      <text:p text:style-name="P17"/>
      <text:p text:style-name="P38"><text:span text:style-name="T11">.</text:span><text:span text:style-name="T14">kanban-column-header</text:span> <text:span text:style-name="T10">{</text:span></text:p>
      <text:p text:style-name="P38"><text:span text:style-name="T11">font-size</text:span><text:span text:style-name="T10">:</text:span> <text:span text:style-name="T11">2.25</text:span><text:span text:style-name="T9">rem</text:span><text:span text:style-name="T10">;</text:span></text:p>
      <text:p text:style-name="P38"><text:span text:style-name="T11">font-weight</text:span><text:span text:style-name="T10">:</text:span> <text:span text:style-name="T16">bold</text:span><text:span text:style-name="T10">;</text:span></text:p>
      <text:p text:style-name="P38"><text:span text:style-name="T11">margin-bottom</text:span><text:span text:style-name="T10">:</text:span> <text:span text:style-name="T11">1</text:span><text:span text:style-name="T9">rem</text:span><text:span text:style-name="T10">;</text:span></text:p>
      <text:p text:style-name="P38"><text:span text:style-name="T11">padding-bottom</text:span><text:span text:style-name="T10">:</text:span> <text:span text:style-name="T11">0.5</text:span><text:span text:style-name="T9">rem</text:span><text:span text:style-name="T10">;</text:span></text:p>
      <text:p text:style-name="P38"><text:span text:style-name="T11">border-bottom</text:span><text:span text:style-name="T10">:</text:span> <text:span text:style-name="T11">2</text:span><text:span text:style-name="T9">px</text:span><text:span text:style-name="T16"> solid </text:span><text:span text:style-name="T10">#</text:span><text:span text:style-name="T16">dee2e6</text:span><text:span text:style-name="T10">;</text:span></text:p>
      <text:p text:style-name="P38"><text:span text:style-name="T11">text-align</text:span><text:span text:style-name="T10">:</text:span> <text:span text:style-name="T16">center</text:span><text:span text:style-name="T10">;</text:span></text:p>
      <text:p text:style-name="P43">}</text:p>
      <text:p text:style-name="P17"/>
      <text:p text:style-name="P38"><text:span text:style-name="T11">.</text:span><text:span text:style-name="T14">kanban-card</text:span> <text:span text:style-name="T10">{</text:span></text:p>
      <text:p text:style-name="P38"><text:span text:style-name="T11">background</text:span><text:span text:style-name="T10">:</text:span> <text:span text:style-name="T11">white</text:span><text:span text:style-name="T10">;</text:span></text:p>
      <text:p text:style-name="P38"><text:span text:style-name="T11">border</text:span><text:span text:style-name="T10">:</text:span> <text:span text:style-name="T11">1</text:span><text:span text:style-name="T9">px</text:span><text:span text:style-name="T16"> solid </text:span><text:span text:style-name="T10">#</text:span><text:span text:style-name="T16">dee2e6</text:span><text:span text:style-name="T10">;</text:span></text:p>
      <text:p text:style-name="P38"><text:span text:style-name="T11">border-radius</text:span><text:span text:style-name="T10">:</text:span> <text:span text:style-name="T11">6</text:span><text:span text:style-name="T9">px</text:span><text:span text:style-name="T10">;</text:span></text:p>
      <text:p text:style-name="P38"><text:span text:style-name="T11">padding</text:span><text:span text:style-name="T10">:</text:span> <text:span text:style-name="T11">0.75</text:span><text:span text:style-name="T9">rem</text:span><text:span text:style-name="T10">;</text:span></text:p>
      <text:p text:style-name="P38"><text:span text:style-name="T11">margin-bottom</text:span><text:span text:style-name="T10">:</text:span> <text:span text:style-name="T11">0.75</text:span><text:span text:style-name="T9">rem</text:span><text:span text:style-name="T10">;</text:span></text:p>
      <text:p text:style-name="P38"><text:span text:style-name="T11">cursor</text:span><text:span text:style-name="T10">:</text:span> <text:span text:style-name="T16">move</text:span><text:span text:style-name="T10">;</text:span></text:p>
      <text:p text:style-name="P38"><text:span text:style-name="T11">transition</text:span><text:span text:style-name="T10">:</text:span> <text:span text:style-name="T16">box-shadow </text:span><text:span text:style-name="T11">0.2</text:span><text:span text:style-name="T9">s</text:span><text:span text:style-name="T10">;</text:span></text:p>
      <text:p text:style-name="P43"><text:soft-page-break/>}</text:p>
      <text:p text:style-name="P17"/>
      <text:p text:style-name="P38"><text:span text:style-name="T11">.</text:span><text:span text:style-name="T14">kanban-card</text:span><text:span text:style-name="T11">:</text:span><text:span text:style-name="T14">hover</text:span> <text:span text:style-name="T10">{</text:span></text:p>
      <text:p text:style-name="P38"><text:span text:style-name="T11">box-shadow</text:span><text:span text:style-name="T10">:</text:span> <text:span text:style-name="T11">0</text:span><text:span text:style-name="T16"> </text:span><text:span text:style-name="T11">4</text:span><text:span text:style-name="T9">px</text:span><text:span text:style-name="T16"> </text:span><text:span text:style-name="T11">6</text:span><text:span text:style-name="T9">px</text:span><text:span text:style-name="T16"> </text:span><text:span text:style-name="T15">rgba</text:span><text:span text:style-name="T10">(</text:span><text:span text:style-name="T11">0</text:span><text:span text:style-name="T10">,</text:span><text:span text:style-name="T11">0</text:span><text:span text:style-name="T10">,</text:span><text:span text:style-name="T11">0</text:span><text:span text:style-name="T10">,</text:span><text:span text:style-name="T11">0.1</text:span><text:span text:style-name="T10">);</text:span></text:p>
      <text:p text:style-name="P43">}</text:p>
      <text:p text:style-name="P17"/>
      <text:p text:style-name="P38"><text:span text:style-name="T11">.</text:span><text:span text:style-name="T14">kanban-card-title</text:span> <text:span text:style-name="T10">{</text:span></text:p>
      <text:p text:style-name="P38"><text:span text:style-name="T11">font-weight</text:span><text:span text:style-name="T10">:</text:span> <text:span text:style-name="T16">bold</text:span><text:span text:style-name="T10">;</text:span></text:p>
      <text:p text:style-name="P38"><text:span text:style-name="T11">margin-bottom</text:span><text:span text:style-name="T10">:</text:span> <text:span text:style-name="T11">0.5</text:span><text:span text:style-name="T9">rem</text:span><text:span text:style-name="T10">;</text:span></text:p>
      <text:p text:style-name="P38"><text:span text:style-name="T11">word-wrap</text:span><text:span text:style-name="T10">:</text:span> <text:span text:style-name="T16">break-word</text:span><text:span text:style-name="T10">;</text:span></text:p>
      <text:p text:style-name="P43">}</text:p>
      <text:p text:style-name="P17"/>
      <text:p text:style-name="P38"><text:span text:style-name="T11">.</text:span><text:span text:style-name="T14">kanban-card-detail</text:span> <text:span text:style-name="T10">{</text:span></text:p>
      <text:p text:style-name="P38"><text:span text:style-name="T11">font-size</text:span><text:span text:style-name="T10">:</text:span> <text:span text:style-name="T11">0.9</text:span><text:span text:style-name="T9">rem</text:span><text:span text:style-name="T10">;</text:span></text:p>
      <text:p text:style-name="P38"><text:span text:style-name="T11">color</text:span><text:span text:style-name="T10">:</text:span> <text:span text:style-name="T10">#</text:span><text:span text:style-name="T16">6c757d</text:span><text:span text:style-name="T10">;</text:span></text:p>
      <text:p text:style-name="P38"><text:span text:style-name="T11">margin-bottom</text:span><text:span text:style-name="T10">:</text:span> <text:span text:style-name="T11">0.5</text:span><text:span text:style-name="T9">rem</text:span><text:span text:style-name="T10">;</text:span></text:p>
      <text:p text:style-name="P38"><text:span text:style-name="T11">word-wrap</text:span><text:span text:style-name="T10">:</text:span> <text:span text:style-name="T16">break-word</text:span><text:span text:style-name="T10">;</text:span></text:p>
      <text:p text:style-name="P43">}</text:p>
      <text:p text:style-name="P17"/>
      <text:p text:style-name="P38"><text:span text:style-name="T11">.</text:span><text:span text:style-name="T14">dragging</text:span> <text:span text:style-name="T10">{</text:span></text:p>
      <text:p text:style-name="P38"><text:span text:style-name="T11">opacity</text:span><text:span text:style-name="T10">:</text:span> <text:span text:style-name="T11">0.5</text:span><text:span text:style-name="T10">;</text:span></text:p>
      <text:p text:style-name="P43">}</text:p>
      <text:p text:style-name="P17"/>
      <text:p text:style-name="P38"><text:span text:style-name="T11">.</text:span><text:span text:style-name="T14">drag-over</text:span> <text:span text:style-name="T10">{</text:span></text:p>
      <text:p text:style-name="P38"><text:span text:style-name="T11">background</text:span><text:span text:style-name="T10">:</text:span> <text:span text:style-name="T10">#</text:span><text:span text:style-name="T16">e9ecef</text:span><text:span text:style-name="T10">;</text:span></text:p>
      <text:p text:style-name="P43">}</text:p>
      <text:p text:style-name="P17"/>
      <text:p text:style-name="P38"><text:span text:style-name="T10">@</text:span><text:span text:style-name="T9">media</text:span> <text:span text:style-name="T10">(</text:span><text:span text:style-name="T11">max-width</text:span><text:span text:style-name="T10">:</text:span> <text:span text:style-name="T11">992</text:span><text:span text:style-name="T9">px</text:span><text:span text:style-name="T10">)</text:span> <text:span text:style-name="T10">{</text:span></text:p>
      <text:p text:style-name="P38"><text:span text:style-name="T11">.</text:span><text:span text:style-name="T14">kanban-board</text:span> <text:span text:style-name="T10">{</text:span></text:p>
      <text:p text:style-name="P38"><text:span text:style-name="T11">grid-template-columns</text:span><text:span text:style-name="T10">:</text:span> <text:span text:style-name="T15">repeat</text:span><text:span text:style-name="T10">(</text:span><text:span text:style-name="T11">2</text:span><text:span text:style-name="T10">,</text:span><text:span text:style-name="T16"> </text:span><text:span text:style-name="T11">1</text:span><text:span text:style-name="T9">fr</text:span><text:span text:style-name="T10">);</text:span></text:p>
      <text:p text:style-name="P43">}</text:p>
      <text:p text:style-name="P43">}</text:p>
      <text:p text:style-name="P17"/>
      <text:p text:style-name="P38"><text:span text:style-name="T10">@</text:span><text:span text:style-name="T9">media</text:span> <text:span text:style-name="T10">(</text:span><text:span text:style-name="T11">max-width</text:span><text:span text:style-name="T10">:</text:span> <text:span text:style-name="T11">576</text:span><text:span text:style-name="T9">px</text:span><text:span text:style-name="T10">)</text:span> <text:span text:style-name="T10">{</text:span></text:p>
      <text:p text:style-name="P38"><text:span text:style-name="T11">.</text:span><text:span text:style-name="T14">kanban-board</text:span> <text:span text:style-name="T10">{</text:span></text:p>
      <text:p text:style-name="P38"><text:span text:style-name="T11">grid-template-columns</text:span><text:span text:style-name="T10">:</text:span> <text:span text:style-name="T11">1</text:span><text:span text:style-name="T9">fr</text:span><text:span text:style-name="T10">;</text:span></text:p>
      <text:p text:style-name="P43">}</text:p>
      <text:p text:style-name="P43">}</text:p>
      <text:p text:style-name="P38"><text:span text:style-name="T17">&lt;/</text:span><text:span text:style-name="T9">style</text:span><text:span text:style-name="T17">&gt;</text:span></text:p>
      <text:p text:style-name="P38">{<text:span text:style-name="T9">/block</text:span>}</text:p>
      <text:p text:style-name="P17"/>
      <text:p text:style-name="P38">{<text:span text:style-name="T9">block </text:span>content}</text:p>
      <text:p text:style-name="P38"><text:span text:style-name="T17">&lt;</text:span><text:span text:style-name="T9">div</text:span><text:span text:style-name="T17"> </text:span><text:span text:style-name="T18">class</text:span><text:span text:style-name="T10">="</text:span><text:span text:style-name="T16">container-fluid</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d-flex justify-content-between align-items-center mb-3</text:span><text:span text:style-name="T10">"</text:span><text:span text:style-name="T17">&gt;</text:span></text:p>
      <text:p text:style-name="P38"><text:span text:style-name="T17">&lt;</text:span><text:span text:style-name="T9">h1</text:span><text:span text:style-name="T17">&gt;</text:span>📋 Kanban Board<text:span text:style-name="T17">&lt;/</text:span><text:span text:style-name="T9">h1</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primary</text:span><text:span text:style-name="T10">"</text:span><text:span text:style-name="T17"> </text:span><text:span text:style-name="T18">data-bs-toggle</text:span><text:span text:style-name="T10">="</text:span><text:span text:style-name="T16">modal</text:span><text:span text:style-name="T10">"</text:span><text:span text:style-name="T17"> </text:span><text:span text:style-name="T18">data-bs-target</text:span><text:span text:style-name="T10">="</text:span><text:span text:style-name="T16">#addCardModal</text:span><text:span text:style-name="T10">"</text:span><text:span text:style-name="T17">&gt;</text:span></text:p>
      <text:p text:style-name="P38"><text:span text:style-name="T17">&lt;</text:span><text:span text:style-name="T9">i</text:span><text:span text:style-name="T17"> </text:span><text:span text:style-name="T18">class</text:span><text:span text:style-name="T10">="</text:span><text:span text:style-name="T16">bi bi-plus-lg</text:span><text:span text:style-name="T10">"</text:span><text:span text:style-name="T17">&gt;&lt;/</text:span><text:span text:style-name="T9">i</text:span><text:span text:style-name="T17">&gt;</text:span></text:p>
      <text:p text:style-name="P38"><text:span text:style-name="T17">&lt;/</text:span><text:span text:style-name="T9">button</text:span><text:span text:style-name="T17">&gt;</text:span></text:p>
      <text:p text:style-name="P38"><text:span text:style-name="T17">&lt;/</text:span><text:span text:style-name="T9">div</text:span><text:span text:style-name="T17">&gt;</text:span></text:p>
      <text:p text:style-name="P17"/>
      <text:p text:style-name="P38">{<text:span text:style-name="T9">if </text:span><text:span text:style-name="T14">$stats</text:span>}</text:p>
      <text:p text:style-name="P38"><text:span text:style-name="T17">&lt;</text:span><text:span text:style-name="T9">div</text:span><text:span text:style-name="T17"> </text:span><text:span text:style-name="T18">class</text:span><text:span text:style-name="T10">="</text:span><text:span text:style-name="T16">card mb-3</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card-body</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row text-center</text:span><text:span text:style-name="T10">"</text:span><text:span text:style-name="T17">&gt;</text:span></text:p>
      <text:p text:style-name="P38"><text:soft-page-break/>{<text:span text:style-name="T9">foreach </text:span><text:span text:style-name="T14">$columns </text:span><text:span text:style-name="T10">as </text:span><text:span text:style-name="T14">$col</text:span>}</text:p>
      <text:p text:style-name="P38"><text:span text:style-name="T17">&lt;</text:span><text:span text:style-name="T9">div</text:span><text:span text:style-name="T17"> </text:span><text:span text:style-name="T18">class</text:span><text:span text:style-name="T10">="</text:span><text:span text:style-name="T16">col-3</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h3 mb-0</text:span><text:span text:style-name="T10">"</text:span><text:span text:style-name="T17">&gt;</text:span>{<text:span text:style-name="T14">$stats</text:span>[<text:span text:style-name="T14">$col</text:span>[<text:span text:style-name="T16">'icon'</text:span>]]}<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9">/foreach</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9">/if</text:span>}</text:p>
      <text:p text:style-name="P17"/>
      <text:p text:style-name="P38"><text:span text:style-name="T17">&lt;</text:span><text:span text:style-name="T9">div</text:span><text:span text:style-name="T17"> </text:span><text:span text:style-name="T18">class</text:span><text:span text:style-name="T10">="</text:span><text:span text:style-name="T16">kanban-board</text:span><text:span text:style-name="T10">"</text:span><text:span text:style-name="T17"> </text:span><text:span text:style-name="T18">id</text:span><text:span text:style-name="T10">="</text:span><text:span text:style-name="T16">kanbanBoard</text:span><text:span text:style-name="T10">"</text:span><text:span text:style-name="T17">&gt;</text:span></text:p>
      <text:p text:style-name="P38">{<text:span text:style-name="T9">foreach </text:span><text:span text:style-name="T14">$columns </text:span><text:span text:style-name="T10">as </text:span><text:span text:style-name="T14">$col</text:span>}</text:p>
      <text:p text:style-name="P38"><text:span text:style-name="T17">&lt;</text:span><text:span text:style-name="T9">div</text:span><text:span text:style-name="T17"> </text:span><text:span text:style-name="T18">class</text:span><text:span text:style-name="T10">="</text:span><text:span text:style-name="T16">kanban-column</text:span><text:span text:style-name="T10">"</text:span><text:span text:style-name="T17"> </text:span><text:span text:style-name="T18">data-status</text:span><text:span text:style-name="T10">="</text:span><text:span text:style-name="T16">{$col['icon']}</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kanban-column-header</text:span><text:span text:style-name="T10">"</text:span><text:span text:style-name="T17">&gt;</text:span></text:p>
      <text:p text:style-name="P38">{<text:span text:style-name="T14">$col</text:span>[<text:span text:style-name="T16">'icon'</text:span>]}</text:p>
      <text:p text:style-name="P38"><text:span text:style-name="T17">&lt;/</text:span><text:span text:style-name="T9">div</text:span><text:span text:style-name="T17">&gt;</text:span></text:p>
      <text:p text:style-name="P17"/>
      <text:p text:style-name="P38"><text:span text:style-name="T17">&lt;</text:span><text:span text:style-name="T9">div</text:span><text:span text:style-name="T17"> </text:span><text:span text:style-name="T18">class</text:span><text:span text:style-name="T10">="</text:span><text:span text:style-name="T16">kanban-cards</text:span><text:span text:style-name="T10">"</text:span><text:span text:style-name="T17"> </text:span><text:span text:style-name="T18">data-status</text:span><text:span text:style-name="T10">="</text:span><text:span text:style-name="T16">{$col['icon']}</text:span><text:span text:style-name="T10">"</text:span><text:span text:style-name="T17">&gt;</text:span></text:p>
      <text:p text:style-name="P38">{<text:span text:style-name="T9">foreach </text:span><text:span text:style-name="T14">$cards </text:span><text:span text:style-name="T10">as </text:span><text:span text:style-name="T14">$card</text:span>}</text:p>
      <text:p text:style-name="P38">{<text:span text:style-name="T9">if </text:span><text:span text:style-name="T14">$card</text:span>[<text:span text:style-name="T16">'CurrentStatus'</text:span>] <text:span text:style-name="T10">=== </text:span><text:span text:style-name="T14">$col</text:span>[<text:span text:style-name="T16">'icon'</text:span>]}</text:p>
      <text:p text:style-name="P38"><text:span text:style-name="T17">&lt;</text:span><text:span text:style-name="T9">div</text:span><text:span text:style-name="T17"> </text:span><text:span text:style-name="T18">class</text:span><text:span text:style-name="T10">="</text:span><text:span text:style-name="T16">kanban-card</text:span><text:span text:style-name="T10">"</text:span><text:span text:style-name="T17"> </text:span><text:span text:style-name="T18">draggable</text:span><text:span text:style-name="T10">="</text:span><text:span text:style-name="T16">true</text:span><text:span text:style-name="T10">"</text:span><text:span text:style-name="T17"> </text:span><text:span text:style-name="T18">data-id</text:span><text:span text:style-name="T10">="</text:span><text:span text:style-name="T16">{$card['Id']}</text:span><text:span text:style-name="T10">"</text:span><text:span text:style-name="T17"> </text:span><text:span text:style-name="T18">data-status</text:span><text:span text:style-name="T10">="</text:span><text:span text:style-name="T16">{$col['icon']}</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kanban-card-title</text:span><text:span text:style-name="T10">"</text:span><text:span text:style-name="T17">&gt;</text:span>{<text:span text:style-name="T14">$card</text:span>[<text:span text:style-name="T16">'Title'</text:span>]}<text:span text:style-name="T17">&lt;/</text:span><text:span text:style-name="T9">div</text:span><text:span text:style-name="T17">&gt;</text:span></text:p>
      <text:p text:style-name="P17"/>
      <text:p text:style-name="P38">{<text:span text:style-name="T9">if </text:span><text:span text:style-name="T14">$card</text:span>[<text:span text:style-name="T16">'Detail'</text:span>]}</text:p>
      <text:p text:style-name="P38"><text:span text:style-name="T17">&lt;</text:span><text:span text:style-name="T9">div</text:span><text:span text:style-name="T17"> </text:span><text:span text:style-name="T18">class</text:span><text:span text:style-name="T10">="</text:span><text:span text:style-name="T16">kanban-card-detail</text:span><text:span text:style-name="T10">"</text:span><text:span text:style-name="T17">&gt;</text:span>{<text:span text:style-name="T14">$card</text:span>[<text:span text:style-name="T16">'Detail'</text:span>]}<text:span text:style-name="T17">&lt;/</text:span><text:span text:style-name="T9">div</text:span><text:span text:style-name="T17">&gt;</text:span></text:p>
      <text:p text:style-name="P38">{<text:span text:style-name="T9">/if</text:span>}</text:p>
      <text:p text:style-name="P17"/>
      <text:p text:style-name="P38"><text:span text:style-name="T17">&lt;</text:span><text:span text:style-name="T9">div</text:span><text:span text:style-name="T17"> </text:span><text:span text:style-name="T18">class</text:span><text:span text:style-name="T10">="</text:span><text:span text:style-name="T16">mt-2 d-flex gap-1</text:span><text:span text:style-name="T10">"</text:span><text:span text:style-name="T17">&gt;</text:span></text:p>
      <text:p text:style-name="P38"><text:span text:style-name="T17">&lt;</text:span><text:span text:style-name="T9">button</text:span><text:span text:style-name="T17"> </text:span><text:span text:style-name="T18">class</text:span><text:span text:style-name="T10">="</text:span><text:span text:style-name="T16">btn btn-sm btn-outline-primary edit-card</text:span><text:span text:style-name="T10">"</text:span></text:p>
      <text:p text:style-name="P38"><text:span text:style-name="T18">data-id</text:span><text:span text:style-name="T10">="</text:span><text:span text:style-name="T16">{$card['Id']}</text:span><text:span text:style-name="T10">"</text:span><text:span text:style-name="T17"> </text:span><text:span text:style-name="T18">title</text:span><text:span text:style-name="T10">="</text:span><text:span text:style-name="T16">Éditer</text:span><text:span text:style-name="T10">"</text:span><text:span text:style-name="T17">&gt;</text:span></text:p>
      <text:p text:style-name="P44">✏️</text:p>
      <text:p text:style-name="P38"><text:span text:style-name="T17">&lt;/</text:span><text:span text:style-name="T9">button</text:span><text:span text:style-name="T17">&gt;</text:span></text:p>
      <text:p text:style-name="P17"/>
      <text:p text:style-name="P38"><text:span text:style-name="T17">&lt;</text:span><text:span text:style-name="T9">button</text:span><text:span text:style-name="T17"> </text:span><text:span text:style-name="T18">class</text:span><text:span text:style-name="T10">="</text:span><text:span text:style-name="T16">btn btn-sm btn-outline-danger delete-card</text:span><text:span text:style-name="T10">"</text:span></text:p>
      <text:p text:style-name="P38"><text:span text:style-name="T18">data-id</text:span><text:span text:style-name="T10">="</text:span><text:span text:style-name="T16">{$card['Id']}</text:span><text:span text:style-name="T10">"</text:span><text:span text:style-name="T17"> </text:span><text:span text:style-name="T18">title</text:span><text:span text:style-name="T10">="</text:span><text:span text:style-name="T16">Supprimer</text:span><text:span text:style-name="T10">"</text:span><text:span text:style-name="T17">&gt;</text:span></text:p>
      <text:p text:style-name="P44">🗑️</text:p>
      <text:p text:style-name="P38"><text:span text:style-name="T17">&lt;/</text:span><text:span text:style-name="T9">button</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9">/if</text:span>}</text:p>
      <text:p text:style-name="P38">{<text:span text:style-name="T9">/foreach</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9">/foreach</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17"/>
      <text:p text:style-name="P45">&lt;!-- Modal pour ajouter une carte --&gt;</text:p>
      <text:p text:style-name="P38"><text:span text:style-name="T17">&lt;</text:span><text:span text:style-name="T9">div</text:span><text:span text:style-name="T17"> </text:span><text:span text:style-name="T18">class</text:span><text:span text:style-name="T10">="</text:span><text:span text:style-name="T16">modal fade</text:span><text:span text:style-name="T10">"</text:span><text:span text:style-name="T17"> </text:span><text:span text:style-name="T18">id</text:span><text:span text:style-name="T10">="</text:span><text:span text:style-name="T16">addCardModal</text:span><text:span text:style-name="T10">"</text:span><text:span text:style-name="T17"> </text:span><text:span text:style-name="T18">tabindex</text:span><text:span text:style-name="T10">="</text:span><text:span text:style-name="T16">-1</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odal-dialog</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odal-content</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odal-header</text:span><text:span text:style-name="T10">"</text:span><text:span text:style-name="T17">&gt;</text:span></text:p>
      <text:p text:style-name="P38"><text:span text:style-name="T17">&lt;</text:span><text:span text:style-name="T9">h5</text:span><text:span text:style-name="T17"> </text:span><text:span text:style-name="T18">class</text:span><text:span text:style-name="T10">="</text:span><text:span text:style-name="T16">modal-title</text:span><text:span text:style-name="T10">"</text:span><text:span text:style-name="T17">&gt;</text:span>Ajouter une carte<text:span text:style-name="T17">&lt;/</text:span><text:span text:style-name="T9">h5</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close</text:span><text:span text:style-name="T10">"</text:span><text:span text:style-name="T17"> </text:span><text:span text:style-name="T18">data-bs-dismiss</text:span><text:span text:style-name="T10">="</text:span><text:span text:style-name="T16">modal</text:span><text:span text:style-name="T10">"</text:span><text:span text:style-name="T17">&gt;&lt;/</text:span><text:span text:style-name="T9">button</text:span><text:span text:style-name="T17">&gt;</text:span></text:p>
      <text:p text:style-name="P38"><text:soft-page-break/><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odal-body</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38"><text:span text:style-name="T17">&lt;</text:span><text:span text:style-name="T9">label</text:span><text:span text:style-name="T17"> </text:span><text:span text:style-name="T18">for</text:span><text:span text:style-name="T10">="</text:span><text:span text:style-name="T16">cardTitle</text:span><text:span text:style-name="T10">"</text:span><text:span text:style-name="T17"> </text:span><text:span text:style-name="T18">class</text:span><text:span text:style-name="T10">="</text:span><text:span text:style-name="T16">form-label</text:span><text:span text:style-name="T10">"</text:span><text:span text:style-name="T17">&gt;</text:span>Titre <text:span text:style-name="T17">&lt;</text:span><text:span text:style-name="T9">span</text:span><text:span text:style-name="T17"> </text:span><text:span text:style-name="T18">class</text:span><text:span text:style-name="T10">="</text:span><text:span text:style-name="T16">text-danger</text:span><text:span text:style-name="T10">"</text:span><text:span text:style-name="T17">&gt;</text:span>*<text:span text:style-name="T17">&lt;/</text:span><text:span text:style-name="T9">span</text:span><text:span text:style-name="T17">&gt;&lt;/</text:span><text:span text:style-name="T9">label</text:span><text:span text:style-name="T17">&gt;</text:span></text:p>
      <text:p text:style-name="P38"><text:span text:style-name="T17">&lt;</text:span><text:span text:style-name="T9">input</text:span><text:span text:style-name="T17"> </text:span><text:span text:style-name="T18">type</text:span><text:span text:style-name="T10">="</text:span><text:span text:style-name="T16">text</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cardTitle</text:span><text:span text:style-name="T10">"</text:span><text:span text:style-name="T17"> </text:span><text:span text:style-name="T18">required</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38"><text:span text:style-name="T17">&lt;</text:span><text:span text:style-name="T9">label</text:span><text:span text:style-name="T17"> </text:span><text:span text:style-name="T18">for</text:span><text:span text:style-name="T10">="</text:span><text:span text:style-name="T16">cardDetail</text:span><text:span text:style-name="T10">"</text:span><text:span text:style-name="T17"> </text:span><text:span text:style-name="T18">class</text:span><text:span text:style-name="T10">="</text:span><text:span text:style-name="T16">form-label</text:span><text:span text:style-name="T10">"</text:span><text:span text:style-name="T17">&gt;</text:span>Détail<text:span text:style-name="T17">&lt;/</text:span><text:span text:style-name="T9">label</text:span><text:span text:style-name="T17">&gt;</text:span></text:p>
      <text:p text:style-name="P38"><text:span text:style-name="T17">&lt;</text:span><text:span text:style-name="T9">textarea</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cardDetail</text:span><text:span text:style-name="T10">"</text:span><text:span text:style-name="T17"> </text:span><text:span text:style-name="T18">rows</text:span><text:span text:style-name="T10">="</text:span><text:span text:style-name="T16">3</text:span><text:span text:style-name="T10">"</text:span><text:span text:style-name="T17">&gt;&lt;/</text:span><text:span text:style-name="T9">textarea</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odal-footer</text:span><text:span text:style-name="T10">"</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secondary</text:span><text:span text:style-name="T10">"</text:span><text:span text:style-name="T17"> </text:span><text:span text:style-name="T18">data-bs-dismiss</text:span><text:span text:style-name="T10">="</text:span><text:span text:style-name="T16">modal</text:span><text:span text:style-name="T10">"</text:span><text:span text:style-name="T17">&gt;</text:span>Annuler<text:span text:style-name="T17">&lt;/</text:span><text:span text:style-name="T9">button</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primary</text:span><text:span text:style-name="T10">"</text:span><text:span text:style-name="T17"> </text:span><text:span text:style-name="T18">id</text:span><text:span text:style-name="T10">="</text:span><text:span text:style-name="T16">saveNewCard</text:span><text:span text:style-name="T10">"</text:span><text:span text:style-name="T17">&gt;</text:span>Créer<text:span text:style-name="T17">&lt;/</text:span><text:span text:style-name="T9">button</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17"/>
      <text:p text:style-name="P45">&lt;!-- Modal pour éditer une carte --&gt;</text:p>
      <text:p text:style-name="P38"><text:span text:style-name="T17">&lt;</text:span><text:span text:style-name="T9">div</text:span><text:span text:style-name="T17"> </text:span><text:span text:style-name="T18">class</text:span><text:span text:style-name="T10">="</text:span><text:span text:style-name="T16">modal fade</text:span><text:span text:style-name="T10">"</text:span><text:span text:style-name="T17"> </text:span><text:span text:style-name="T18">id</text:span><text:span text:style-name="T10">="</text:span><text:span text:style-name="T16">editCardModal</text:span><text:span text:style-name="T10">"</text:span><text:span text:style-name="T17"> </text:span><text:span text:style-name="T18">tabindex</text:span><text:span text:style-name="T10">="</text:span><text:span text:style-name="T16">-1</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odal-dialog</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odal-content</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odal-header</text:span><text:span text:style-name="T10">"</text:span><text:span text:style-name="T17">&gt;</text:span></text:p>
      <text:p text:style-name="P38"><text:span text:style-name="T17">&lt;</text:span><text:span text:style-name="T9">h5</text:span><text:span text:style-name="T17"> </text:span><text:span text:style-name="T18">class</text:span><text:span text:style-name="T10">="</text:span><text:span text:style-name="T16">modal-title</text:span><text:span text:style-name="T10">"</text:span><text:span text:style-name="T17">&gt;</text:span>✏️ Éditer la carte<text:span text:style-name="T17">&lt;/</text:span><text:span text:style-name="T9">h5</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close</text:span><text:span text:style-name="T10">"</text:span><text:span text:style-name="T17"> </text:span><text:span text:style-name="T18">data-bs-dismiss</text:span><text:span text:style-name="T10">="</text:span><text:span text:style-name="T16">modal</text:span><text:span text:style-name="T10">"</text:span><text:span text:style-name="T17">&gt;&lt;/</text:span><text:span text:style-name="T9">button</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odal-body</text:span><text:span text:style-name="T10">"</text:span><text:span text:style-name="T17">&gt;</text:span></text:p>
      <text:p text:style-name="P38"><text:span text:style-name="T17">&lt;</text:span><text:span text:style-name="T9">input</text:span><text:span text:style-name="T17"> </text:span><text:span text:style-name="T18">type</text:span><text:span text:style-name="T10">="</text:span><text:span text:style-name="T16">hidden</text:span><text:span text:style-name="T10">"</text:span><text:span text:style-name="T17"> </text:span><text:span text:style-name="T18">id</text:span><text:span text:style-name="T10">="</text:span><text:span text:style-name="T16">editCardId</text:span><text:span text:style-name="T10">"</text:span><text:span text:style-name="T17">&gt;</text:span></text:p>
      <text:p text:style-name="P3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38"><text:span text:style-name="T17">&lt;</text:span><text:span text:style-name="T9">label</text:span><text:span text:style-name="T17"> </text:span><text:span text:style-name="T18">for</text:span><text:span text:style-name="T10">="</text:span><text:span text:style-name="T16">editCardTitle</text:span><text:span text:style-name="T10">"</text:span><text:span text:style-name="T17"> </text:span><text:span text:style-name="T18">class</text:span><text:span text:style-name="T10">="</text:span><text:span text:style-name="T16">form-label</text:span><text:span text:style-name="T10">"</text:span><text:span text:style-name="T17">&gt;</text:span>Titre <text:span text:style-name="T17">&lt;</text:span><text:span text:style-name="T9">span</text:span><text:span text:style-name="T17"> </text:span><text:span text:style-name="T18">class</text:span><text:span text:style-name="T10">="</text:span><text:span text:style-name="T16">text-danger</text:span><text:span text:style-name="T10">"</text:span><text:span text:style-name="T17">&gt;</text:span>*<text:span text:style-name="T17">&lt;/</text:span><text:span text:style-name="T9">span</text:span><text:span text:style-name="T17">&gt;&lt;/</text:span><text:span text:style-name="T9">label</text:span><text:span text:style-name="T17">&gt;</text:span></text:p>
      <text:p text:style-name="P38"><text:span text:style-name="T17">&lt;</text:span><text:span text:style-name="T9">input</text:span><text:span text:style-name="T17"> </text:span><text:span text:style-name="T18">type</text:span><text:span text:style-name="T10">="</text:span><text:span text:style-name="T16">text</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editCardTitle</text:span><text:span text:style-name="T10">"</text:span><text:span text:style-name="T17"> </text:span><text:span text:style-name="T18">required</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38"><text:span text:style-name="T17">&lt;</text:span><text:span text:style-name="T9">label</text:span><text:span text:style-name="T17"> </text:span><text:span text:style-name="T18">for</text:span><text:span text:style-name="T10">="</text:span><text:span text:style-name="T16">editCardDetail</text:span><text:span text:style-name="T10">"</text:span><text:span text:style-name="T17"> </text:span><text:span text:style-name="T18">class</text:span><text:span text:style-name="T10">="</text:span><text:span text:style-name="T16">form-label</text:span><text:span text:style-name="T10">"</text:span><text:span text:style-name="T17">&gt;</text:span>Détail<text:span text:style-name="T17">&lt;/</text:span><text:span text:style-name="T9">label</text:span><text:span text:style-name="T17">&gt;</text:span></text:p>
      <text:p text:style-name="P38"><text:span text:style-name="T17">&lt;</text:span><text:span text:style-name="T9">textarea</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editCardDetail</text:span><text:span text:style-name="T10">"</text:span><text:span text:style-name="T17"> </text:span><text:span text:style-name="T18">rows</text:span><text:span text:style-name="T10">="</text:span><text:span text:style-name="T16">3</text:span><text:span text:style-name="T10">"</text:span><text:span text:style-name="T17">&gt;&lt;/</text:span><text:span text:style-name="T9">textarea</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 </text:span><text:span text:style-name="T18">class</text:span><text:span text:style-name="T10">="</text:span><text:span text:style-name="T16">modal-footer</text:span><text:span text:style-name="T10">"</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secondary</text:span><text:span text:style-name="T10">"</text:span><text:span text:style-name="T17"> </text:span><text:span text:style-name="T18">data-bs-dismiss</text:span><text:span text:style-name="T10">="</text:span><text:span text:style-name="T16">modal</text:span><text:span text:style-name="T10">"</text:span><text:span text:style-name="T17">&gt;</text:span>Annuler<text:span text:style-name="T17">&lt;/</text:span><text:span text:style-name="T9">button</text:span><text:span text:style-name="T17">&gt;</text:span></text:p>
      <text:p text:style-name="P3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primary</text:span><text:span text:style-name="T10">"</text:span><text:span text:style-name="T17"> </text:span><text:span text:style-name="T18">id</text:span><text:span text:style-name="T10">="</text:span><text:span text:style-name="T16">saveEditCard</text:span><text:span text:style-name="T10">"</text:span><text:span text:style-name="T17">&gt;</text:span>Enregistrer<text:span text:style-name="T17">&lt;/</text:span><text:span text:style-name="T9">button</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17">&lt;/</text:span><text:span text:style-name="T9">div</text:span><text:span text:style-name="T17">&gt;</text:span></text:p>
      <text:p text:style-name="P38">{<text:span text:style-name="T9">/block</text:span>}</text:p>
      <text:p text:style-name="P17"/>
      <text:p text:style-name="P38">{<text:span text:style-name="T9">block </text:span>scripts}</text:p>
      <text:p text:style-name="P38"><text:span text:style-name="T17">&lt;</text:span><text:span text:style-name="T9">script</text:span><text:span text:style-name="T17"> </text:span><text:span text:style-name="T18">src</text:span><text:span text:style-name="T10">="</text:span><text:span text:style-name="T16">/app/modules/Kanban/js/kanban.js</text:span><text:span text:style-name="T10">"</text:span><text:span text:style-name="T17">&gt;&lt;/</text:span><text:span text:style-name="T9">script</text:span><text:span text:style-name="T17">&gt;</text:span></text:p>
      <text:p text:style-name="P38">{<text:span text:style-name="T9">/block</text:span>}</text:p>
      <text:p text:style-name="P41"/>
      <text:h text:style-name="P46" text:outline-level="1"><text:soft-page-break/>Commandes groupées</text:h>
      <text:p text:style-name="P47">Créer les commandes groupées en faisant comme pour les sondages</text:p>
      <text:p text:style-name="P47">Les routes :</text:p>
      <text:p text:style-name="P48">&lt;?php</text:p>
      <text:p text:style-name="P17"/>
      <text:p text:style-name="P18"><text:span text:style-name="T9">declare</text:span><text:span text:style-name="T10">(</text:span><text:span text:style-name="T11">strict_types</text:span><text:span text:style-name="T10">=</text:span><text:span text:style-name="T11">1</text:span><text:span text:style-name="T10">);</text:span></text:p>
      <text:p text:style-name="P17"/>
      <text:p text:style-name="P18"><text:span text:style-name="T9">namespace</text:span> <text:span text:style-name="T12">app</text:span><text:span text:style-name="T13">\</text:span><text:span text:style-name="T12">config</text:span><text:span text:style-name="T13">\</text:span><text:span text:style-name="T12">routes</text:span><text:span text:style-name="T10">;</text:span></text:p>
      <text:p text:style-name="P17"/>
      <text:p text:style-name="P18"><text:span text:style-name="T9">use</text:span> app<text:span text:style-name="T10">\</text:span>config<text:span text:style-name="T10">\</text:span><text:span text:style-name="T12">ControllerFactory</text:span><text:span text:style-name="T10">;</text:span></text:p>
      <text:p text:style-name="P18"><text:span text:style-name="T9">use</text:span> app<text:span text:style-name="T10">\</text:span>interfaces<text:span text:style-name="T10">\</text:span><text:span text:style-name="T12">RouteInterface</text:span><text:span text:style-name="T10">;</text:span></text:p>
      <text:p text:style-name="P18"><text:span text:style-name="T9">use</text:span> app<text:span text:style-name="T10">\</text:span>valueObjects<text:span text:style-name="T10">\</text:span><text:span text:style-name="T12">Route</text:span><text:span text:style-name="T10">;</text:span></text:p>
      <text:p text:style-name="P17"/>
      <text:p text:style-name="P18"><text:span text:style-name="T14">class</text:span> <text:span text:style-name="T12">Survey</text:span> <text:span text:style-name="T9">implements</text:span> <text:span text:style-name="T12">RouteInterface</text:span></text:p>
      <text:p text:style-name="P19">{</text:p>
      <text:p text:style-name="P18"><text:span text:style-name="T9">private</text:span> <text:span text:style-name="T9">array</text:span> <text:span text:style-name="T10">$</text:span><text:span text:style-name="T14">routes</text:span> <text:span text:style-name="T10">=</text:span> <text:span text:style-name="T10">[];</text:span></text:p>
      <text:p text:style-name="P17"/>
      <text:p text:style-name="P18"><text:span text:style-name="T9">public</text:span> <text:span text:style-name="T14">function</text:span> <text:span text:style-name="T15">__construct</text:span><text:span text:style-name="T10">(</text:span><text:span text:style-name="T9">private</text:span> <text:span text:style-name="T12">ControllerFactory</text:span> <text:span text:style-name="T10">$</text:span><text:span text:style-name="T14">controllerFactory</text:span><text:span text:style-name="T10">)</text:span> <text:span text:style-name="T10">{}</text:span></text:p>
      <text:p text:style-name="P17"/>
      <text:p text:style-name="P18"><text:span text:style-name="T9">public</text:span> <text:span text:style-name="T14">function</text:span> <text:span text:style-name="T15">get</text:span><text:span text:style-name="T10">():</text:span> <text:span text:style-name="T9">array</text:span></text:p>
      <text:p text:style-name="P19">{</text:p>
      <text:p text:style-name="P18"><text:span text:style-name="T10">$</text:span><text:span text:style-name="T14">surveyController</text:span> <text:span text:style-name="T10">=</text:span> <text:span text:style-name="T14">fn</text:span><text:span text:style-name="T10">()</text:span> <text:span text:style-name="T10">=&gt;</text:span> <text:span text:style-name="T10">$</text:span><text:span text:style-name="T11">this</text:span><text:span text:style-name="T10">-&gt;</text:span><text:span text:style-name="T14">controllerFactory</text:span><text:span text:style-name="T10">-&gt;</text:span><text:span text:style-name="T15">makeSurveyController</text:span><text:span text:style-name="T10">();</text:span></text:p>
      <text:p text:style-name="P17"/>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survey/add/@id:[0-9]+</text:span><text:span text:style-name="T10">',</text:span> <text:span text:style-name="T10">$</text:span><text:span text:style-name="T14">surveyController</text:span><text:span text:style-name="T10">,</text:span> <text:span text:style-name="T10">'</text:span><text:span text:style-name="T16">add</text:span><text:span text:style-name="T10">');</text:span></text:p>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survey/create</text:span><text:span text:style-name="T10">',</text:span> <text:span text:style-name="T10">$</text:span><text:span text:style-name="T14">surveyController</text:span><text:span text:style-name="T10">,</text:span> <text:span text:style-name="T10">'</text:span><text:span text:style-name="T16">createOrUpdate</text:span><text:span text:style-name="T10">');</text:span></text:p>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survey/results/@id:[0-9]+</text:span><text:span text:style-name="T10">',</text:span> <text:span text:style-name="T10">$</text:span><text:span text:style-name="T14">surveyController</text:span><text:span text:style-name="T10">,</text:span> <text:span text:style-name="T10">'</text:span><text:span text:style-name="T16">viewResults</text:span><text:span text:style-name="T10">');</text:span></text:p>
      <text:p text:style-name="P17"/>
      <text:p text:style-name="P18"><text:span text:style-name="T9">return</text:span> <text:span text:style-name="T10">$</text:span><text:span text:style-name="T11">this</text:span><text:span text:style-name="T10">-&gt;</text:span><text:span text:style-name="T14">routes</text:span><text:span text:style-name="T10">;</text:span></text:p>
      <text:p text:style-name="P19">}</text:p>
      <text:p text:style-name="P19">}</text:p>
      <text:p text:style-name="P47"/>
      <text:p text:style-name="P47">Le controleur :</text:p>
      <text:p text:style-name="P48">&lt;?php</text:p>
      <text:p text:style-name="P17"/>
      <text:p text:style-name="P18"><text:span text:style-name="T9">declare</text:span><text:span text:style-name="T10">(</text:span><text:span text:style-name="T11">strict_types</text:span><text:span text:style-name="T10">=</text:span><text:span text:style-name="T11">1</text:span><text:span text:style-name="T10">);</text:span></text:p>
      <text:p text:style-name="P17"/>
      <text:p text:style-name="P18"><text:span text:style-name="T9">namespace</text:span> <text:span text:style-name="T12">app</text:span><text:span text:style-name="T13">\</text:span><text:span text:style-name="T12">modules</text:span><text:span text:style-name="T13">\</text:span><text:span text:style-name="T12">Article</text:span><text:span text:style-name="T10">;</text:span></text:p>
      <text:p text:style-name="P17"/>
      <text:p text:style-name="P18"><text:span text:style-name="T9">use</text:span> <text:span text:style-name="T12">DateTime</text:span><text:span text:style-name="T10">;</text:span></text:p>
      <text:p text:style-name="P17"/>
      <text:p text:style-name="P18"><text:span text:style-name="T9">use</text:span> app<text:span text:style-name="T10">\</text:span>enums<text:span text:style-name="T10">\</text:span><text:span text:style-name="T12">FilterInputRule</text:span><text:span text:style-name="T10">;</text:span></text:p>
      <text:p text:style-name="P18"><text:span text:style-name="T9">use</text:span> app<text:span text:style-name="T10">\</text:span>enums<text:span text:style-name="T10">\</text:span><text:span text:style-name="T12">SurveyVisibility</text:span><text:span text:style-name="T10">;</text:span></text:p>
      <text:p text:style-name="P18"><text:span text:style-name="T9">use</text:span> app<text:span text:style-name="T10">\</text:span>exceptions<text:span text:style-name="T10">\</text:span><text:span text:style-name="T12">IntegrityException</text:span><text:span text:style-name="T10">;</text:span></text:p>
      <text:p text:style-name="P18"><text:span text:style-name="T9">use</text:span> app<text:span text:style-name="T10">\</text:span>helpers<text:span text:style-name="T10">\</text:span><text:span text:style-name="T12">Application</text:span><text:span text:style-name="T10">;</text:span></text:p>
      <text:p text:style-name="P18"><text:span text:style-name="T9">use</text:span> app<text:span text:style-name="T10">\</text:span>helpers<text:span text:style-name="T10">\</text:span><text:span text:style-name="T12">WebApp</text:span><text:span text:style-name="T10">;</text:span></text:p>
      <text:p text:style-name="P18"><text:span text:style-name="T9">use</text:span> app<text:span text:style-name="T10">\</text:span>models<text:span text:style-name="T10">\</text:span><text:span text:style-name="T12">SurveyDataHelper</text:span><text:span text:style-name="T10">;</text:span></text:p>
      <text:p text:style-name="P18"><text:span text:style-name="T9">use</text:span> app<text:span text:style-name="T10">\</text:span>modules<text:span text:style-name="T10">\</text:span>Common<text:span text:style-name="T10">\</text:span><text:span text:style-name="T12">AbstractController</text:span><text:span text:style-name="T10">;</text:span></text:p>
      <text:p text:style-name="P17"/>
      <text:p text:style-name="P18"><text:span text:style-name="T14">class</text:span> <text:span text:style-name="T12">SurveyController</text:span> <text:span text:style-name="T9">extends</text:span> <text:span text:style-name="T12">AbstractController</text:span></text:p>
      <text:p text:style-name="P19">{</text:p>
      <text:p text:style-name="P18"><text:span text:style-name="T9">public</text:span> <text:span text:style-name="T14">function</text:span> <text:span text:style-name="T15">__construct</text:span><text:span text:style-name="T10">(</text:span><text:span text:style-name="T12">Application</text:span> <text:span text:style-name="T10">$</text:span><text:span text:style-name="T14">application</text:span><text:span text:style-name="T10">,</text:span> <text:span text:style-name="T9">private</text:span> <text:span text:style-name="T12">SurveyDataHelper</text:span> <text:span text:style-name="T10">$</text:span><text:span text:style-name="T14">surveyDataHelper</text:span><text:span text:style-name="T10">)</text:span></text:p>
      <text:p text:style-name="P19"><text:soft-page-break/>{</text:p>
      <text:p text:style-name="P18"><text:span text:style-name="T14">parent</text:span><text:span text:style-name="T10">::</text:span><text:span text:style-name="T15">__construct</text:span><text:span text:style-name="T10">($</text:span><text:span text:style-name="T14">application</text:span><text:span text:style-name="T10">);</text:span></text:p>
      <text:p text:style-name="P19">}</text:p>
      <text:p text:style-name="P17"/>
      <text:p text:style-name="P18"><text:span text:style-name="T9">public</text:span> <text:span text:style-name="T14">function</text:span> <text:span text:style-name="T15">add</text:span><text:span text:style-name="T10">(</text:span><text:span text:style-name="T9">int</text:span> <text:span text:style-name="T10">$</text:span><text:span text:style-name="T14">articleId</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isRedactor</text:span><text:span text:style-name="T10">()</text:span> <text:span text:style-name="T10">??</text:span> <text:span text:style-name="T11">false</text:span><text:span text:style-name="T10">))</text:span> <text:span text:style-name="T10">{</text:span></text:p>
      <text:p text:style-name="P18"><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6">GET</text:span><text:span text:style-name="T10">')</text:span> <text:span text:style-name="T10">{</text:span></text:p>
      <text:p text:style-name="P18"><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article</text:span> <text:span text:style-name="T10">=</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Article</text:span><text:span text:style-name="T10">',</text:span> <text:span text:style-name="T10">['</text:span><text:span text:style-name="T16">Id</text:span><text:span text:style-name="T10">'</text:span> <text:span text:style-name="T10">=&gt;</text:span> <text:span text:style-name="T10">$</text:span><text:span text:style-name="T14">articleId</text:span><text:span text:style-name="T10">],</text:span> <text:span text:style-name="T10">'</text:span><text:span text:style-name="T16">Title, Id</text:span><text:span text:style-name="T10">');</text:span></text:p>
      <text:p text:style-name="P18"><text:span text:style-name="T9">if</text:span> <text:span text:style-name="T10">(!$</text:span><text:span text:style-name="T14">article</text:span><text:span text:style-name="T10">)</text:span> <text:span text:style-name="T10">{</text:span></text:p>
      <text:p text:style-name="P18"><text:span text:style-name="T10">$</text:span><text:span text:style-name="T11">this</text:span><text:span text:style-name="T10">-&gt;</text:span><text:span text:style-name="T15">redirect</text:span><text:span text:style-name="T10">('</text:span><text:span text:style-name="T16">/articles</text:span><text:span text:style-name="T10">');</text:span></text:p>
      <text:p text:style-name="P18"><text:span text:style-name="T9">return</text:span><text:span text:style-name="T10">;</text:span></text:p>
      <text:p text:style-name="P19">}</text:p>
      <text:p text:style-name="P18"><text:span text:style-name="T10">$</text:span><text:span text:style-name="T11">this</text:span><text:span text:style-name="T10">-&gt;</text:span><text:span text:style-name="T15">render</text:span><text:span text:style-name="T10">('</text:span><text:span text:style-name="T16">Article/views/survey_add.latte</text:span><text:span text:style-name="T10">',</text:span> <text:span text:style-name="T10">$</text:span><text:span text:style-name="T11">this</text:span><text:span text:style-name="T10">-&gt;</text:span><text:span text:style-name="T15">getAllParams</text:span><text:span text:style-name="T10">([</text:span></text:p>
      <text:p text:style-name="P18"><text:span text:style-name="T10">'</text:span><text:span text:style-name="T16">article</text:span><text:span text:style-name="T10">'</text:span> <text:span text:style-name="T10">=&gt;</text:span> <text:span text:style-name="T10">$</text:span><text:span text:style-name="T14">article</text:span><text:span text:style-name="T10">,</text:span></text:p>
      <text:p text:style-name="P18"><text:span text:style-name="T10">'</text:span><text:span text:style-name="T16">survey</text:span><text:span text:style-name="T10">'</text:span> <text:span text:style-name="T10">=&gt;</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Survey</text:span><text:span text:style-name="T10">',</text:span> <text:span text:style-name="T10">['</text:span><text:span text:style-name="T16">IdArticle</text:span><text:span text:style-name="T10">'</text:span> <text:span text:style-name="T10">=&gt;</text:span> <text:span text:style-name="T10">$</text:span><text:span text:style-name="T14">article</text:span><text:span text:style-name="T10">-&gt;</text:span><text:span text:style-name="T14">Id</text:span><text:span text:style-name="T10">],</text:span> <text:span text:style-name="T10">'</text:span><text:span text:style-name="T16">Question, Options, ClosingDate, Visibility</text:span><text:span text:style-name="T10">'),</text:span></text:p>
      <text:p text:style-name="P18"><text:span text:style-name="T10">'</text:span><text:span text:style-name="T16">page</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getPage</text:span><text:span text:style-name="T10">(),</text:span></text:p>
      <text:p text:style-name="P19">]));</text:p>
      <text:p text:style-name="P19">}</text:p>
      <text:p text:style-name="P17"/>
      <text:p text:style-name="P18"><text:span text:style-name="T9">public</text:span> <text:span text:style-name="T14">function</text:span> <text:span text:style-name="T15">createOrUpdate</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isRedactor</text:span><text:span text:style-name="T10">()</text:span> <text:span text:style-name="T10">??</text:span> <text:span text:style-name="T11">false</text:span><text:span text:style-name="T10">))</text:span> <text:span text:style-name="T10">{</text:span></text:p>
      <text:p text:style-name="P18"><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6">POST</text:span><text:span text:style-name="T10">')</text:span> <text:span text:style-name="T10">{</text:span></text:p>
      <text:p text:style-name="P18"><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schema</text:span> <text:span text:style-name="T10">=</text:span> <text:span text:style-name="T10">[</text:span></text:p>
      <text:p text:style-name="P18"><text:span text:style-name="T10">'</text:span><text:span text:style-name="T16">article_id</text:span><text:span text:style-name="T10">'</text:span> <text:span text:style-name="T10">=&gt;</text:span> <text:span text:style-name="T12">FilterInputRule</text:span><text:span text:style-name="T10">::</text:span><text:span text:style-name="T11">Int</text:span><text:span text:style-name="T10">-&gt;</text:span><text:span text:style-name="T14">value</text:span><text:span text:style-name="T10">,</text:span></text:p>
      <text:p text:style-name="P18"><text:span text:style-name="T10">'</text:span><text:span text:style-name="T16">question</text:span><text:span text:style-name="T10">'</text:span> <text:span text:style-name="T10">=&gt;</text:span> <text:span text:style-name="T12">FilterInputRule</text:span><text:span text:style-name="T10">::</text:span><text:span text:style-name="T11">HtmlSafeText</text:span><text:span text:style-name="T10">-&gt;</text:span><text:span text:style-name="T14">value</text:span><text:span text:style-name="T10">,</text:span></text:p>
      <text:p text:style-name="P18"><text:span text:style-name="T10">'</text:span><text:span text:style-name="T16">closingDate</text:span><text:span text:style-name="T10">'</text:span> <text:span text:style-name="T10">=&gt;</text:span> <text:span text:style-name="T12">FilterInputRule</text:span><text:span text:style-name="T10">::</text:span><text:span text:style-name="T11">DateTime</text:span><text:span text:style-name="T10">-&gt;</text:span><text:span text:style-name="T14">value</text:span><text:span text:style-name="T10">,</text:span></text:p>
      <text:p text:style-name="P18"><text:span text:style-name="T10">'</text:span><text:span text:style-name="T16">visibility</text:span><text:span text:style-name="T10">'</text:span> <text:span text:style-name="T10">=&gt;</text:span> <text:span text:style-name="T10">$</text:span><text:span text:style-name="T11">this</text:span><text:span text:style-name="T10">-&gt;</text:span><text:span text:style-name="T14">application</text:span><text:span text:style-name="T10">-&gt;</text:span><text:span text:style-name="T15">enumToValues</text:span><text:span text:style-name="T10">(</text:span><text:span text:style-name="T12">SurveyVisibility</text:span><text:span text:style-name="T10">::</text:span><text:span text:style-name="T9">class</text:span><text:span text:style-name="T10">),</text:span></text:p>
      <text:p text:style-name="P18"><text:span text:style-name="T10">'</text:span><text:span text:style-name="T16">options</text:span><text:span text:style-name="T10">'</text:span> <text:span text:style-name="T10">=&gt;</text:span> <text:span text:style-name="T12">FilterInputRule</text:span><text:span text:style-name="T10">::</text:span><text:span text:style-name="T11">ArrayString</text:span><text:span text:style-name="T10">-&gt;</text:span><text:span text:style-name="T14">value</text:span><text:span text:style-name="T10">,</text:span></text:p>
      <text:p text:style-name="P19">];</text:p>
      <text:p text:style-name="P18"><text:span text:style-name="T10">$</text:span><text:span text:style-name="T14">input</text:span> <text:span text:style-name="T10">=</text:span> <text:span text:style-name="T12">WebApp</text:span><text:span text:style-name="T10">::</text:span><text:span text:style-name="T15">filterInput</text:span><text:span text:style-name="T10">($</text:span><text:span text:style-name="T14">schema</text:span><text:span text:style-name="T10">,</text:span> <text:span text:style-name="T10">$</text:span><text:span text:style-name="T11">this</text:span><text:span text:style-name="T10">-&gt;</text:span><text:span text:style-name="T14">flight</text:span><text:span text:style-name="T10">-&gt;</text:span><text:span text:style-name="T15">request</text:span><text:span text:style-name="T10">()-&gt;</text:span><text:span text:style-name="T14">data</text:span><text:span text:style-name="T10">-&gt;</text:span><text:span text:style-name="T15">getData</text:span><text:span text:style-name="T10">());</text:span></text:p>
      <text:p text:style-name="P18"><text:span text:style-name="T10">$</text:span><text:span text:style-name="T14">articleId</text:span> <text:span text:style-name="T10">=</text:span> <text:span text:style-name="T10">$</text:span><text:span text:style-name="T14">input</text:span><text:span text:style-name="T10">['</text:span><text:span text:style-name="T16">article_id</text:span><text:span text:style-name="T10">']</text:span> <text:span text:style-name="T10">??</text:span> <text:span text:style-name="T9">throw</text:span> <text:span text:style-name="T9">new</text:span> <text:span text:style-name="T12">IntegrityException</text:span><text:span text:style-name="T10">('</text:span><text:span text:style-name="T16">Fatal error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P18"><text:span text:style-name="T10">$</text:span><text:span text:style-name="T14">question</text:span> <text:span text:style-name="T10">=</text:span> <text:span text:style-name="T10">$</text:span><text:span text:style-name="T14">input</text:span><text:span text:style-name="T10">['</text:span><text:span text:style-name="T16">question</text:span><text:span text:style-name="T10">']</text:span> <text:span text:style-name="T10">??</text:span> <text:span text:style-name="T10">'</text:span><text:span text:style-name="T16">???</text:span><text:span text:style-name="T10">';</text:span></text:p>
      <text:p text:style-name="P18"><text:span text:style-name="T10">$</text:span><text:span text:style-name="T14">closingDate</text:span> <text:span text:style-name="T10">=</text:span> <text:span text:style-name="T10">$</text:span><text:span text:style-name="T14">input</text:span><text:span text:style-name="T10">['</text:span><text:span text:style-name="T16">closingDate</text:span><text:span text:style-name="T10">']</text:span> <text:span text:style-name="T10">??</text:span> <text:span text:style-name="T9">new</text:span> <text:span text:style-name="T12">DateTime</text:span><text:span text:style-name="T10">('</text:span><text:span text:style-name="T16">+7 days</text:span><text:span text:style-name="T10">');</text:span></text:p>
      <text:p text:style-name="P18"><text:span text:style-name="T10">$</text:span><text:span text:style-name="T14">visibility</text:span> <text:span text:style-name="T10">=</text:span> <text:span text:style-name="T10">$</text:span><text:span text:style-name="T14">input</text:span><text:span text:style-name="T10">['</text:span><text:span text:style-name="T16">visibility</text:span><text:span text:style-name="T10">']</text:span> <text:span text:style-name="T10">??</text:span> <text:span text:style-name="T12">SurveyVisibility</text:span><text:span text:style-name="T10">::</text:span><text:span text:style-name="T11">Redactor</text:span><text:span text:style-name="T10">-&gt;</text:span><text:span text:style-name="T14">value</text:span><text:span text:style-name="T10">;</text:span></text:p>
      <text:p text:style-name="P18"><text:span text:style-name="T10">$</text:span><text:span text:style-name="T14">options</text:span> <text:span text:style-name="T10">=</text:span> <text:span text:style-name="T10">[];</text:span></text:p>
      <text:p text:style-name="P18"><text:span text:style-name="T9">foreach</text:span> <text:span text:style-name="T10">($</text:span><text:span text:style-name="T14">input</text:span><text:span text:style-name="T10">['</text:span><text:span text:style-name="T16">options</text:span><text:span text:style-name="T10">']</text:span> <text:span text:style-name="T10">??</text:span> <text:span text:style-name="T10">[]</text:span> <text:span text:style-name="T10">as</text:span> <text:span text:style-name="T10">$</text:span><text:span text:style-name="T14">option</text:span><text:span text:style-name="T10">)</text:span> <text:span text:style-name="T10">{</text:span></text:p>
      <text:p text:style-name="P18"><text:span text:style-name="T10">$</text:span><text:span text:style-name="T14">options</text:span><text:span text:style-name="T10">[]</text:span> <text:span text:style-name="T10">=</text:span> <text:span text:style-name="T15">str_replace</text:span><text:span text:style-name="T10">('</text:span><text:span text:style-name="T16">"</text:span><text:span text:style-name="T10">',</text:span> <text:span text:style-name="T10">"</text:span><text:span text:style-name="T16">''</text:span><text:span text:style-name="T10">",</text:span> <text:span text:style-name="T10">$</text:span><text:span text:style-name="T14">option</text:span><text:span text:style-name="T10">);</text:span></text:p>
      <text:p text:style-name="P19">}</text:p>
      <text:p text:style-name="P18"><text:soft-page-break/><text:span text:style-name="T10">$</text:span><text:span text:style-name="T14">optionsJson</text:span> <text:span text:style-name="T10">=</text:span> <text:span text:style-name="T15">json_encode</text:span><text:span text:style-name="T10">($</text:span><text:span text:style-name="T14">options</text:span><text:span text:style-name="T10">);</text:span></text:p>
      <text:p text:style-name="P18"><text:span text:style-name="T10">$</text:span><text:span text:style-name="T14">fields</text:span> <text:span text:style-name="T10">=</text:span> <text:span text:style-name="T10">[</text:span></text:p>
      <text:p text:style-name="P18"><text:span text:style-name="T10">'</text:span><text:span text:style-name="T16">Question</text:span><text:span text:style-name="T10">'</text:span> <text:span text:style-name="T10">=&gt;</text:span> <text:span text:style-name="T10">$</text:span><text:span text:style-name="T14">question</text:span><text:span text:style-name="T10">,</text:span></text:p>
      <text:p text:style-name="P18"><text:span text:style-name="T10">'</text:span><text:span text:style-name="T16">Options</text:span><text:span text:style-name="T10">'</text:span> <text:span text:style-name="T10">=&gt;</text:span> <text:span text:style-name="T10">$</text:span><text:span text:style-name="T14">optionsJson</text:span><text:span text:style-name="T10">,</text:span></text:p>
      <text:p text:style-name="P18"><text:span text:style-name="T10">'</text:span><text:span text:style-name="T16">ClosingDate</text:span><text:span text:style-name="T10">'</text:span> <text:span text:style-name="T10">=&gt;</text:span> <text:span text:style-name="T10">$</text:span><text:span text:style-name="T14">closingDate</text:span><text:span text:style-name="T10">,</text:span></text:p>
      <text:p text:style-name="P18"><text:span text:style-name="T10">'</text:span><text:span text:style-name="T16">IdArticle</text:span><text:span text:style-name="T10">'</text:span> <text:span text:style-name="T10">=&gt;</text:span> <text:span text:style-name="T10">$</text:span><text:span text:style-name="T14">articleId</text:span><text:span text:style-name="T10">,</text:span></text:p>
      <text:p text:style-name="P18"><text:span text:style-name="T10">'</text:span><text:span text:style-name="T16">Visibility</text:span><text:span text:style-name="T10">'</text:span> <text:span text:style-name="T10">=&gt;</text:span> <text:span text:style-name="T10">$</text:span><text:span text:style-name="T14">visibility</text:span></text:p>
      <text:p text:style-name="P19">];</text:p>
      <text:p text:style-name="P18"><text:span text:style-name="T10">$</text:span><text:span text:style-name="T14">survey</text:span> <text:span text:style-name="T10">=</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Survey</text:span><text:span text:style-name="T10">',</text:span> <text:span text:style-name="T10">['</text:span><text:span text:style-name="T16">IdArticle</text:span><text:span text:style-name="T10">'</text:span> <text:span text:style-name="T10">=&gt;</text:span> <text:span text:style-name="T10">$</text:span><text:span text:style-name="T14">articleId</text:span><text:span text:style-name="T10">],</text:span> <text:span text:style-name="T10">'</text:span><text:span text:style-name="T16">Id</text:span><text:span text:style-name="T10">');</text:span></text:p>
      <text:p text:style-name="P18"><text:span text:style-name="T9">if</text:span> <text:span text:style-name="T10">($</text:span><text:span text:style-name="T14">survey</text:span><text:span text:style-name="T10">)</text:span> <text:span text:style-name="T10">$</text:span><text:span text:style-name="T11">this</text:span><text:span text:style-name="T10">-&gt;</text:span><text:span text:style-name="T14">dataHelper</text:span><text:span text:style-name="T10">-&gt;</text:span><text:span text:style-name="T15">set</text:span><text:span text:style-name="T10">('</text:span><text:span text:style-name="T16">Survey</text:span><text:span text:style-name="T10">',</text:span> <text:span text:style-name="T10">$</text:span><text:span text:style-name="T14">fields</text:span><text:span text:style-name="T10">,</text:span> <text:span text:style-name="T10">['</text:span><text:span text:style-name="T16">Id</text:span><text:span text:style-name="T10">'</text:span> <text:span text:style-name="T10">=&gt;</text:span> <text:span text:style-name="T10">$</text:span><text:span text:style-name="T14">survey</text:span><text:span text:style-name="T10">-&gt;</text:span><text:span text:style-name="T14">Id</text:span><text:span text:style-name="T10">]);</text:span></text:p>
      <text:p text:style-name="P18"><text:span text:style-name="T9">else</text:span> <text:span text:style-name="T10">$</text:span><text:span text:style-name="T11">this</text:span><text:span text:style-name="T10">-&gt;</text:span><text:span text:style-name="T14">dataHelper</text:span><text:span text:style-name="T10">-&gt;</text:span><text:span text:style-name="T15">set</text:span><text:span text:style-name="T10">('</text:span><text:span text:style-name="T16">Survey</text:span><text:span text:style-name="T10">',</text:span> <text:span text:style-name="T10">$</text:span><text:span text:style-name="T14">fields</text:span><text:span text:style-name="T10">);</text:span></text:p>
      <text:p text:style-name="P18"><text:span text:style-name="T10">$</text:span><text:span text:style-name="T11">this</text:span><text:span text:style-name="T10">-&gt;</text:span><text:span text:style-name="T15">redirect</text:span><text:span text:style-name="T10">('/</text:span><text:span text:style-name="T9">article</text:span><text:span text:style-name="T10">/'</text:span> <text:span text:style-name="T10">.</text:span> <text:span text:style-name="T10">$</text:span><text:span text:style-name="T14">articleId</text:span><text:span text:style-name="T10">);</text:span></text:p>
      <text:p text:style-name="P19">}</text:p>
      <text:p text:style-name="P17"/>
      <text:p text:style-name="P18"><text:span text:style-name="T9">public</text:span> <text:span text:style-name="T14">function</text:span> <text:span text:style-name="T15">viewResults</text:span><text:span text:style-name="T10">(</text:span><text:span text:style-name="T9">int</text:span> <text:span text:style-name="T10">$</text:span><text:span text:style-name="T14">articleId</text:span><text:span text:style-name="T10">):</text:span> <text:span text:style-name="T9">void</text:span></text:p>
      <text:p text:style-name="P19">{</text:p>
      <text:p text:style-name="P18"><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6">GET</text:span><text:span text:style-name="T10">')</text:span> <text:span text:style-name="T10">{</text:span></text:p>
      <text:p text:style-name="P18"><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Article</text:span><text:span text:style-name="T10">',</text:span> <text:span text:style-name="T10">['</text:span><text:span text:style-name="T16">Id</text:span><text:span text:style-name="T10">'</text:span> <text:span text:style-name="T10">=&gt;</text:span> <text:span text:style-name="T10">$</text:span><text:span text:style-name="T14">articleId</text:span><text:span text:style-name="T10">],</text:span> <text:span text:style-name="T10">'</text:span><text:span text:style-name="T16">Id</text:span><text:span text:style-name="T10">')</text:span> <text:span text:style-name="T10">===</text:span> <text:span text:style-name="T11">false</text:span><text:span text:style-name="T10">)</text:span> <text:span text:style-name="T10">{</text:span></text:p>
      <text:p text:style-name="P18"><text:span text:style-name="T10">$</text:span><text:span text:style-name="T11">this</text:span><text:span text:style-name="T10">-&gt;</text:span><text:span text:style-name="T15">raiseBadRequest</text:span><text:span text:style-name="T10">("</text:span><text:span text:style-name="T16">Article </text:span><text:span text:style-name="T10">{$</text:span><text:span text:style-name="T14">articleId</text:span><text:span text:style-name="T10">}</text:span><text:span text:style-name="T16"> doesn't exist</text:span><text:span text:style-name="T10">",</text:span> <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connectedUser</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text:span></text:p>
      <text:p text:style-name="P18"><text:span text:style-name="T9">if</text:span> <text:span text:style-name="T10">($</text:span><text:span text:style-name="T14">connectedUser</text:span><text:span text:style-name="T10">-&gt;</text:span><text:span text:style-name="T14">person</text:span> <text:span text:style-name="T10">===</text:span> <text:span text:style-name="T11">null</text:span><text:span text:style-name="T10">)</text:span> <text:span text:style-name="T10">{</text:span></text:p>
      <text:p text:style-name="P18"><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6">GET</text:span><text:span text:style-name="T10">')</text:span> <text:span text:style-name="T10">{</text:span></text:p>
      <text:p text:style-name="P18"><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survey</text:span> <text:span text:style-name="T10">=</text:span> <text:span text:style-name="T10">$</text:span><text:span text:style-name="T11">this</text:span><text:span text:style-name="T10">-&gt;</text:span><text:span text:style-name="T14">surveyDataHelper</text:span><text:span text:style-name="T10">-&gt;</text:span><text:span text:style-name="T15">getWithCreator</text:span><text:span text:style-name="T10">($</text:span><text:span text:style-name="T14">articleId</text:span><text:span text:style-name="T10">);</text:span></text:p>
      <text:p text:style-name="P18"><text:span text:style-name="T9">if</text:span> <text:span text:style-name="T10">(!$</text:span><text:span text:style-name="T14">survey</text:span><text:span text:style-name="T10">)</text:span> <text:span text:style-name="T10">{</text:span></text:p>
      <text:p text:style-name="P18"><text:span text:style-name="T10">$</text:span><text:span text:style-name="T11">this</text:span><text:span text:style-name="T10">-&gt;</text:span><text:span text:style-name="T15">raiseBadRequest</text:span><text:span text:style-name="T10">("</text:span><text:span text:style-name="T16">No survey for article </text:span><text:span text:style-name="T10">{$</text:span><text:span text:style-name="T14">articleId</text:span><text:span text:style-name="T10">}",</text:span> <text:span text:style-name="T11">__FILE__</text:span><text:span text:style-name="T10">,</text:span> <text:span text:style-name="T11">__LINE__</text:span><text:span text:style-name="T10">);</text:span></text:p>
      <text:p text:style-name="P18"><text:span text:style-name="T10">$</text:span><text:span text:style-name="T11">this</text:span><text:span text:style-name="T10">-&gt;</text:span><text:span text:style-name="T15">redirect</text:span><text:span text:style-name="T10">('/</text:span><text:span text:style-name="T9">article</text:span><text:span text:style-name="T10">/'</text:span> <text:span text:style-name="T10">.</text:span> <text:span text:style-name="T10">$</text:span><text:span text:style-name="T14">articleId</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1">this</text:span><text:span text:style-name="T10">-&gt;</text:span><text:span text:style-name="T14">authorizationDataHelper</text:span><text:span text:style-name="T10">-&gt;</text:span><text:span text:style-name="T15">canPersonReadSurveyResults</text:span><text:span text:style-name="T10">($</text:span><text:span text:style-name="T11">this</text:span><text:span text:style-name="T10">-&gt;</text:span><text:span text:style-name="T14">dataHelper</text:span><text:span text:style-name="T10">-&gt;</text:span><text:span text:style-name="T15">get</text:span><text:span text:style-name="T10">('</text:span><text:span text:style-name="T16">Article</text:span><text:span text:style-name="T10">',</text:span> <text:span text:style-name="T10">['</text:span><text:span text:style-name="T16">Id</text:span><text:span text:style-name="T10">'</text:span> <text:span text:style-name="T10">=&gt;</text:span> <text:span text:style-name="T10">$</text:span><text:span text:style-name="T14">survey</text:span><text:span text:style-name="T10">-&gt;</text:span><text:span text:style-name="T14">IdArticle</text:span><text:span text:style-name="T10">]),</text:span> <text:span text:style-name="T10">$</text:span><text:span text:style-name="T14">connectedUser</text:span><text:span text:style-name="T10">))</text:span> <text:span text:style-name="T10">{</text:span></text:p>
      <text:p text:style-name="P18"><text:span text:style-name="T10">$</text:span><text:span text:style-name="T14">replies</text:span> <text:span text:style-name="T10">=</text:span> <text:span text:style-name="T10">$</text:span><text:span text:style-name="T11">this</text:span><text:span text:style-name="T10">-&gt;</text:span><text:span text:style-name="T14">dataHelper</text:span><text:span text:style-name="T10">-&gt;</text:span><text:span text:style-name="T15">gets</text:span><text:span text:style-name="T10">('</text:span><text:span text:style-name="T16">Reply</text:span><text:span text:style-name="T10">',</text:span> <text:span text:style-name="T10">['</text:span><text:span text:style-name="T16">IdSurvey</text:span><text:span text:style-name="T10">'</text:span> <text:span text:style-name="T10">=&gt;</text:span> <text:span text:style-name="T10">$</text:span><text:span text:style-name="T14">survey</text:span><text:span text:style-name="T10">-&gt;</text:span><text:span text:style-name="T14">Id</text:span><text:span text:style-name="T10">]);</text:span></text:p>
      <text:p text:style-name="P18"><text:span text:style-name="T10">$</text:span><text:span text:style-name="T14">participants</text:span> <text:span text:style-name="T10">=</text:span> <text:span text:style-name="T10">[];</text:span></text:p>
      <text:p text:style-name="P18"><text:span text:style-name="T10">$</text:span><text:span text:style-name="T14">results</text:span> <text:span text:style-name="T10">=</text:span> <text:span text:style-name="T10">[];</text:span></text:p>
      <text:p text:style-name="P18"><text:span text:style-name="T10">$</text:span><text:span text:style-name="T14">options</text:span> <text:span text:style-name="T10">=</text:span> <text:span text:style-name="T15">json_decode</text:span><text:span text:style-name="T10">($</text:span><text:span text:style-name="T14">survey</text:span><text:span text:style-name="T10">-&gt;</text:span><text:span text:style-name="T14">Options</text:span><text:span text:style-name="T10">);</text:span></text:p>
      <text:p text:style-name="P18"><text:span text:style-name="T9">foreach</text:span> <text:span text:style-name="T10">($</text:span><text:span text:style-name="T14">options</text:span> <text:span text:style-name="T10">as</text:span> <text:span text:style-name="T10">$</text:span><text:span text:style-name="T14">option</text:span><text:span text:style-name="T10">)</text:span> <text:span text:style-name="T10">{</text:span></text:p>
      <text:p text:style-name="P18"><text:span text:style-name="T10">$</text:span><text:span text:style-name="T14">results</text:span><text:span text:style-name="T10">[$</text:span><text:span text:style-name="T14">option</text:span><text:span text:style-name="T10">]</text:span> <text:span text:style-name="T10">=</text:span> <text:span text:style-name="T11">0</text:span><text:span text:style-name="T10">;</text:span></text:p>
      <text:p text:style-name="P19">}</text:p>
      <text:p text:style-name="P18"><text:span text:style-name="T9">foreach</text:span> <text:span text:style-name="T10">($</text:span><text:span text:style-name="T14">replies</text:span> <text:span text:style-name="T10">as</text:span> <text:span text:style-name="T10">$</text:span><text:span text:style-name="T14">reply</text:span><text:span text:style-name="T10">)</text:span> <text:span text:style-name="T10">{</text:span></text:p>
      <text:p text:style-name="P18"><text:span text:style-name="T10">$</text:span><text:span text:style-name="T14">answers</text:span> <text:span text:style-name="T10">=</text:span> <text:span text:style-name="T15">json_decode</text:span><text:span text:style-name="T10">($</text:span><text:span text:style-name="T14">reply</text:span><text:span text:style-name="T10">-&gt;</text:span><text:span text:style-name="T14">Answers</text:span><text:span text:style-name="T10">);</text:span></text:p>
      <text:p text:style-name="P18"><text:span text:style-name="T10">$</text:span><text:span text:style-name="T14">person</text:span> <text:span text:style-name="T10">=</text:span> <text:span text:style-name="T10">$</text:span><text:span text:style-name="T11">this</text:span><text:span text:style-name="T10">-&gt;</text:span><text:span text:style-name="T14">dataHelper</text:span><text:span text:style-name="T10">-&gt;</text:span><text:span text:style-name="T15">get</text:span><text:span text:style-name="T10">('</text:span><text:span text:style-name="T16">Person</text:span><text:span text:style-name="T10">',</text:span> <text:span text:style-name="T10">['</text:span><text:span text:style-name="T16">Id</text:span><text:span text:style-name="T10">'</text:span> <text:span text:style-name="T10">=&gt;</text:span> <text:span text:style-name="T10">$</text:span><text:span text:style-name="T14">reply</text:span><text:span text:style-name="T10">-&gt;</text:span><text:span text:style-name="T14">IdPerson</text:span><text:span text:style-name="T10">],</text:span> <text:span text:style-name="T10">'</text:span><text:span text:style-name="T16">FirstName, LastName</text:span><text:span text:style-name="T10">');</text:span></text:p>
      <text:p text:style-name="P18"><text:span text:style-name="T10">$</text:span><text:span text:style-name="T14">participants</text:span><text:span text:style-name="T10">[]</text:span> <text:span text:style-name="T10">=</text:span> <text:span text:style-name="T10">[</text:span></text:p>
      <text:p text:style-name="P18"><text:span text:style-name="T10">'</text:span><text:span text:style-name="T16">name</text:span><text:span text:style-name="T10">'</text:span> <text:span text:style-name="T10">=&gt;</text:span> <text:span text:style-name="T10">$</text:span><text:span text:style-name="T14">person</text:span><text:span text:style-name="T10">-&gt;</text:span><text:span text:style-name="T14">FirstName</text:span> <text:span text:style-name="T10">.</text:span> <text:span text:style-name="T10">'</text:span><text:span text:style-name="T16"> </text:span><text:span text:style-name="T10">'</text:span> <text:span text:style-name="T10">.</text:span> <text:span text:style-name="T10">$</text:span><text:span text:style-name="T14">person</text:span><text:span text:style-name="T10">-&gt;</text:span><text:span text:style-name="T14">LastName</text:span><text:span text:style-name="T10">,</text:span></text:p>
      <text:p text:style-name="P18"><text:span text:style-name="T10">'</text:span><text:span text:style-name="T16">answers</text:span><text:span text:style-name="T10">'</text:span> <text:span text:style-name="T10">=&gt;</text:span> <text:span text:style-name="T10">$</text:span><text:span text:style-name="T14">answers</text:span></text:p>
      <text:p text:style-name="P19"><text:soft-page-break/>];</text:p>
      <text:p text:style-name="P18"><text:span text:style-name="T9">foreach</text:span> <text:span text:style-name="T10">($</text:span><text:span text:style-name="T14">answers</text:span> <text:span text:style-name="T10">as</text:span> <text:span text:style-name="T10">$</text:span><text:span text:style-name="T14">answer</text:span><text:span text:style-name="T10">)</text:span> <text:span text:style-name="T10">{</text:span></text:p>
      <text:p text:style-name="P18"><text:span text:style-name="T9">if</text:span> <text:span text:style-name="T10">(</text:span><text:span text:style-name="T15">isset</text:span><text:span text:style-name="T10">($</text:span><text:span text:style-name="T14">results</text:span><text:span text:style-name="T10">[$</text:span><text:span text:style-name="T14">answer</text:span><text:span text:style-name="T10">]))</text:span> <text:span text:style-name="T10">$</text:span><text:span text:style-name="T14">results</text:span><text:span text:style-name="T10">[$</text:span><text:span text:style-name="T14">answer</text:span><text:span text:style-name="T10">]++;</text:span></text:p>
      <text:p text:style-name="P19">}</text:p>
      <text:p text:style-name="P19">}</text:p>
      <text:p text:style-name="P17"/>
      <text:p text:style-name="P18"><text:span text:style-name="T10">$</text:span><text:span text:style-name="T11">this</text:span><text:span text:style-name="T10">-&gt;</text:span><text:span text:style-name="T15">render</text:span><text:span text:style-name="T10">('</text:span><text:span text:style-name="T16">Article/views/survey_results.latte</text:span><text:span text:style-name="T10">',</text:span> <text:span text:style-name="T10">[</text:span></text:p>
      <text:p text:style-name="P18"><text:span text:style-name="T10">'</text:span><text:span text:style-name="T16">survey</text:span><text:span text:style-name="T10">'</text:span> <text:span text:style-name="T10">=&gt;</text:span> <text:span text:style-name="T10">$</text:span><text:span text:style-name="T14">survey</text:span><text:span text:style-name="T10">,</text:span></text:p>
      <text:p text:style-name="P18"><text:span text:style-name="T10">'</text:span><text:span text:style-name="T16">options</text:span><text:span text:style-name="T10">'</text:span> <text:span text:style-name="T10">=&gt;</text:span> <text:span text:style-name="T10">$</text:span><text:span text:style-name="T14">options</text:span><text:span text:style-name="T10">,</text:span></text:p>
      <text:p text:style-name="P18"><text:span text:style-name="T10">'</text:span><text:span text:style-name="T16">results</text:span><text:span text:style-name="T10">'</text:span> <text:span text:style-name="T10">=&gt;</text:span> <text:span text:style-name="T10">$</text:span><text:span text:style-name="T14">results</text:span><text:span text:style-name="T10">,</text:span></text:p>
      <text:p text:style-name="P18"><text:span text:style-name="T10">'</text:span><text:span text:style-name="T16">participants</text:span><text:span text:style-name="T10">'</text:span> <text:span text:style-name="T10">=&gt;</text:span> <text:span text:style-name="T10">$</text:span><text:span text:style-name="T14">participants</text:span><text:span text:style-name="T10">,</text:span></text:p>
      <text:p text:style-name="P18"><text:span text:style-name="T10">'</text:span><text:span text:style-name="T16">articleId</text:span><text:span text:style-name="T10">'</text:span> <text:span text:style-name="T10">=&gt;</text:span> <text:span text:style-name="T10">$</text:span><text:span text:style-name="T14">articleId</text:span><text:span text:style-name="T10">,</text:span></text:p>
      <text:p text:style-name="P18"><text:span text:style-name="T10">'</text:span><text:span text:style-name="T16">currentVersion</text:span><text:span text:style-name="T10">'</text:span> <text:span text:style-name="T10">=&gt;</text:span> <text:span text:style-name="T12">Application</text:span><text:span text:style-name="T10">::</text:span><text:span text:style-name="T11">VERSION</text:span><text:span text:style-name="T10">,</text:span></text:p>
      <text:p text:style-name="P18"><text:span text:style-name="T10">'</text:span><text:span text:style-name="T16">page</text:span><text:span text:style-name="T10">'</text:span> <text:span text:style-name="T10">=&gt;</text:span> <text:span text:style-name="T10">$</text:span><text:span text:style-name="T14">connectedUser</text:span><text:span text:style-name="T10">-&gt;</text:span><text:span text:style-name="T15">getPage</text:span><text:span text:style-name="T10">(),</text:span></text:p>
      <text:p text:style-name="P19">]);</text:p>
      <text:p text:style-name="P18"><text:span text:style-name="T10">}</text:span> <text:span text:style-name="T9">else</text:span> <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P19">}</text:p>
      <text:p text:style-name="P19">}</text:p>
      <text:p text:style-name="P49"/>
      <text:p text:style-name="P47">la vue survey_add.latte</text:p>
      <text:p text:style-name="P50">{<text:span text:style-name="T9">extends </text:span><text:span text:style-name="T16">'../../Webmaster/views/redactor.latte'</text:span>}</text:p>
      <text:p text:style-name="P17"/>
      <text:p text:style-name="P18">{<text:span text:style-name="T9">block </text:span>content}</text:p>
      <text:p text:style-name="P18"><text:span text:style-name="T17">&lt;</text:span><text:span text:style-name="T9">div</text:span><text:span text:style-name="T17"> </text:span><text:span text:style-name="T18">class</text:span><text:span text:style-name="T10">="</text:span><text:span text:style-name="T16">container-fluid</text:span><text:span text:style-name="T10">"</text:span><text:span text:style-name="T17">&gt;</text:span></text:p>
      <text:p text:style-name="P18">{<text:span text:style-name="T9">if </text:span><text:span text:style-name="T14">$survey</text:span>}</text:p>
      <text:p text:style-name="P18"><text:span text:style-name="T17">&lt;</text:span><text:span text:style-name="T9">h1</text:span><text:span text:style-name="T17">&gt;</text:span>Modifier le sondage de l'article: {<text:span text:style-name="T14">$article</text:span><text:span text:style-name="T10">-&gt;</text:span>Title}<text:span text:style-name="T17">&lt;/</text:span><text:span text:style-name="T9">h1</text:span><text:span text:style-name="T17">&gt;</text:span></text:p>
      <text:p text:style-name="P18">{<text:span text:style-name="T9">else</text:span>}</text:p>
      <text:p text:style-name="P18"><text:span text:style-name="T17">&lt;</text:span><text:span text:style-name="T9">h1</text:span><text:span text:style-name="T17">&gt;</text:span>Ajouter un sondage à l'article: {<text:span text:style-name="T14">$article</text:span><text:span text:style-name="T10">-&gt;</text:span>Title}<text:span text:style-name="T17">&lt;/</text:span><text:span text:style-name="T9">h1</text:span><text:span text:style-name="T17">&gt;</text:span></text:p>
      <text:p text:style-name="P18">{<text:span text:style-name="T9">/if</text:span>}</text:p>
      <text:p text:style-name="P18"><text:span text:style-name="T17">&lt;</text:span><text:span text:style-name="T9">form</text:span><text:span text:style-name="T17"> </text:span><text:span text:style-name="T18">action</text:span><text:span text:style-name="T10">="</text:span><text:span text:style-name="T16">/survey/create</text:span><text:span text:style-name="T10">"</text:span><text:span text:style-name="T17"> </text:span><text:span text:style-name="T18">method</text:span><text:span text:style-name="T10">="</text:span><text:span text:style-name="T16">POST</text:span><text:span text:style-name="T10">"</text:span><text:span text:style-name="T17">&gt;</text:span></text:p>
      <text:p text:style-name="P18"><text:span text:style-name="T17">&lt;</text:span><text:span text:style-name="T9">input</text:span><text:span text:style-name="T17"> </text:span><text:span text:style-name="T18">type</text:span><text:span text:style-name="T10">="</text:span><text:span text:style-name="T16">hidden</text:span><text:span text:style-name="T10">"</text:span><text:span text:style-name="T17"> </text:span><text:span text:style-name="T18">name</text:span><text:span text:style-name="T10">="</text:span><text:span text:style-name="T16">article_id</text:span><text:span text:style-name="T10">"</text:span><text:span text:style-name="T17"> </text:span><text:span text:style-name="T18">value</text:span><text:span text:style-name="T10">="</text:span><text:span text:style-name="T16">{$article-&gt;Id}</text:span><text:span text:style-name="T10">"</text:span><text:span text:style-name="T17">&gt;</text:span></text:p>
      <text:p text:style-name="P18">{<text:span text:style-name="T9">if </text:span><text:span text:style-name="T14">$survey </text:span><text:span text:style-name="T10">!</text:span>== <text:span text:style-name="T11">false</text:span>}</text:p>
      <text:p text:style-name="P18"><text:span text:style-name="T17">&lt;</text:span><text:span text:style-name="T9">div</text:span><text:span text:style-name="T17"> </text:span><text:span text:style-name="T18">class</text:span><text:span text:style-name="T10">="</text:span><text:span text:style-name="T16">alert alert-danger</text:span><text:span text:style-name="T10">"</text:span><text:span text:style-name="T17"> </text:span><text:span text:style-name="T18">role</text:span><text:span text:style-name="T10">="</text:span><text:span text:style-name="T16">alert</text:span><text:span text:style-name="T10">"</text:span><text:span text:style-name="T17">&gt;</text:span></text:p>
      <text:p text:style-name="P18"><text:span text:style-name="T17">&lt;</text:span><text:span text:style-name="T9">p</text:span><text:span text:style-name="T17">&gt;</text:span>On ne peut modifier que la question et les réponses pour lesquelles il n'y a aucun vote<text:span text:style-name="T17">&lt;/</text:span><text:span text:style-name="T9">p</text:span><text:span text:style-name="T17">&gt;</text:span></text:p>
      <text:p text:style-name="P18"><text:span text:style-name="T17">&lt;/</text:span><text:span text:style-name="T9">div</text:span><text:span text:style-name="T17">&gt;</text:span></text:p>
      <text:p text:style-name="P18">{<text:span text:style-name="T9">/if</text:span>}</text:p>
      <text:p text:style-name="P1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18"><text:span text:style-name="T17">&lt;</text:span><text:span text:style-name="T9">label</text:span><text:span text:style-name="T17"> </text:span><text:span text:style-name="T18">for</text:span><text:span text:style-name="T10">="</text:span><text:span text:style-name="T16">question</text:span><text:span text:style-name="T10">"</text:span><text:span text:style-name="T17"> </text:span><text:span text:style-name="T18">class</text:span><text:span text:style-name="T10">="</text:span><text:span text:style-name="T16">form-label</text:span><text:span text:style-name="T10">"</text:span><text:span text:style-name="T17">&gt;</text:span>Question du sondage<text:span text:style-name="T17">&lt;/</text:span><text:span text:style-name="T9">label</text:span><text:span text:style-name="T17">&gt;</text:span></text:p>
      <text:p text:style-name="P18"><text:span text:style-name="T17">&lt;</text:span><text:span text:style-name="T9">input</text:span><text:span text:style-name="T17"> </text:span><text:span text:style-name="T18">type</text:span><text:span text:style-name="T10">="</text:span><text:span text:style-name="T16">text</text:span><text:span text:style-name="T10">"</text:span><text:span text:style-name="T17"> </text:span><text:span text:style-name="T18">class</text:span><text:span text:style-name="T10">="</text:span><text:span text:style-name="T16">form-control</text:span><text:span text:style-name="T10">"</text:span><text:span text:style-name="T17"> </text:span><text:span text:style-name="T18">id</text:span><text:span text:style-name="T10">="</text:span><text:span text:style-name="T16">question</text:span><text:span text:style-name="T10">"</text:span><text:span text:style-name="T17"> </text:span><text:span text:style-name="T18">name</text:span><text:span text:style-name="T10">="</text:span><text:span text:style-name="T16">question</text:span><text:span text:style-name="T10">"</text:span><text:span text:style-name="T17"> </text:span><text:span text:style-name="T18">value</text:span><text:span text:style-name="T10">="</text:span><text:span text:style-name="T16">{if $survey}{$survey-&gt;Question}{/if}</text:span><text:span text:style-name="T10">"</text:span><text:span text:style-name="T17"> </text:span><text:span text:style-name="T18">required</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 </text:span><text:span text:style-name="T18">id</text:span><text:span text:style-name="T10">="</text:span><text:span text:style-name="T16">options-container</text:span><text:span text:style-name="T10">"</text:span><text:span text:style-name="T17">&gt;</text:span></text:p>
      <text:p text:style-name="P1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18"><text:span text:style-name="T17">&lt;</text:span><text:span text:style-name="T9">label</text:span><text:span text:style-name="T17"> </text:span><text:span text:style-name="T18">class</text:span><text:span text:style-name="T10">="</text:span><text:span text:style-name="T16">form-label</text:span><text:span text:style-name="T10">"</text:span><text:span text:style-name="T17">&gt;</text:span>Options (réponses possibles)<text:span text:style-name="T17">&lt;/</text:span><text:span text:style-name="T9">label</text:span><text:span text:style-name="T17">&gt;</text:span></text:p>
      <text:p text:style-name="P18">{<text:span text:style-name="T9">if </text:span><text:span text:style-name="T14">$survey</text:span>}</text:p>
      <text:p text:style-name="P18">{<text:span text:style-name="T9">var </text:span><text:span text:style-name="T14">$surveyOptions </text:span>= json_decode(<text:span text:style-name="T14">$survey</text:span><text:span text:style-name="T10">-&gt;</text:span>Options, <text:span text:style-name="T11">true</text:span>)}</text:p>
      <text:p text:style-name="P18">{<text:span text:style-name="T9">foreach </text:span><text:span text:style-name="T14">$surveyOptions </text:span><text:span text:style-name="T10">as </text:span><text:span text:style-name="T14">$optionText</text:span>}</text:p>
      <text:p text:style-name="P18"><text:span text:style-name="T17">&lt;</text:span><text:span text:style-name="T9">div</text:span><text:span text:style-name="T17"> </text:span><text:span text:style-name="T18">class</text:span><text:span text:style-name="T10">="</text:span><text:span text:style-name="T16">d-flex mb-2</text:span><text:span text:style-name="T10">"</text:span><text:span text:style-name="T17">&gt;</text:span></text:p>
      <text:p text:style-name="P18"><text:span text:style-name="T17">&lt;</text:span><text:span text:style-name="T9">input</text:span><text:span text:style-name="T17"> </text:span><text:span text:style-name="T18">type</text:span><text:span text:style-name="T10">="</text:span><text:span text:style-name="T16">text</text:span><text:span text:style-name="T10">"</text:span><text:span text:style-name="T17"> </text:span><text:span text:style-name="T18">class</text:span><text:span text:style-name="T10">="</text:span><text:span text:style-name="T16">form-control me-2</text:span><text:span text:style-name="T10">"</text:span><text:span text:style-name="T17"> </text:span><text:span text:style-name="T18">name</text:span><text:span text:style-name="T10">="</text:span><text:span text:style-name="T16">options[]</text:span><text:span text:style-name="T10">"</text:span><text:span text:style-name="T17"> </text:span><text:span text:style-name="T18">value</text:span><text:span text:style-name="T10">="</text:span><text:span text:style-name="T16">{$optionText}</text:span><text:span text:style-name="T10">"</text:span><text:span text:style-name="T17"> </text:span><text:span text:style-name="T18">required</text:span><text:span text:style-name="T17">&gt;</text:span></text:p>
      <text:p text:style-name="P1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danger remove-option</text:span><text:span text:style-name="T10">"</text:span><text:span text:style-name="T17"> </text:span><text:span text:style-name="T18">{if</text:span><text:span text:style-name="T17"> </text:span><text:span text:style-name="T18">count($surveyOptions)</text:span><text:span text:style-name="T17"> </text:span><text:span text:style-name="T42">&lt;=</text:span><text:span text:style-name="T17"> </text:span><text:span text:style-name="T18">2}disabled{</text:span><text:span text:style-name="T42">/if}</text:span><text:span text:style-name="T17">&gt;</text:span>-<text:span text:style-name="T17">&lt;/</text:span><text:span text:style-name="T9">button</text:span><text:span text:style-name="T17">&gt;</text:span></text:p>
      <text:p text:style-name="P18"><text:span text:style-name="T17">&lt;/</text:span><text:span text:style-name="T9">div</text:span><text:span text:style-name="T17">&gt;</text:span></text:p>
      <text:p text:style-name="P18">{<text:span text:style-name="T9">/foreach</text:span>}</text:p>
      <text:p text:style-name="P18">{<text:span text:style-name="T9">else</text:span>}</text:p>
      <text:p text:style-name="P18"><text:soft-page-break/><text:span text:style-name="T17">&lt;</text:span><text:span text:style-name="T9">div</text:span><text:span text:style-name="T17"> </text:span><text:span text:style-name="T18">class</text:span><text:span text:style-name="T10">="</text:span><text:span text:style-name="T16">d-flex mb-2</text:span><text:span text:style-name="T10">"</text:span><text:span text:style-name="T17">&gt;</text:span></text:p>
      <text:p text:style-name="P18"><text:span text:style-name="T17">&lt;</text:span><text:span text:style-name="T9">input</text:span><text:span text:style-name="T17"> </text:span><text:span text:style-name="T18">type</text:span><text:span text:style-name="T10">="</text:span><text:span text:style-name="T16">text</text:span><text:span text:style-name="T10">"</text:span><text:span text:style-name="T17"> </text:span><text:span text:style-name="T18">class</text:span><text:span text:style-name="T10">="</text:span><text:span text:style-name="T16">form-control me-2</text:span><text:span text:style-name="T10">"</text:span><text:span text:style-name="T17"> </text:span><text:span text:style-name="T18">name</text:span><text:span text:style-name="T10">="</text:span><text:span text:style-name="T16">options[]</text:span><text:span text:style-name="T10">"</text:span><text:span text:style-name="T17"> </text:span><text:span text:style-name="T18">required</text:span><text:span text:style-name="T17">&gt;</text:span></text:p>
      <text:p text:style-name="P1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danger remove-option</text:span><text:span text:style-name="T10">"</text:span><text:span text:style-name="T17"> </text:span><text:span text:style-name="T18">disabled</text:span><text:span text:style-name="T17">&gt;</text:span>-<text:span text:style-name="T17">&lt;/</text:span><text:span text:style-name="T9">button</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 </text:span><text:span text:style-name="T18">class</text:span><text:span text:style-name="T10">="</text:span><text:span text:style-name="T16">d-flex mb-2</text:span><text:span text:style-name="T10">"</text:span><text:span text:style-name="T17">&gt;</text:span></text:p>
      <text:p text:style-name="P18"><text:span text:style-name="T17">&lt;</text:span><text:span text:style-name="T9">input</text:span><text:span text:style-name="T17"> </text:span><text:span text:style-name="T18">type</text:span><text:span text:style-name="T10">="</text:span><text:span text:style-name="T16">text</text:span><text:span text:style-name="T10">"</text:span><text:span text:style-name="T17"> </text:span><text:span text:style-name="T18">class</text:span><text:span text:style-name="T10">="</text:span><text:span text:style-name="T16">form-control me-2</text:span><text:span text:style-name="T10">"</text:span><text:span text:style-name="T17"> </text:span><text:span text:style-name="T18">name</text:span><text:span text:style-name="T10">="</text:span><text:span text:style-name="T16">options[]</text:span><text:span text:style-name="T10">"</text:span><text:span text:style-name="T17"> </text:span><text:span text:style-name="T18">required</text:span><text:span text:style-name="T17">&gt;</text:span></text:p>
      <text:p text:style-name="P1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class</text:span><text:span text:style-name="T10">="</text:span><text:span text:style-name="T16">btn btn-danger remove-option</text:span><text:span text:style-name="T10">"</text:span><text:span text:style-name="T17"> </text:span><text:span text:style-name="T18">disabled</text:span><text:span text:style-name="T17">&gt;</text:span>-<text:span text:style-name="T17">&lt;/</text:span><text:span text:style-name="T9">button</text:span><text:span text:style-name="T17">&gt;</text:span></text:p>
      <text:p text:style-name="P18"><text:span text:style-name="T17">&lt;/</text:span><text:span text:style-name="T9">div</text:span><text:span text:style-name="T17">&gt;</text:span></text:p>
      <text:p text:style-name="P18">{<text:span text:style-name="T9">/if</text:span>}</text:p>
      <text:p text:style-name="P18"><text:span text:style-name="T17">&lt;/</text:span><text:span text:style-name="T9">div</text:span><text:span text:style-name="T17">&gt;</text:span></text:p>
      <text:p text:style-name="P18"><text:span text:style-name="T17">&lt;</text:span><text:span text:style-name="T9">button</text:span><text:span text:style-name="T17"> </text:span><text:span text:style-name="T18">type</text:span><text:span text:style-name="T10">="</text:span><text:span text:style-name="T16">button</text:span><text:span text:style-name="T10">"</text:span><text:span text:style-name="T17"> </text:span><text:span text:style-name="T18">id</text:span><text:span text:style-name="T10">="</text:span><text:span text:style-name="T16">add-option</text:span><text:span text:style-name="T10">"</text:span><text:span text:style-name="T17"> </text:span><text:span text:style-name="T18">class</text:span><text:span text:style-name="T10">="</text:span><text:span text:style-name="T16">btn btn-secondary mb-3</text:span><text:span text:style-name="T10">"</text:span><text:span text:style-name="T17">&gt;</text:span>Ajouter une option<text:span text:style-name="T17">&lt;/</text:span><text:span text:style-name="T9">button</text:span><text:span text:style-name="T17">&gt;</text:span></text:p>
      <text:p text:style-name="P1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18"><text:span text:style-name="T17">&lt;</text:span><text:span text:style-name="T9">label</text:span><text:span text:style-name="T17"> </text:span><text:span text:style-name="T18">for</text:span><text:span text:style-name="T10">="</text:span><text:span text:style-name="T16">dateInput</text:span><text:span text:style-name="T10">"</text:span><text:span text:style-name="T17"> </text:span><text:span text:style-name="T18">class</text:span><text:span text:style-name="T10">="</text:span><text:span text:style-name="T16">form-label</text:span><text:span text:style-name="T10">"</text:span><text:span text:style-name="T17">&gt;</text:span>Date de cloture<text:span text:style-name="T17">&lt;/</text:span><text:span text:style-name="T9">label</text:span><text:span text:style-name="T17">&gt;</text:span></text:p>
      <text:p text:style-name="P18"><text:span text:style-name="T17">&lt;</text:span><text:span text:style-name="T9">input</text:span><text:span text:style-name="T17"> </text:span><text:span text:style-name="T18">type</text:span><text:span text:style-name="T10">="</text:span><text:span text:style-name="T16">date</text:span><text:span text:style-name="T10">"</text:span><text:span text:style-name="T17"> </text:span><text:span text:style-name="T18">class</text:span><text:span text:style-name="T10">="</text:span><text:span text:style-name="T16">form-control w-auto</text:span><text:span text:style-name="T10">"</text:span><text:span text:style-name="T17"> </text:span><text:span text:style-name="T18">id</text:span><text:span text:style-name="T10">="</text:span><text:span text:style-name="T16">dateInput</text:span><text:span text:style-name="T10">"</text:span><text:span text:style-name="T17"> </text:span><text:span text:style-name="T18">name</text:span><text:span text:style-name="T10">="</text:span><text:span text:style-name="T16">closingDate</text:span><text:span text:style-name="T10">"</text:span><text:span text:style-name="T17"> </text:span><text:span text:style-name="T18">value</text:span><text:span text:style-name="T10">="</text:span><text:span text:style-name="T16">{$survey?-&gt;ClosingDate ?? ''}</text:span><text:span text:style-name="T10">"</text:span><text:span text:style-name="T17"> </text:span><text:span text:style-name="T18">required</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18"><text:span text:style-name="T17">&lt;</text:span><text:span text:style-name="T9">label</text:span><text:span text:style-name="T17"> </text:span><text:span text:style-name="T18">for</text:span><text:span text:style-name="T10">="</text:span><text:span text:style-name="T16">visibility</text:span><text:span text:style-name="T10">"</text:span><text:span text:style-name="T17"> </text:span><text:span text:style-name="T18">class</text:span><text:span text:style-name="T10">="</text:span><text:span text:style-name="T16">form-label</text:span><text:span text:style-name="T10">"</text:span><text:span text:style-name="T17">&gt;</text:span>Visibilité<text:span text:style-name="T17">&lt;/</text:span><text:span text:style-name="T9">label</text:span><text:span text:style-name="T17">&gt;</text:span></text:p>
      <text:p text:style-name="P18"><text:span text:style-name="T17">&lt;</text:span><text:span text:style-name="T9">select</text:span><text:span text:style-name="T17"> </text:span><text:span text:style-name="T18">class</text:span><text:span text:style-name="T10">="</text:span><text:span text:style-name="T16">form-control w-auto</text:span><text:span text:style-name="T10">"</text:span><text:span text:style-name="T17"> </text:span><text:span text:style-name="T18">id</text:span><text:span text:style-name="T10">="</text:span><text:span text:style-name="T16">visibility</text:span><text:span text:style-name="T10">"</text:span><text:span text:style-name="T17"> </text:span><text:span text:style-name="T18">name</text:span><text:span text:style-name="T10">="</text:span><text:span text:style-name="T16">visibility</text:span><text:span text:style-name="T10">"</text:span><text:span text:style-name="T17"> </text:span><text:span text:style-name="T18">required</text:span><text:span text:style-name="T17">&gt;</text:span></text:p>
      <text:p text:style-name="P18"><text:span text:style-name="T17">&lt;</text:span><text:span text:style-name="T9">option</text:span><text:span text:style-name="T17"> </text:span><text:span text:style-name="T18">value</text:span><text:span text:style-name="T10">="</text:span><text:span text:style-name="T16">redactor</text:span><text:span text:style-name="T10">"</text:span><text:span text:style-name="T17"> </text:span><text:span text:style-name="T18">{if</text:span><text:span text:style-name="T17"> </text:span><text:span text:style-name="T18">$survey</text:span><text:span text:style-name="T17"> </text:span><text:span text:style-name="T18">!</text:span><text:span text:style-name="T10">=</text:span><text:span text:style-name="T42">=</text:span><text:span text:style-name="T17"> </text:span><text:span text:style-name="T16">false</text:span><text:span text:style-name="T17"> </text:span><text:span text:style-name="T18">&amp;&amp;</text:span><text:span text:style-name="T17"> </text:span><text:span text:style-name="T18">$survey-</text:span><text:span text:style-name="T17">&gt;</text:span>Visibility == 'redactor'}selected{<text:span text:style-name="T9">/if</text:span>}&gt;Rédacteur 👁️‍🗨️📝<text:span text:style-name="T17">&lt;/</text:span><text:span text:style-name="T9">option</text:span><text:span text:style-name="T17">&gt;</text:span></text:p>
      <text:p text:style-name="P18"><text:span text:style-name="T17">&lt;</text:span><text:span text:style-name="T9">option</text:span><text:span text:style-name="T17"> </text:span><text:span text:style-name="T18">value</text:span><text:span text:style-name="T10">="</text:span><text:span text:style-name="T16">all</text:span><text:span text:style-name="T10">"</text:span><text:span text:style-name="T17"> </text:span><text:span text:style-name="T18">{if</text:span><text:span text:style-name="T17"> </text:span><text:span text:style-name="T18">$survey</text:span><text:span text:style-name="T17"> </text:span><text:span text:style-name="T18">!</text:span><text:span text:style-name="T10">=</text:span><text:span text:style-name="T42">=</text:span><text:span text:style-name="T17"> </text:span><text:span text:style-name="T16">false</text:span><text:span text:style-name="T17"> </text:span><text:span text:style-name="T18">&amp;&amp;</text:span><text:span text:style-name="T17"> </text:span><text:span text:style-name="T18">$survey-</text:span><text:span text:style-name="T17">&gt;</text:span>Visibility == 'all'}selected{<text:span text:style-name="T9">/if</text:span>}&gt;Tout le monde 👁️‍🗨️👥<text:span text:style-name="T17">&lt;/</text:span><text:span text:style-name="T9">option</text:span><text:span text:style-name="T17">&gt;</text:span></text:p>
      <text:p text:style-name="P18"><text:span text:style-name="T17">&lt;</text:span><text:span text:style-name="T9">option</text:span><text:span text:style-name="T17"> </text:span><text:span text:style-name="T18">value</text:span><text:span text:style-name="T10">="</text:span><text:span text:style-name="T16">allAfterClosing</text:span><text:span text:style-name="T10">"</text:span><text:span text:style-name="T17"> </text:span><text:span text:style-name="T18">{if</text:span><text:span text:style-name="T17"> </text:span><text:span text:style-name="T18">$survey</text:span><text:span text:style-name="T17"> </text:span><text:span text:style-name="T18">!</text:span><text:span text:style-name="T10">=</text:span><text:span text:style-name="T42">=</text:span><text:span text:style-name="T17"> </text:span><text:span text:style-name="T16">false</text:span><text:span text:style-name="T17"> </text:span><text:span text:style-name="T18">&amp;&amp;</text:span><text:span text:style-name="T17"> </text:span><text:span text:style-name="T18">$survey-</text:span><text:span text:style-name="T17">&gt;</text:span>Visibility == 'allAfterClosing'}selected{<text:span text:style-name="T9">/if</text:span>}&gt;Tout le monde après la cloture 👁️‍🗨️👥📅<text:span text:style-name="T17">&lt;/</text:span><text:span text:style-name="T9">option</text:span><text:span text:style-name="T17">&gt;</text:span></text:p>
      <text:p text:style-name="P18"><text:span text:style-name="T17">&lt;</text:span><text:span text:style-name="T9">option</text:span><text:span text:style-name="T17"> </text:span><text:span text:style-name="T18">value</text:span><text:span text:style-name="T10">="</text:span><text:span text:style-name="T16">voters</text:span><text:span text:style-name="T10">"</text:span><text:span text:style-name="T17"> </text:span><text:span text:style-name="T18">{if</text:span><text:span text:style-name="T17"> </text:span><text:span text:style-name="T18">$survey</text:span><text:span text:style-name="T17"> </text:span><text:span text:style-name="T18">!</text:span><text:span text:style-name="T10">=</text:span><text:span text:style-name="T42">=</text:span><text:span text:style-name="T17"> </text:span><text:span text:style-name="T16">false</text:span><text:span text:style-name="T17"> </text:span><text:span text:style-name="T18">&amp;&amp;</text:span><text:span text:style-name="T17"> </text:span><text:span text:style-name="T18">$survey-</text:span><text:span text:style-name="T17">&gt;</text:span>Visibility == 'voters'}selected{<text:span text:style-name="T9">/if</text:span>}&gt;Les votants 👁️‍🗨️🗳️<text:span text:style-name="T17">&lt;/</text:span><text:span text:style-name="T9">option</text:span><text:span text:style-name="T17">&gt;</text:span></text:p>
      <text:p text:style-name="P18"><text:span text:style-name="T17">&lt;</text:span><text:span text:style-name="T9">option</text:span><text:span text:style-name="T17"> </text:span><text:span text:style-name="T18">value</text:span><text:span text:style-name="T10">="</text:span><text:span text:style-name="T16">votersAfterClosing</text:span><text:span text:style-name="T10">"</text:span><text:span text:style-name="T17"> </text:span><text:span text:style-name="T18">{if</text:span><text:span text:style-name="T17"> </text:span><text:span text:style-name="T18">$survey</text:span><text:span text:style-name="T17"> </text:span><text:span text:style-name="T18">!</text:span><text:span text:style-name="T10">=</text:span><text:span text:style-name="T42">=</text:span><text:span text:style-name="T17"> </text:span><text:span text:style-name="T16">false</text:span><text:span text:style-name="T17"> </text:span><text:span text:style-name="T18">&amp;&amp;</text:span><text:span text:style-name="T17"> </text:span><text:span text:style-name="T18">$survey-</text:span><text:span text:style-name="T17">&gt;</text:span>Visibility == 'votersAfterClosing'}selected{<text:span text:style-name="T9">/if</text:span>}&gt;Les votants après la cloture 👁️‍🗨️🗳️📅<text:span text:style-name="T17">&lt;/</text:span><text:span text:style-name="T9">option</text:span><text:span text:style-name="T17">&gt;</text:span></text:p>
      <text:p text:style-name="P18"><text:span text:style-name="T17">&lt;/</text:span><text:span text:style-name="T9">select</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 </text:span><text:span text:style-name="T18">class</text:span><text:span text:style-name="T10">="</text:span><text:span text:style-name="T16">mb-3</text:span><text:span text:style-name="T10">"</text:span><text:span text:style-name="T17">&gt;</text:span></text:p>
      <text:p text:style-name="P18">{<text:span text:style-name="T9">if </text:span><text:span text:style-name="T14">$survey</text:span>}</text:p>
      <text:p text:style-name="P18"><text:span text:style-name="T17">&lt;</text:span><text:span text:style-name="T9">button</text:span><text:span text:style-name="T17"> </text:span><text:span text:style-name="T18">type</text:span><text:span text:style-name="T10">="</text:span><text:span text:style-name="T16">submit</text:span><text:span text:style-name="T10">"</text:span><text:span text:style-name="T17"> </text:span><text:span text:style-name="T18">class</text:span><text:span text:style-name="T10">="</text:span><text:span text:style-name="T16">btn btn-primary</text:span><text:span text:style-name="T10">"</text:span><text:span text:style-name="T17">&gt;</text:span>Modifier le sondage<text:span text:style-name="T17">&lt;/</text:span><text:span text:style-name="T9">button</text:span><text:span text:style-name="T17">&gt;</text:span></text:p>
      <text:p text:style-name="P18">{<text:span text:style-name="T9">else</text:span>}</text:p>
      <text:p text:style-name="P18"><text:span text:style-name="T17">&lt;</text:span><text:span text:style-name="T9">button</text:span><text:span text:style-name="T17"> </text:span><text:span text:style-name="T18">type</text:span><text:span text:style-name="T10">="</text:span><text:span text:style-name="T16">submit</text:span><text:span text:style-name="T10">"</text:span><text:span text:style-name="T17"> </text:span><text:span text:style-name="T18">class</text:span><text:span text:style-name="T10">="</text:span><text:span text:style-name="T16">btn btn-primary</text:span><text:span text:style-name="T10">"</text:span><text:span text:style-name="T17">&gt;</text:span>Créer le sondage<text:span text:style-name="T17">&lt;/</text:span><text:span text:style-name="T9">button</text:span><text:span text:style-name="T17">&gt;</text:span></text:p>
      <text:p text:style-name="P18">{<text:span text:style-name="T9">/if</text:span>}</text:p>
      <text:p text:style-name="P18"><text:span text:style-name="T17">&lt;</text:span><text:span text:style-name="T9">a</text:span><text:span text:style-name="T17"> </text:span><text:span text:style-name="T18">href</text:span><text:span text:style-name="T10">="</text:span><text:span text:style-name="T16">/article/{$article-&gt;Id}</text:span><text:span text:style-name="T10">"</text:span><text:span text:style-name="T17"> </text:span><text:span text:style-name="T18">class</text:span><text:span text:style-name="T10">="</text:span><text:span text:style-name="T16">btn btn-secondary</text:span><text:span text:style-name="T10">"</text:span><text:span text:style-name="T17">&gt;</text:span>Annuler<text:span text:style-name="T17">&lt;/</text:span><text:span text:style-name="T9">a</text:span><text:span text:style-name="T17">&gt;</text:span></text:p>
      <text:p text:style-name="P18"><text:span text:style-name="T17">&lt;/</text:span><text:span text:style-name="T9">div</text:span><text:span text:style-name="T17">&gt;</text:span></text:p>
      <text:p text:style-name="P18"><text:span text:style-name="T17">&lt;/</text:span><text:span text:style-name="T9">form</text:span><text:span text:style-name="T17">&gt;</text:span></text:p>
      <text:p text:style-name="P18"><text:span text:style-name="T17">&lt;/</text:span><text:span text:style-name="T9">div</text:span><text:span text:style-name="T17">&gt;</text:span></text:p>
      <text:p text:style-name="P18">{<text:span text:style-name="T9">/block</text:span>}</text:p>
      <text:p text:style-name="P17"/>
      <text:p text:style-name="P18">{<text:span text:style-name="T9">block </text:span>scripts}</text:p>
      <text:p text:style-name="P18"><text:span text:style-name="T17">&lt;</text:span><text:span text:style-name="T9">script</text:span><text:span text:style-name="T17"> </text:span><text:span text:style-name="T18">src</text:span><text:span text:style-name="T10">="</text:span><text:span text:style-name="T16">/app/modules/Article/js/surveyAdd.js</text:span><text:span text:style-name="T10">"</text:span><text:span text:style-name="T17">&gt;&lt;/</text:span><text:span text:style-name="T9">script</text:span><text:span text:style-name="T17">&gt;</text:span></text:p>
      <text:p text:style-name="P18">{<text:span text:style-name="T9">/block</text:span>}</text:p>
      <text:p text:style-name="P47"/>
      <text:p text:style-name="P47"/>
      <text:p text:style-name="P47">la vue survey_results.latte</text:p>
      <text:p text:style-name="P50">{<text:span text:style-name="T9">layout </text:span><text:span text:style-name="T16">'../../Common/views/layout.latte'</text:span>}</text:p>
      <text:p text:style-name="P17"/>
      <text:p text:style-name="P18">{<text:span text:style-name="T9">block </text:span>navbar}</text:p>
      <text:p text:style-name="P18"><text:soft-page-break/><text:span text:style-name="T17">&lt;</text:span><text:span text:style-name="T9">div</text:span><text:span text:style-name="T17"> </text:span><text:span text:style-name="T18">class</text:span><text:span text:style-name="T10">="</text:span><text:span text:style-name="T16">container-fluid d-flex align-items-center</text:span><text:span text:style-name="T10">"</text:span><text:span text:style-name="T17">&gt;</text:span></text:p>
      <text:p text:style-name="P18"><text:span text:style-name="T17">&lt;</text:span><text:span text:style-name="T9">div</text:span><text:span text:style-name="T17"> </text:span><text:span text:style-name="T18">class</text:span><text:span text:style-name="T10">="</text:span><text:span text:style-name="T16">d-flex gap-2</text:span><text:span text:style-name="T10">"</text:span><text:span text:style-name="T17">&gt;</text:span></text:p>
      <text:p text:style-name="P18"><text:span text:style-name="T17">&lt;</text:span><text:span text:style-name="T9">a</text:span><text:span text:style-name="T17"> </text:span><text:span text:style-name="T18">class</text:span><text:span text:style-name="T10">="</text:span><text:span text:style-name="T16">navbar-brand</text:span><text:span text:style-name="T10">"</text:span><text:span text:style-name="T17"> </text:span><text:span text:style-name="T18">href</text:span><text:span text:style-name="T10">="</text:span><text:span text:style-name="T16">/</text:span><text:span text:style-name="T10">"</text:span><text:span text:style-name="T17">&gt;&lt;</text:span><text:span text:style-name="T9">img</text:span><text:span text:style-name="T17"> </text:span><text:span text:style-name="T18">src</text:span><text:span text:style-name="T10">="</text:span><text:span text:style-name="T16">/app/images/home.png</text:span><text:span text:style-name="T10">"</text:span><text:span text:style-name="T17"> </text:span><text:span text:style-name="T18">alt</text:span><text:span text:style-name="T10">="</text:span><text:span text:style-name="T16">Home</text:span><text:span text:style-name="T10">"</text:span><text:span text:style-name="T17">&gt;&lt;/</text:span><text:span text:style-name="T9">a</text:span><text:span text:style-name="T17">&gt;</text:span></text:p>
      <text:p text:style-name="P18"><text:span text:style-name="T17">&lt;</text:span><text:span text:style-name="T9">button</text:span><text:span text:style-name="T17"> </text:span><text:span text:style-name="T18">class</text:span><text:span text:style-name="T10">="</text:span><text:span text:style-name="T16">btn btn-primary bi bi-arrow-left-circle fs-5</text:span><text:span text:style-name="T10">"</text:span><text:span text:style-name="T17"> </text:span><text:span text:style-name="T18">onclick</text:span><text:span text:style-name="T10">="</text:span><text:span text:style-name="T14">history</text:span><text:span text:style-name="T10">.</text:span><text:span text:style-name="T15">back</text:span><text:span text:style-name="T16">()</text:span><text:span text:style-name="T10">"</text:span><text:span text:style-name="T17">&gt;&lt;/</text:span><text:span text:style-name="T9">button</text:span><text:span text:style-name="T17">&gt;</text:span></text:p>
      <text:p text:style-name="P18"><text:span text:style-name="T17">&lt;/</text:span><text:span text:style-name="T9">div</text:span><text:span text:style-name="T17">&gt;</text:span></text:p>
      <text:p text:style-name="P17"/>
      <text:p text:style-name="P18"><text:span text:style-name="T17">&lt;</text:span><text:span text:style-name="T9">div</text:span><text:span text:style-name="T17"> </text:span><text:span text:style-name="T18">class</text:span><text:span text:style-name="T10">="</text:span><text:span text:style-name="T16">ms-auto</text:span><text:span text:style-name="T10">"</text:span><text:span text:style-name="T17">&gt;</text:span></text:p>
      <text:p text:style-name="P18"><text:span text:style-name="T17">&lt;</text:span><text:span text:style-name="T9">a</text:span><text:span text:style-name="T17"> </text:span><text:span text:style-name="T18">href</text:span><text:span text:style-name="T10">="</text:span><text:span text:style-name="T16">/article/{$articleId}</text:span><text:span text:style-name="T10">"</text:span><text:span text:style-name="T17"> </text:span><text:span text:style-name="T18">class</text:span><text:span text:style-name="T10">="</text:span><text:span text:style-name="T16">btn btn-secondary fs-5</text:span><text:span text:style-name="T10">"</text:span><text:span text:style-name="T17">&gt;</text:span>Retour à l'article<text:span text:style-name="T17">&lt;/</text:span><text:span text:style-name="T9">a</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9">/block</text:span>}</text:p>
      <text:p text:style-name="P17"/>
      <text:p text:style-name="P18">{<text:span text:style-name="T9">block </text:span>content}</text:p>
      <text:p text:style-name="P18"><text:span text:style-name="T17">&lt;</text:span><text:span text:style-name="T9">div</text:span><text:span text:style-name="T17"> </text:span><text:span text:style-name="T18">class</text:span><text:span text:style-name="T10">="</text:span><text:span text:style-name="T16">container-fluid</text:span><text:span text:style-name="T10">"</text:span><text:span text:style-name="T17">&gt;</text:span></text:p>
      <text:p text:style-name="P18"><text:span text:style-name="T17">&lt;</text:span><text:span text:style-name="T9">h1</text:span><text:span text:style-name="T17">&gt;</text:span>Résultats du sondage<text:span text:style-name="T17">&lt;/</text:span><text:span text:style-name="T9">h1</text:span><text:span text:style-name="T17">&gt;</text:span></text:p>
      <text:p text:style-name="P18"><text:span text:style-name="T17">&lt;</text:span><text:span text:style-name="T9">div</text:span><text:span text:style-name="T17"> </text:span><text:span text:style-name="T18">class</text:span><text:span text:style-name="T10">="</text:span><text:span text:style-name="T16">card mb-4</text:span><text:span text:style-name="T10">"</text:span><text:span text:style-name="T17">&gt;</text:span></text:p>
      <text:p text:style-name="P18"><text:span text:style-name="T17">&lt;</text:span><text:span text:style-name="T9">div</text:span><text:span text:style-name="T17"> </text:span><text:span text:style-name="T18">class</text:span><text:span text:style-name="T10">="</text:span><text:span text:style-name="T16">card-body</text:span><text:span text:style-name="T10">"</text:span><text:span text:style-name="T17">&gt;</text:span></text:p>
      <text:p text:style-name="P18"><text:span text:style-name="T17">&lt;</text:span><text:span text:style-name="T9">h2</text:span><text:span text:style-name="T17"> </text:span><text:span text:style-name="T18">class</text:span><text:span text:style-name="T10">="</text:span><text:span text:style-name="T16">card-title</text:span><text:span text:style-name="T10">"</text:span><text:span text:style-name="T17">&gt;</text:span>{<text:span text:style-name="T14">$survey</text:span><text:span text:style-name="T10">-&gt;</text:span>Question}<text:span text:style-name="T17">&lt;/</text:span><text:span text:style-name="T9">h2</text:span><text:span text:style-name="T17">&gt;</text:span></text:p>
      <text:p text:style-name="P18"><text:span text:style-name="T17">&lt;</text:span><text:span text:style-name="T9">div</text:span><text:span text:style-name="T17"> </text:span><text:span text:style-name="T18">class</text:span><text:span text:style-name="T10">="</text:span><text:span text:style-name="T16">mt-4</text:span><text:span text:style-name="T10">"</text:span><text:span text:style-name="T17">&gt;</text:span></text:p>
      <text:p text:style-name="P18"><text:span text:style-name="T17">&lt;</text:span><text:span text:style-name="T9">h3</text:span><text:span text:style-name="T17">&gt;</text:span>Résultats:<text:span text:style-name="T17">&lt;/</text:span><text:span text:style-name="T9">h3</text:span><text:span text:style-name="T17">&gt;</text:span></text:p>
      <text:p text:style-name="P18"><text:span text:style-name="T17">&lt;</text:span><text:span text:style-name="T9">div</text:span><text:span text:style-name="T17"> </text:span><text:span text:style-name="T18">class</text:span><text:span text:style-name="T10">="</text:span><text:span text:style-name="T16">list-group</text:span><text:span text:style-name="T10">"</text:span><text:span text:style-name="T17">&gt;</text:span></text:p>
      <text:p text:style-name="P18">{<text:span text:style-name="T9">if </text:span>count(<text:span text:style-name="T14">$participants</text:span>) &gt; <text:span text:style-name="T11">0</text:span> }</text:p>
      <text:p text:style-name="P18">{<text:span text:style-name="T9">foreach </text:span><text:span text:style-name="T14">$options </text:span><text:span text:style-name="T10">as </text:span><text:span text:style-name="T14">$option</text:span>}</text:p>
      <text:p text:style-name="P18"><text:span text:style-name="T17">&lt;</text:span><text:span text:style-name="T9">div</text:span><text:span text:style-name="T17"> </text:span><text:span text:style-name="T18">class</text:span><text:span text:style-name="T10">="</text:span><text:span text:style-name="T16">list-group-item</text:span><text:span text:style-name="T10">"</text:span><text:span text:style-name="T17">&gt;</text:span></text:p>
      <text:p text:style-name="P18"><text:span text:style-name="T17">&lt;</text:span><text:span text:style-name="T9">div</text:span><text:span text:style-name="T17"> </text:span><text:span text:style-name="T18">class</text:span><text:span text:style-name="T10">="</text:span><text:span text:style-name="T16">d-flex justify-content-between align-items-center</text:span><text:span text:style-name="T10">"</text:span><text:span text:style-name="T17">&gt;</text:span></text:p>
      <text:p text:style-name="P18"><text:span text:style-name="T17">&lt;</text:span><text:span text:style-name="T9">span</text:span><text:span text:style-name="T17">&gt;</text:span>{<text:span text:style-name="T14">$option</text:span>}<text:span text:style-name="T17">&lt;/</text:span><text:span text:style-name="T9">span</text:span><text:span text:style-name="T17">&gt;</text:span></text:p>
      <text:p text:style-name="P18"><text:span text:style-name="T17">&lt;</text:span><text:span text:style-name="T9">span</text:span><text:span text:style-name="T17"> </text:span><text:span text:style-name="T18">class</text:span><text:span text:style-name="T10">="</text:span><text:span text:style-name="T16">badge bg-primary rounded-pill</text:span><text:span text:style-name="T10">"</text:span><text:span text:style-name="T17">&gt;</text:span>{<text:span text:style-name="T14">$results</text:span>[<text:span text:style-name="T14">$option</text:span>]}<text:span text:style-name="T17">&lt;/</text:span><text:span text:style-name="T9">span</text:span><text:span text:style-name="T17">&gt;</text:span></text:p>
      <text:p text:style-name="P18"><text:span text:style-name="T17">&lt;/</text:span><text:span text:style-name="T9">div</text:span><text:span text:style-name="T17">&gt;</text:span></text:p>
      <text:p text:style-name="P18">{<text:span text:style-name="T9">var </text:span><text:span text:style-name="T14">$percentage </text:span>= <text:span text:style-name="T14">$results</text:span>[<text:span text:style-name="T14">$option</text:span>] <text:span text:style-name="T10">/ </text:span>count(<text:span text:style-name="T14">$participants</text:span>) * <text:span text:style-name="T11">100</text:span>}</text:p>
      <text:p text:style-name="P18"><text:span text:style-name="T17">&lt;</text:span><text:span text:style-name="T9">div</text:span><text:span text:style-name="T17"> </text:span><text:span text:style-name="T18">class</text:span><text:span text:style-name="T10">="</text:span><text:span text:style-name="T16">progress mt-2</text:span><text:span text:style-name="T10">"</text:span><text:span text:style-name="T17">&gt;</text:span></text:p>
      <text:p text:style-name="P18"><text:span text:style-name="T17">&lt;</text:span><text:span text:style-name="T9">div</text:span><text:span text:style-name="T17"> </text:span><text:span text:style-name="T18">class</text:span><text:span text:style-name="T10">="</text:span><text:span text:style-name="T16">progress-bar</text:span><text:span text:style-name="T10">"</text:span><text:span text:style-name="T17"> </text:span><text:span text:style-name="T18">role</text:span><text:span text:style-name="T10">="</text:span><text:span text:style-name="T16">progressbar</text:span><text:span text:style-name="T10">"</text:span><text:span text:style-name="T17"> </text:span><text:span text:style-name="T18">style</text:span><text:span text:style-name="T10">="</text:span><text:span text:style-name="T16">width: {$percentage|number}%;</text:span><text:span text:style-name="T10">"</text:span><text:span text:style-name="T17"> </text:span></text:p>
      <text:p text:style-name="P18"><text:span text:style-name="T18">aria-valuenow</text:span><text:span text:style-name="T10">="</text:span><text:span text:style-name="T16">{$percentage|number}</text:span><text:span text:style-name="T10">"</text:span><text:span text:style-name="T17"> </text:span></text:p>
      <text:p text:style-name="P18"><text:span text:style-name="T18">aria-valuemin</text:span><text:span text:style-name="T10">="</text:span><text:span text:style-name="T16">0</text:span><text:span text:style-name="T10">"</text:span><text:span text:style-name="T17"> </text:span></text:p>
      <text:p text:style-name="P18"><text:span text:style-name="T18">aria-valuemax</text:span><text:span text:style-name="T10">="</text:span><text:span text:style-name="T16">100</text:span><text:span text:style-name="T10">"</text:span><text:span text:style-name="T17">&gt;</text:span></text:p>
      <text:p text:style-name="P18">{number_format(<text:span text:style-name="T14">$percentage</text:span>, <text:span text:style-name="T11">1</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9">/foreach</text:span>}</text:p>
      <text:p text:style-name="P18">{<text:span text:style-name="T9">else</text:span>} </text:p>
      <text:p text:style-name="P18">Aucun vote</text:p>
      <text:p text:style-name="P18">{<text:span text:style-name="T9">/if</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 </text:span><text:span text:style-name="T18">class</text:span><text:span text:style-name="T10">="</text:span><text:span text:style-name="T16">row mt-4</text:span><text:span text:style-name="T10">"</text:span><text:span text:style-name="T17">&gt;</text:span></text:p>
      <text:p text:style-name="P18"><text:span text:style-name="T17">&lt;</text:span><text:span text:style-name="T9">div</text:span><text:span text:style-name="T17"> </text:span><text:span text:style-name="T18">class</text:span><text:span text:style-name="T10">="</text:span><text:span text:style-name="T16">col-md-4</text:span><text:span text:style-name="T10">"</text:span><text:span text:style-name="T17">&gt;</text:span></text:p>
      <text:p text:style-name="P18"><text:span text:style-name="T17">&lt;</text:span><text:span text:style-name="T9">h3</text:span><text:span text:style-name="T17">&gt;</text:span>Votants ({count(<text:span text:style-name="T14">$participants</text:span>)})<text:span text:style-name="T17">&lt;/</text:span><text:span text:style-name="T9">h3</text:span><text:span text:style-name="T17">&gt;</text:span></text:p>
      <text:p text:style-name="P18"><text:span text:style-name="T17">&lt;</text:span><text:span text:style-name="T9">ul</text:span><text:span text:style-name="T17"> </text:span><text:span text:style-name="T18">class</text:span><text:span text:style-name="T10">="</text:span><text:span text:style-name="T16">list-group</text:span><text:span text:style-name="T10">"</text:span><text:span text:style-name="T17">&gt;</text:span></text:p>
      <text:p text:style-name="P18">{<text:span text:style-name="T9">foreach </text:span><text:span text:style-name="T14">$participants </text:span><text:span text:style-name="T10">as </text:span><text:span text:style-name="T14">$participant</text:span>}</text:p>
      <text:p text:style-name="P18"><text:span text:style-name="T17">&lt;</text:span><text:span text:style-name="T9">li</text:span><text:span text:style-name="T17"> </text:span><text:span text:style-name="T18">class</text:span><text:span text:style-name="T10">="</text:span><text:span text:style-name="T16">list-group-item</text:span><text:span text:style-name="T10">"</text:span><text:span text:style-name="T17">&gt;</text:span></text:p>
      <text:p text:style-name="P18"><text:span text:style-name="T17">&lt;</text:span><text:span text:style-name="T9">strong</text:span><text:span text:style-name="T17">&gt;</text:span>{<text:span text:style-name="T14">$participant</text:span>[<text:span text:style-name="T16">'name'</text:span>]}<text:span text:style-name="T17">&lt;/</text:span><text:span text:style-name="T9">strong</text:span><text:span text:style-name="T17">&gt;</text:span>: </text:p>
      <text:p text:style-name="P18">{<text:span text:style-name="T9">foreach </text:span><text:span text:style-name="T14">$participant</text:span>[<text:span text:style-name="T16">'answers'</text:span>] <text:span text:style-name="T10">as </text:span><text:span text:style-name="T14">$answer</text:span>}</text:p>
      <text:p text:style-name="P18"><text:span text:style-name="T17">&lt;</text:span><text:span text:style-name="T9">span</text:span><text:span text:style-name="T17"> </text:span><text:span text:style-name="T18">class</text:span><text:span text:style-name="T10">="</text:span><text:span text:style-name="T16">badge bg-info</text:span><text:span text:style-name="T10">"</text:span><text:span text:style-name="T17">&gt;</text:span>{<text:span text:style-name="T14">$answer</text:span>}<text:span text:style-name="T17">&lt;/</text:span><text:span text:style-name="T9">span</text:span><text:span text:style-name="T17">&gt;</text:span></text:p>
      <text:p text:style-name="P18">{<text:span text:style-name="T9">/foreach</text:span>}</text:p>
      <text:p text:style-name="P18"><text:soft-page-break/><text:span text:style-name="T17">&lt;/</text:span><text:span text:style-name="T9">li</text:span><text:span text:style-name="T17">&gt;</text:span></text:p>
      <text:p text:style-name="P18">{<text:span text:style-name="T9">/foreach</text:span>}</text:p>
      <text:p text:style-name="P18"><text:span text:style-name="T17">&lt;/</text:span><text:span text:style-name="T9">ul</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 </text:span><text:span text:style-name="T18">class</text:span><text:span text:style-name="T10">="</text:span><text:span text:style-name="T16">col-md-8</text:span><text:span text:style-name="T10">"</text:span><text:span text:style-name="T17">&gt;</text:span></text:p>
      <text:p text:style-name="P18"><text:span text:style-name="T17">&lt;</text:span><text:span text:style-name="T9">h3</text:span><text:span text:style-name="T17"> </text:span><text:span text:style-name="T18">class</text:span><text:span text:style-name="T10">="</text:span><text:span text:style-name="T16">text-center p-2 mb-3</text:span><text:span text:style-name="T10">"</text:span><text:span text:style-name="T17"> </text:span><text:span text:style-name="T18">style</text:span><text:span text:style-name="T10">="</text:span><text:span text:style-name="T16">background-color: #f8f9fa;</text:span><text:span text:style-name="T10">"</text:span><text:span text:style-name="T17">&gt;</text:span>Tableau des votants par option<text:span text:style-name="T17">&lt;/</text:span><text:span text:style-name="T9">h3</text:span><text:span text:style-name="T17">&gt;</text:span></text:p>
      <text:p text:style-name="P18"><text:span text:style-name="T17">&lt;</text:span><text:span text:style-name="T9">div</text:span><text:span text:style-name="T17"> </text:span><text:span text:style-name="T18">class</text:span><text:span text:style-name="T10">="</text:span><text:span text:style-name="T16">table-responsive</text:span><text:span text:style-name="T10">"</text:span><text:span text:style-name="T17">&gt;</text:span></text:p>
      <text:p text:style-name="P18"><text:span text:style-name="T17">&lt;</text:span><text:span text:style-name="T9">table</text:span><text:span text:style-name="T17"> </text:span><text:span text:style-name="T18">class</text:span><text:span text:style-name="T10">="</text:span><text:span text:style-name="T16">table table-bordered</text:span><text:span text:style-name="T10">"</text:span><text:span text:style-name="T17">&gt;</text:span></text:p>
      <text:p text:style-name="P18"><text:span text:style-name="T17">&lt;</text:span><text:span text:style-name="T9">thead</text:span><text:span text:style-name="T17">&gt;</text:span></text:p>
      <text:p text:style-name="P18"><text:span text:style-name="T17">&lt;</text:span><text:span text:style-name="T9">tr</text:span><text:span text:style-name="T17">&gt;</text:span></text:p>
      <text:p text:style-name="P18">{<text:span text:style-name="T9">foreach </text:span><text:span text:style-name="T14">$options </text:span><text:span text:style-name="T10">as </text:span><text:span text:style-name="T14">$option</text:span>}</text:p>
      <text:p text:style-name="P18"><text:span text:style-name="T17">&lt;</text:span><text:span text:style-name="T9">th</text:span><text:span text:style-name="T17"> </text:span><text:span text:style-name="T18">class</text:span><text:span text:style-name="T10">="</text:span><text:span text:style-name="T16">text-center</text:span><text:span text:style-name="T10">"</text:span><text:span text:style-name="T17">&gt;</text:span>{<text:span text:style-name="T14">$option</text:span>}<text:span text:style-name="T17">&lt;/</text:span><text:span text:style-name="T9">th</text:span><text:span text:style-name="T17">&gt;</text:span></text:p>
      <text:p text:style-name="P18">{<text:span text:style-name="T9">/foreach</text:span>}</text:p>
      <text:p text:style-name="P18"><text:span text:style-name="T17">&lt;/</text:span><text:span text:style-name="T9">tr</text:span><text:span text:style-name="T17">&gt;</text:span></text:p>
      <text:p text:style-name="P18"><text:span text:style-name="T17">&lt;/</text:span><text:span text:style-name="T9">thead</text:span><text:span text:style-name="T17">&gt;</text:span></text:p>
      <text:p text:style-name="P18"><text:span text:style-name="T17">&lt;</text:span><text:span text:style-name="T9">tbody</text:span><text:span text:style-name="T17">&gt;</text:span></text:p>
      <text:p text:style-name="P18"><text:span text:style-name="T17">&lt;</text:span><text:span text:style-name="T9">tr</text:span><text:span text:style-name="T17">&gt;</text:span></text:p>
      <text:p text:style-name="P18">{<text:span text:style-name="T9">foreach </text:span><text:span text:style-name="T14">$options </text:span><text:span text:style-name="T10">as </text:span><text:span text:style-name="T14">$option</text:span>}</text:p>
      <text:p text:style-name="P18"><text:span text:style-name="T17">&lt;</text:span><text:span text:style-name="T9">td</text:span><text:span text:style-name="T17"> </text:span><text:span text:style-name="T18">class</text:span><text:span text:style-name="T10">="</text:span><text:span text:style-name="T16">align-top</text:span><text:span text:style-name="T10">"</text:span><text:span text:style-name="T17">&gt;</text:span></text:p>
      <text:p text:style-name="P18"><text:span text:style-name="T17">&lt;</text:span><text:span text:style-name="T9">ul</text:span><text:span text:style-name="T17"> </text:span><text:span text:style-name="T18">class</text:span><text:span text:style-name="T10">="</text:span><text:span text:style-name="T16">list-unstyled mb-0</text:span><text:span text:style-name="T10">"</text:span><text:span text:style-name="T17">&gt;</text:span></text:p>
      <text:p text:style-name="P18">{<text:span text:style-name="T9">foreach </text:span><text:span text:style-name="T14">$participants </text:span><text:span text:style-name="T10">as </text:span><text:span text:style-name="T14">$participant</text:span>}</text:p>
      <text:p text:style-name="P18">{<text:span text:style-name="T9">if </text:span>in_array(<text:span text:style-name="T14">$option</text:span>, <text:span text:style-name="T14">$participant</text:span>[<text:span text:style-name="T16">'answers'</text:span>])}</text:p>
      <text:p text:style-name="P18"><text:span text:style-name="T17">&lt;</text:span><text:span text:style-name="T9">li</text:span><text:span text:style-name="T17">&gt;</text:span>{<text:span text:style-name="T14">$participant</text:span>[<text:span text:style-name="T16">'name'</text:span>]}<text:span text:style-name="T17">&lt;/</text:span><text:span text:style-name="T9">li</text:span><text:span text:style-name="T17">&gt;</text:span></text:p>
      <text:p text:style-name="P18">{<text:span text:style-name="T9">/if</text:span>}</text:p>
      <text:p text:style-name="P18">{<text:span text:style-name="T9">/foreach</text:span>}</text:p>
      <text:p text:style-name="P18"><text:span text:style-name="T17">&lt;/</text:span><text:span text:style-name="T9">ul</text:span><text:span text:style-name="T17">&gt;</text:span></text:p>
      <text:p text:style-name="P18"><text:span text:style-name="T17">&lt;/</text:span><text:span text:style-name="T9">td</text:span><text:span text:style-name="T17">&gt;</text:span></text:p>
      <text:p text:style-name="P18">{<text:span text:style-name="T9">/foreach</text:span>}</text:p>
      <text:p text:style-name="P18"><text:span text:style-name="T17">&lt;/</text:span><text:span text:style-name="T9">tr</text:span><text:span text:style-name="T17">&gt;</text:span></text:p>
      <text:p text:style-name="P18"><text:span text:style-name="T17">&lt;/</text:span><text:span text:style-name="T9">tbody</text:span><text:span text:style-name="T17">&gt;</text:span></text:p>
      <text:p text:style-name="P18"><text:span text:style-name="T17">&lt;/</text:span><text:span text:style-name="T9">table</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17">&lt;/</text:span><text:span text:style-name="T9">div</text:span><text:span text:style-name="T17">&gt;</text:span></text:p>
      <text:p text:style-name="P18">{<text:span text:style-name="T9">/block</text:span>}</text:p>
      <text:p text:style-name="P47"><text:line-break/><text:line-break/><text:span text:style-name="T43">avec ces tables<text:line-break/>CREATE TABLE "Order" (</text:span></text:p>
      <text:p text:style-name="P47"><text:tab/>"Id"<text:tab/>INTEGER,</text:p>
      <text:p text:style-name="P47"><text:tab/>"Question"<text:tab/>TEXT NOT NULL,</text:p>
      <text:p text:style-name="P47"><text:tab/>"Options"<text:tab/>TEXT NOT NULL,</text:p>
      <text:p text:style-name="P47"><text:tab/>"IdArticle"<text:tab/>INTEGER NOT NULL,</text:p>
      <text:p text:style-name="P47"><text:tab/>"ClosingDate"<text:tab/>TEXT NOT NULL,</text:p>
      <text:p text:style-name="P47"><text:tab/>"Visibility"<text:tab/>TEXT NOT NULL,</text:p>
      <text:p text:style-name="P47"><text:tab/>PRIMARY KEY("Id"),</text:p>
      <text:p text:style-name="P47"><text:soft-page-break/><text:tab/>FOREIGN KEY("IdArticle") REFERENCES "Article"("Id")</text:p>
      <text:p text:style-name="P47">);<text:line-break/>CREATE TABLE "OrderReply" (</text:p>
      <text:p text:style-name="P47"><text:tab/>"Id"<text:tab/>INTEGER,</text:p>
      <text:p text:style-name="P47"><text:tab/>"IdPerson"<text:tab/>INTEGER NOT NULL,</text:p>
      <text:p text:style-name="P47"><text:tab/>"IdOrder"<text:tab/>INTEGER NOT NULL,</text:p>
      <text:p text:style-name="P47"><text:tab/>"Answers"<text:tab/>TEXT NOT NULL,</text:p>
      <text:p text:style-name="P47"><text:tab/>"LastUpdate"<text:tab/>TEXT NOT NULL,</text:p>
      <text:p text:style-name="P47"><text:tab/>PRIMARY KEY("Id"),</text:p>
      <text:p text:style-name="P47"><text:tab/>FOREIGN KEY("IdOrder") REFERENCES "Order"("Id"),</text:p>
      <text:p text:style-name="P47"><text:tab/>FOREIGN KEY("IdPerson") REFERENCES "Person"("Id")</text:p>
      <text:p text:style-name="P47">);</text:p>
      <text:h text:style-name="P51" text:outline-level="1">Module Chronos</text:h>
      <text:p text:style-name="P52">Création d’un nouveau module pour gérer un ensemble d’exercices.</text:p>
      <text:p text:style-name="P52">Pour chaque exercice il y a une préparation et l’exercice.</text:p>
      <text:p text:style-name="P52">Pour la préparation on veut pouvoir ajouter une image optionelle, un son optionnel, un titre + un texte pour définir l’exercice, une durée d’affichage de la présentation initialisé avec le durée du fichier son s’il est présent. Une durée à 0 implique d’appuyer sur l’écrran pour passer à l’exercice.</text:p>
      <text:p text:style-name="P52">Pour l’exercice on précise uniquement sa durée. Dans cette phase un décompte apparaît en plein écran indiquant le temps restant. Des beeps courts indique le nombre de minutes restantes lorsqu’il en reste moins de 5. Des beeps longs indique le nombre de dizaines de minutes restantes quand il y en a moins de 60.</text:p>
      <text:p text:style-name="P52">Les fichiers images et sons sont ajouter à la médiathèque avec l’api</text:p>
      <text:p text:style-name="P53">&lt;?php</text:p>
      <text:p text:style-name="P17"/>
      <text:p text:style-name="P18"><text:span text:style-name="T9">declare</text:span><text:span text:style-name="T10">(</text:span><text:span text:style-name="T11">strict_types</text:span><text:span text:style-name="T10">=</text:span><text:span text:style-name="T11">1</text:span><text:span text:style-name="T10">);</text:span></text:p>
      <text:p text:style-name="P17"/>
      <text:p text:style-name="P18"><text:span text:style-name="T9">namespace</text:span> <text:span text:style-name="T12">app</text:span><text:span text:style-name="T13">\</text:span><text:span text:style-name="T12">config</text:span><text:span text:style-name="T13">\</text:span><text:span text:style-name="T12">routes</text:span><text:span text:style-name="T10">;</text:span></text:p>
      <text:p text:style-name="P17"/>
      <text:p text:style-name="P18"><text:span text:style-name="T9">use</text:span> app<text:span text:style-name="T10">\</text:span>config<text:span text:style-name="T10">\</text:span><text:span text:style-name="T12">ApiFactory</text:span><text:span text:style-name="T10">;</text:span></text:p>
      <text:p text:style-name="P18"><text:span text:style-name="T9">use</text:span> app<text:span text:style-name="T10">\</text:span>interfaces<text:span text:style-name="T10">\</text:span><text:span text:style-name="T12">RouteInterface</text:span><text:span text:style-name="T10">;</text:span></text:p>
      <text:p text:style-name="P18"><text:span text:style-name="T9">use</text:span> app<text:span text:style-name="T10">\</text:span>valueObjects<text:span text:style-name="T10">\</text:span><text:span text:style-name="T12">Route</text:span><text:span text:style-name="T10">;</text:span></text:p>
      <text:p text:style-name="P17"/>
      <text:p text:style-name="P18"><text:span text:style-name="T14">class</text:span> <text:span text:style-name="T12">MediaApi</text:span> <text:span text:style-name="T9">implements</text:span> <text:span text:style-name="T12">RouteInterface</text:span></text:p>
      <text:p text:style-name="P19">{</text:p>
      <text:p text:style-name="P18"><text:span text:style-name="T9">private</text:span> <text:span text:style-name="T9">array</text:span> <text:span text:style-name="T10">$</text:span><text:span text:style-name="T14">routes</text:span> <text:span text:style-name="T10">=</text:span> <text:span text:style-name="T10">[];</text:span></text:p>
      <text:p text:style-name="P17"/>
      <text:p text:style-name="P18"><text:span text:style-name="T9">public</text:span> <text:span text:style-name="T14">function</text:span> <text:span text:style-name="T15">__construct</text:span><text:span text:style-name="T10">(</text:span><text:span text:style-name="T9">private</text:span> <text:span text:style-name="T12">ApiFactory</text:span> <text:span text:style-name="T10">$</text:span><text:span text:style-name="T14">apiFactory</text:span><text:span text:style-name="T10">)</text:span> <text:span text:style-name="T10">{}</text:span></text:p>
      <text:p text:style-name="P17"/>
      <text:p text:style-name="P18"><text:span text:style-name="T9">public</text:span> <text:span text:style-name="T14">function</text:span> <text:span text:style-name="T15">get</text:span><text:span text:style-name="T10">():</text:span> <text:span text:style-name="T9">array</text:span></text:p>
      <text:p text:style-name="P19">{</text:p>
      <text:p text:style-name="P18"><text:span text:style-name="T10">$</text:span><text:span text:style-name="T14">mediaApi</text:span> <text:span text:style-name="T10">=</text:span> <text:span text:style-name="T14">fn</text:span><text:span text:style-name="T10">()</text:span> <text:span text:style-name="T10">=&gt;</text:span> <text:span text:style-name="T10">$</text:span><text:span text:style-name="T11">this</text:span><text:span text:style-name="T10">-&gt;</text:span><text:span text:style-name="T14">apiFactory</text:span><text:span text:style-name="T10">-&gt;</text:span><text:span text:style-name="T15">makeMediaApi</text:span><text:span text:style-name="T10">();</text:span></text:p>
      <text:p text:style-name="P17"/>
      <text:p text:style-name="P18"><text:soft-page-break/><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api/media/delete/@year:[0-9]+/@month:[0-9]+/@filename</text:span><text:span text:style-name="T10">',</text:span> <text:span text:style-name="T10">$</text:span><text:span text:style-name="T14">mediaApi</text:span><text:span text:style-name="T10">,</text:span> <text:span text:style-name="T10">'</text:span><text:span text:style-name="T16">deleteFile</text:span><text:span text:style-name="T10">');</text:span></text:p>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GET /api/media/isShared</text:span><text:span text:style-name="T10">',</text:span> <text:span text:style-name="T10">$</text:span><text:span text:style-name="T14">mediaApi</text:span><text:span text:style-name="T10">,</text:span> <text:span text:style-name="T10">'</text:span><text:span text:style-name="T16">isShared</text:span><text:span text:style-name="T10">');</text:span></text:p>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api/media/removeShare</text:span><text:span text:style-name="T10">',</text:span> <text:span text:style-name="T10">$</text:span><text:span text:style-name="T14">mediaApi</text:span><text:span text:style-name="T10">,</text:span> <text:span text:style-name="T10">'</text:span><text:span text:style-name="T16">removeFileShare</text:span><text:span text:style-name="T10">');</text:span></text:p>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api/media/shareFile</text:span><text:span text:style-name="T10">',</text:span> <text:span text:style-name="T10">$</text:span><text:span text:style-name="T14">mediaApi</text:span><text:span text:style-name="T10">,</text:span> <text:span text:style-name="T10">'</text:span><text:span text:style-name="T16">shareFile</text:span><text:span text:style-name="T10">');</text:span></text:p>
      <text:p text:style-name="P18"><text:span text:style-name="T10">$</text:span><text:span text:style-name="T11">this</text:span><text:span text:style-name="T10">-&gt;</text:span><text:span text:style-name="T14">routes</text:span><text:span text:style-name="T10">[]</text:span> <text:span text:style-name="T10">=</text:span> <text:span text:style-name="T9">new</text:span> <text:span text:style-name="T12">Route</text:span><text:span text:style-name="T10">('</text:span><text:span text:style-name="T16">POST /api/media/upload</text:span><text:span text:style-name="T10">',</text:span> <text:span text:style-name="T10">$</text:span><text:span text:style-name="T14">mediaApi</text:span><text:span text:style-name="T10">,</text:span> <text:span text:style-name="T10">'</text:span><text:span text:style-name="T16">uploadFile</text:span><text:span text:style-name="T10">');</text:span></text:p>
      <text:p text:style-name="P17"/>
      <text:p text:style-name="P18"><text:span text:style-name="T9">return</text:span> <text:span text:style-name="T10">$</text:span><text:span text:style-name="T11">this</text:span><text:span text:style-name="T10">-&gt;</text:span><text:span text:style-name="T14">routes</text:span><text:span text:style-name="T10">;</text:span></text:p>
      <text:p text:style-name="P19">}</text:p>
      <text:p text:style-name="P19">}</text:p>
      <text:p text:style-name="P52">=================================</text:p>
      <text:p text:style-name="P53">&lt;?php</text:p>
      <text:p text:style-name="P17"/>
      <text:p text:style-name="P18"><text:span text:style-name="T9">declare</text:span><text:span text:style-name="T10">(</text:span><text:span text:style-name="T11">strict_types</text:span><text:span text:style-name="T10">=</text:span><text:span text:style-name="T11">1</text:span><text:span text:style-name="T10">);</text:span></text:p>
      <text:p text:style-name="P17"/>
      <text:p text:style-name="P18"><text:span text:style-name="T9">namespace</text:span> <text:span text:style-name="T12">app</text:span><text:span text:style-name="T13">\</text:span><text:span text:style-name="T12">apis</text:span><text:span text:style-name="T10">;</text:span></text:p>
      <text:p text:style-name="P17"/>
      <text:p text:style-name="P18"><text:span text:style-name="T9">use</text:span> <text:span text:style-name="T12">Throwable</text:span><text:span text:style-name="T10">;</text:span></text:p>
      <text:p text:style-name="P17"/>
      <text:p text:style-name="P18"><text:span text:style-name="T9">use</text:span> app<text:span text:style-name="T10">\</text:span>enums<text:span text:style-name="T10">\</text:span><text:span text:style-name="T12">ApplicationError</text:span><text:span text:style-name="T10">;</text:span></text:p>
      <text:p text:style-name="P18"><text:span text:style-name="T9">use</text:span> app<text:span text:style-name="T10">\</text:span>helpers<text:span text:style-name="T10">\</text:span><text:span text:style-name="T12">Application</text:span><text:span text:style-name="T10">;</text:span></text:p>
      <text:p text:style-name="P18"><text:span text:style-name="T9">use</text:span> app<text:span text:style-name="T10">\</text:span>helpers<text:span text:style-name="T10">\</text:span><text:span text:style-name="T12">ConnectedUser</text:span><text:span text:style-name="T10">;</text:span></text:p>
      <text:p text:style-name="P18"><text:span text:style-name="T9">use</text:span> app<text:span text:style-name="T10">\</text:span>helpers<text:span text:style-name="T10">\</text:span><text:span text:style-name="T12">MediaManager</text:span><text:span text:style-name="T10">;</text:span></text:p>
      <text:p text:style-name="P18"><text:span text:style-name="T9">use</text:span> app<text:span text:style-name="T10">\</text:span>helpers<text:span text:style-name="T10">\</text:span><text:span text:style-name="T12">WebApp</text:span><text:span text:style-name="T10">;</text:span></text:p>
      <text:p text:style-name="P18"><text:span text:style-name="T9">use</text:span> app<text:span text:style-name="T10">\</text:span>models<text:span text:style-name="T10">\</text:span><text:span text:style-name="T12">DataHelper</text:span><text:span text:style-name="T10">;</text:span></text:p>
      <text:p text:style-name="P18"><text:span text:style-name="T9">use</text:span> app<text:span text:style-name="T10">\</text:span>models<text:span text:style-name="T10">\</text:span><text:span text:style-name="T12">PersonDataHelper</text:span><text:span text:style-name="T10">;</text:span></text:p>
      <text:p text:style-name="P17"/>
      <text:p text:style-name="P18"><text:span text:style-name="T14">class</text:span> <text:span text:style-name="T12">MediaApi</text:span> <text:span text:style-name="T9">extends</text:span> <text:span text:style-name="T12">AbstractApi</text:span></text:p>
      <text:p text:style-name="P19">{</text:p>
      <text:p text:style-name="P17"/>
      <text:p text:style-name="P18"><text:span text:style-name="T9">public</text:span> <text:span text:style-name="T14">function</text:span> <text:span text:style-name="T15">__construct</text:span><text:span text:style-name="T10">(</text:span></text:p>
      <text:p text:style-name="P18"><text:span text:style-name="T12">Application</text:span> <text:span text:style-name="T10">$</text:span><text:span text:style-name="T14">application</text:span><text:span text:style-name="T10">,</text:span></text:p>
      <text:p text:style-name="P18"><text:span text:style-name="T12">ConnectedUser</text:span> <text:span text:style-name="T10">$</text:span><text:span text:style-name="T14">connectedUser</text:span><text:span text:style-name="T10">,</text:span></text:p>
      <text:p text:style-name="P18"><text:span text:style-name="T12">DataHelper</text:span> <text:span text:style-name="T10">$</text:span><text:span text:style-name="T14">dataHelper</text:span><text:span text:style-name="T10">,</text:span></text:p>
      <text:p text:style-name="P18"><text:span text:style-name="T12">PersonDataHelper</text:span> <text:span text:style-name="T10">$</text:span><text:span text:style-name="T14">personDataHelper</text:span><text:span text:style-name="T10">,</text:span></text:p>
      <text:p text:style-name="P18"><text:span text:style-name="T9">private</text:span> <text:span text:style-name="T12">MediaManager</text:span> <text:span text:style-name="T10">$</text:span><text:span text:style-name="T14">mediaManager</text:span></text:p>
      <text:p text:style-name="P18"><text:span text:style-name="T10">)</text:span> <text:span text:style-name="T10">{</text:span></text:p>
      <text:p text:style-name="P18"><text:span text:style-name="T14">parent</text:span><text:span text:style-name="T10">::</text:span><text:span text:style-name="T15">__construct</text:span><text:span text:style-name="T10">($</text:span><text:span text:style-name="T14">application</text:span><text:span text:style-name="T10">,</text:span> <text:span text:style-name="T10">$</text:span><text:span text:style-name="T14">connectedUser</text:span><text:span text:style-name="T10">,</text:span> <text:span text:style-name="T10">$</text:span><text:span text:style-name="T14">dataHelper</text:span><text:span text:style-name="T10">,</text:span> <text:span text:style-name="T10">$</text:span><text:span text:style-name="T14">personDataHelper</text:span><text:span text:style-name="T10">);</text:span></text:p>
      <text:p text:style-name="P19">}</text:p>
      <text:p text:style-name="P17"/>
      <text:p text:style-name="P18"><text:span text:style-name="T9">public</text:span> <text:span text:style-name="T14">function</text:span> <text:span text:style-name="T15">deleteFile</text:span><text:span text:style-name="T10">(</text:span><text:span text:style-name="T9">int</text:span> <text:span text:style-name="T10">$</text:span><text:span text:style-name="T14">year</text:span><text:span text:style-name="T10">,</text:span> <text:span text:style-name="T9">int</text:span> <text:span text:style-name="T10">$</text:span><text:span text:style-name="T14">month</text:span><text:span text:style-name="T10">,</text:span> <text:span text:style-name="T9">string</text:span> <text:span text:style-name="T10">$</text:span><text:span text:style-name="T14">filename</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Redactor</text:span><text:span text:style-name="T10">()))</text:span> <text:span text:style-name="T10">{</text:span></text:p>
      <text:p text:style-name="P18"><text:span text:style-name="T10">$</text:span><text:span text:style-name="T11">this</text:span><text:span text:style-name="T10">-&gt;</text:span><text:span text:style-name="T15">renderJsonOk</text:span><text:span text:style-name="T10">($</text:span><text:span text:style-name="T11">this</text:span><text:span text:style-name="T10">-&gt;</text:span><text:span text:style-name="T14">mediaManager</text:span><text:span text:style-name="T10">-&gt;</text:span><text:span text:style-name="T15">deleteFile</text:span><text:span text:style-name="T10">($</text:span><text:span text:style-name="T14">year</text:span><text:span text:style-name="T10">,</text:span> <text:span text:style-name="T10">$</text:span><text:span text:style-name="T14">month</text:span><text:span text:style-name="T10">,</text:span> <text:span text:style-name="T10">$</text:span><text:span text:style-name="T14">filename</text:span><text:span text:style-name="T10">));</text:span></text:p>
      <text:p text:style-name="P19">}</text:p>
      <text:p text:style-name="P19">}</text:p>
      <text:p text:style-name="P17"/>
      <text:p text:style-name="P18"><text:span text:style-name="T9">public</text:span> <text:span text:style-name="T14">function</text:span> <text:span text:style-name="T15">isShared</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5">userIsAllowedAndMethodIsGood</text:span><text:span text:style-name="T10">('</text:span><text:span text:style-name="T16">GE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Redactor</text:span><text:span text:style-name="T10">()))</text:span> <text:span text:style-name="T10">{</text:span></text:p>
      <text:p text:style-name="P18"><text:span text:style-name="T10">$</text:span><text:span text:style-name="T14">filePath</text:span> <text:span text:style-name="T10">=</text:span> <text:span text:style-name="T15">trim</text:span><text:span text:style-name="T10">($</text:span><text:span text:style-name="T14">_GET</text:span><text:span text:style-name="T10">['</text:span><text:span text:style-name="T16">path</text:span><text:span text:style-name="T10">']</text:span> <text:span text:style-name="T10">??</text:span> <text:span text:style-name="T10">'');</text:span></text:p>
      <text:p text:style-name="P18"><text:span text:style-name="T10">$</text:span><text:span text:style-name="T14">data</text:span><text:span text:style-name="T10">['</text:span><text:span text:style-name="T16">path</text:span><text:span text:style-name="T10">']</text:span> <text:span text:style-name="T10">??</text:span> <text:span text:style-name="T11">null</text:span><text:span text:style-name="T10">;</text:span></text:p>
      <text:p text:style-name="P18"><text:span text:style-name="T9">if</text:span> <text:span text:style-name="T10">(!$</text:span><text:span text:style-name="T14">filePath</text:span><text:span text:style-name="T10">)</text:span> <text:span text:style-name="T10">{</text:span></text:p>
      <text:p text:style-name="P18"><text:span text:style-name="T10">$</text:span><text:span text:style-name="T11">this</text:span><text:span text:style-name="T10">-&gt;</text:span><text:span text:style-name="T15">renderJsonBadRequest</text:span><text:span text:style-name="T10">('</text:span><text:span text:style-name="T16">Fichier manquant</text:span><text:span text:style-name="T10">',</text:span> <text:span text:style-name="T11">__FILE__</text:span><text:span text:style-name="T10">,</text:span> <text:span text:style-name="T11">__LINE__</text:span><text:span text:style-name="T10">);</text:span></text:p>
      <text:p text:style-name="P18"><text:soft-page-break/><text:span text:style-name="T9">return</text:span><text:span text:style-name="T10">;</text:span></text:p>
      <text:p text:style-name="P19">}</text:p>
      <text:p text:style-name="P18"><text:span text:style-name="T10">$</text:span><text:span text:style-name="T11">this</text:span><text:span text:style-name="T10">-&gt;</text:span><text:span text:style-name="T15">renderJsonOk</text:span><text:span text:style-name="T10">($</text:span><text:span text:style-name="T11">this</text:span><text:span text:style-name="T10">-&gt;</text:span><text:span text:style-name="T14">mediaManager</text:span><text:span text:style-name="T10">-&gt;</text:span><text:span text:style-name="T15">isShared</text:span><text:span text:style-name="T10">($</text:span><text:span text:style-name="T14">filePath</text:span><text:span text:style-name="T10">));</text:span></text:p>
      <text:p text:style-name="P19">}</text:p>
      <text:p text:style-name="P19">}</text:p>
      <text:p text:style-name="P17"/>
      <text:p text:style-name="P18"><text:span text:style-name="T9">public</text:span> <text:span text:style-name="T14">function</text:span> <text:span text:style-name="T15">removeFileShare</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Redactor</text:span><text:span text:style-name="T10">()))</text:span> <text:span text:style-name="T10">{</text:span></text:p>
      <text:p text:style-name="P18"><text:span text:style-name="T10">$</text:span><text:span text:style-name="T14">data</text:span> <text:span text:style-name="T10">=</text:span> <text:span text:style-name="T10">$</text:span><text:span text:style-name="T11">this</text:span><text:span text:style-name="T10">-&gt;</text:span><text:span text:style-name="T15">getJsonInput</text:span><text:span text:style-name="T10">();</text:span></text:p>
      <text:p text:style-name="P18"><text:span text:style-name="T10">$</text:span><text:span text:style-name="T14">filePath</text:span> <text:span text:style-name="T10">=</text:span> <text:span text:style-name="T15">trim</text:span><text:span text:style-name="T10">($</text:span><text:span text:style-name="T14">data</text:span><text:span text:style-name="T10">['</text:span><text:span text:style-name="T16">path</text:span><text:span text:style-name="T10">']</text:span> <text:span text:style-name="T10">??</text:span> <text:span text:style-name="T10">'');</text:span></text:p>
      <text:p text:style-name="P18"><text:span text:style-name="T9">if</text:span> <text:span text:style-name="T10">(!$</text:span><text:span text:style-name="T14">filePath</text:span><text:span text:style-name="T10">)</text:span> <text:span text:style-name="T10">{</text:span></text:p>
      <text:p text:style-name="P18"><text:span text:style-name="T10">$</text:span><text:span text:style-name="T11">this</text:span><text:span text:style-name="T10">-&gt;</text:span><text:span text:style-name="T15">renderJsonBadRequest</text:span><text:span text:style-name="T10">('</text:span><text:span text:style-name="T16">Missing path</text:span><text:span text:style-name="T10">',</text:span> <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response</text:span> <text:span text:style-name="T10">=</text:span> <text:span text:style-name="T10">$</text:span><text:span text:style-name="T11">this</text:span><text:span text:style-name="T10">-&gt;</text:span><text:span text:style-name="T14">mediaManager</text:span><text:span text:style-name="T10">-&gt;</text:span><text:span text:style-name="T15">removeFileShare</text:span><text:span text:style-name="T10">($</text:span><text:span text:style-name="T14">filePath</text:span><text:span text:style-name="T10">);</text:span></text:p>
      <text:p text:style-name="P18"><text:span text:style-name="T10">$</text:span><text:span text:style-name="T11">this</text:span><text:span text:style-name="T10">-&gt;</text:span><text:span text:style-name="T15">renderJson</text:span><text:span text:style-name="T10">($</text:span><text:span text:style-name="T14">response</text:span><text:span text:style-name="T10">,</text:span> <text:span text:style-name="T10">$</text:span><text:span text:style-name="T14">response</text:span><text:span text:style-name="T10">['</text:span><text:span text:style-name="T16">success</text:span><text:span text:style-name="T10">'],</text:span> <text:span text:style-name="T10">$</text:span><text:span text:style-name="T14">response</text:span><text:span text:style-name="T10">['</text:span><text:span text:style-name="T16">success</text:span><text:span text:style-name="T10">']</text:span> <text:span text:style-name="T10">?</text:span> <text:span text:style-name="T12">ApplicationError</text:span><text:span text:style-name="T10">::</text:span><text:span text:style-name="T11">Ok</text:span><text:span text:style-name="T10">-&gt;</text:span><text:span text:style-name="T14">value</text:span> <text:span text:style-name="T10">:</text:span> <text:span text:style-name="T12">ApplicationError</text:span><text:span text:style-name="T10">::</text:span><text:span text:style-name="T11">BadRequest</text:span><text:span text:style-name="T10">-&gt;</text:span><text:span text:style-name="T14">value</text:span><text:span text:style-name="T10">);</text:span></text:p>
      <text:p text:style-name="P19">}</text:p>
      <text:p text:style-name="P19">}</text:p>
      <text:p text:style-name="P17"/>
      <text:p text:style-name="P18"><text:span text:style-name="T9">public</text:span> <text:span text:style-name="T14">function</text:span> <text:span text:style-name="T15">shareFile</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Redactor</text:span><text:span text:style-name="T10">()))</text:span> <text:span text:style-name="T10">{</text:span></text:p>
      <text:p text:style-name="P18"><text:span text:style-name="T10">$</text:span><text:span text:style-name="T14">data</text:span> <text:span text:style-name="T10">=</text:span> <text:span text:style-name="T10">$</text:span><text:span text:style-name="T11">this</text:span><text:span text:style-name="T10">-&gt;</text:span><text:span text:style-name="T15">getJsonInput</text:span><text:span text:style-name="T10">();</text:span></text:p>
      <text:p text:style-name="P17"/>
      <text:p text:style-name="P18"><text:span text:style-name="T10">$</text:span><text:span text:style-name="T14">path</text:span> <text:span text:style-name="T10">=</text:span> <text:span text:style-name="T10">$</text:span><text:span text:style-name="T14">data</text:span><text:span text:style-name="T10">['</text:span><text:span text:style-name="T16">path</text:span><text:span text:style-name="T10">']</text:span> <text:span text:style-name="T10">??</text:span> <text:span text:style-name="T11">null</text:span><text:span text:style-name="T10">;</text:span></text:p>
      <text:p text:style-name="P18"><text:span text:style-name="T9">if</text:span> <text:span text:style-name="T10">(!$</text:span><text:span text:style-name="T14">path</text:span><text:span text:style-name="T10">)</text:span> <text:span text:style-name="T10">{</text:span></text:p>
      <text:p text:style-name="P18"><text:span text:style-name="T10">$</text:span><text:span text:style-name="T11">this</text:span><text:span text:style-name="T10">-&gt;</text:span><text:span text:style-name="T15">renderJsonBadRequest</text:span><text:span text:style-name="T10">('</text:span><text:span text:style-name="T16">Missing path</text:span><text:span text:style-name="T10">',</text:span> <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parts</text:span> <text:span text:style-name="T10">=</text:span> <text:span text:style-name="T15">explode</text:span><text:span text:style-name="T10">('</text:span><text:span text:style-name="T16">/</text:span><text:span text:style-name="T10">',</text:span> <text:span text:style-name="T10">$</text:span><text:span text:style-name="T14">path</text:span><text:span text:style-name="T10">);</text:span></text:p>
      <text:p text:style-name="P18"><text:span text:style-name="T9">if</text:span> <text:span text:style-name="T10">(</text:span><text:span text:style-name="T15">count</text:span><text:span text:style-name="T10">($</text:span><text:span text:style-name="T14">parts</text:span><text:span text:style-name="T10">)</text:span> <text:span text:style-name="T10">!==</text:span> <text:span text:style-name="T11">3</text:span><text:span text:style-name="T10">)</text:span> <text:span text:style-name="T10">{</text:span></text:p>
      <text:p text:style-name="P18"><text:span text:style-name="T10">$</text:span><text:span text:style-name="T11">this</text:span><text:span text:style-name="T10">-&gt;</text:span><text:span text:style-name="T15">renderJsonBadRequest</text:span><text:span text:style-name="T10">('</text:span><text:span text:style-name="T16">Invalid path format</text:span><text:span text:style-name="T10">',</text:span> <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year</text:span><text:span text:style-name="T10">,</text:span> <text:span text:style-name="T10">$</text:span><text:span text:style-name="T14">month</text:span><text:span text:style-name="T10">,</text:span> <text:span text:style-name="T10">$</text:span><text:span text:style-name="T14">filename</text:span><text:span text:style-name="T10">]</text:span> <text:span text:style-name="T10">=</text:span> <text:span text:style-name="T10">$</text:span><text:span text:style-name="T14">parts</text:span><text:span text:style-name="T10">;</text:span></text:p>
      <text:p text:style-name="P17"/>
      <text:p text:style-name="P18"><text:span text:style-name="T10">$</text:span><text:span text:style-name="T14">response</text:span> <text:span text:style-name="T10">=</text:span> <text:span text:style-name="T10">$</text:span><text:span text:style-name="T11">this</text:span><text:span text:style-name="T10">-&gt;</text:span><text:span text:style-name="T14">mediaManager</text:span><text:span text:style-name="T10">-&gt;</text:span><text:span text:style-name="T15">sharefile</text:span><text:span text:style-name="T10">(</text:span></text:p>
      <text:p text:style-name="P18"><text:span text:style-name="T10">(</text:span><text:span text:style-name="T14">int</text:span><text:span text:style-name="T10">)$</text:span><text:span text:style-name="T14">year</text:span><text:span text:style-name="T10">,</text:span></text:p>
      <text:p text:style-name="P18"><text:span text:style-name="T10">(</text:span><text:span text:style-name="T14">int</text:span><text:span text:style-name="T10">)$</text:span><text:span text:style-name="T14">month</text:span><text:span text:style-name="T10">,</text:span></text:p>
      <text:p text:style-name="P18"><text:span text:style-name="T10">$</text:span><text:span text:style-name="T14">filename</text:span><text:span text:style-name="T10">,</text:span></text:p>
      <text:p text:style-name="P18"><text:span text:style-name="T12">WebApp</text:span><text:span text:style-name="T10">::</text:span><text:span text:style-name="T15">nullableCast</text:span><text:span text:style-name="T10">($</text:span><text:span text:style-name="T14">data</text:span><text:span text:style-name="T10">['</text:span><text:span text:style-name="T16">idGroup</text:span><text:span text:style-name="T10">']</text:span> <text:span text:style-name="T10">??</text:span> <text:span text:style-name="T11">null</text:span><text:span text:style-name="T10">,</text:span> <text:span text:style-name="T10">'</text:span><text:span text:style-name="T16">int</text:span><text:span text:style-name="T10">'),</text:span></text:p>
      <text:p text:style-name="P18"><text:span text:style-name="T10">$</text:span><text:span text:style-name="T14">data</text:span><text:span text:style-name="T10">['</text:span><text:span text:style-name="T16">membersOnly</text:span><text:span text:style-name="T10">']</text:span></text:p>
      <text:p text:style-name="P19">);</text:p>
      <text:p text:style-name="P17"/>
      <text:p text:style-name="P18"><text:span text:style-name="T10">$</text:span><text:span text:style-name="T11">this</text:span><text:span text:style-name="T10">-&gt;</text:span><text:span text:style-name="T15">renderJson</text:span><text:span text:style-name="T10">(</text:span></text:p>
      <text:p text:style-name="P18"><text:span text:style-name="T10">$</text:span><text:span text:style-name="T14">response</text:span><text:span text:style-name="T10">,</text:span></text:p>
      <text:p text:style-name="P18"><text:span text:style-name="T10">$</text:span><text:span text:style-name="T14">response</text:span><text:span text:style-name="T10">['</text:span><text:span text:style-name="T16">success</text:span><text:span text:style-name="T10">'],</text:span></text:p>
      <text:p text:style-name="P18"><text:span text:style-name="T10">$</text:span><text:span text:style-name="T14">response</text:span><text:span text:style-name="T10">['</text:span><text:span text:style-name="T16">success</text:span><text:span text:style-name="T10">']</text:span> <text:span text:style-name="T10">?</text:span> <text:span text:style-name="T12">ApplicationError</text:span><text:span text:style-name="T10">::</text:span><text:span text:style-name="T11">Ok</text:span><text:span text:style-name="T10">-&gt;</text:span><text:span text:style-name="T14">value</text:span> <text:span text:style-name="T10">:</text:span> <text:span text:style-name="T12">ApplicationError</text:span><text:span text:style-name="T10">::</text:span><text:span text:style-name="T11">BadRequest</text:span><text:span text:style-name="T10">-&gt;</text:span><text:span text:style-name="T14">value</text:span></text:p>
      <text:p text:style-name="P19">);</text:p>
      <text:p text:style-name="P19">}</text:p>
      <text:p text:style-name="P19">}</text:p>
      <text:p text:style-name="P17"/>
      <text:p text:style-name="P18"><text:soft-page-break/><text:span text:style-name="T9">public</text:span> <text:span text:style-name="T14">function</text:span> <text:span text:style-name="T15">uploadFile</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5">userIsAllowedAndMethodIsGood</text:span><text:span text:style-name="T10">('</text:span><text:span text:style-name="T16">POST</text:span><text:span text:style-name="T10">',</text:span> <text:span text:style-name="T14">fn</text:span><text:span text:style-name="T10">($</text:span><text:span text:style-name="T14">u</text:span><text:span text:style-name="T10">)</text:span> <text:span text:style-name="T10">=&gt;</text:span> <text:span text:style-name="T10">$</text:span><text:span text:style-name="T14">u</text:span><text:span text:style-name="T10">-&gt;</text:span><text:span text:style-name="T15">isRedactor</text:span><text:span text:style-name="T10">()))</text:span> <text:span text:style-name="T10">{</text:span></text:p>
      <text:p text:style-name="P17"/>
      <text:p text:style-name="P18"><text:span text:style-name="T9">if</text:span> <text:span text:style-name="T10">(</text:span><text:span text:style-name="T15">empty</text:span><text:span text:style-name="T10">($</text:span><text:span text:style-name="T14">_FILES</text:span><text:span text:style-name="T10">['</text:span><text:span text:style-name="T16">file</text:span><text:span text:style-name="T10">']))</text:span> <text:span text:style-name="T10">{</text:span></text:p>
      <text:p text:style-name="P18"><text:span text:style-name="T10">$</text:span><text:span text:style-name="T11">this</text:span><text:span text:style-name="T10">-&gt;</text:span><text:span text:style-name="T15">renderJson</text:span><text:span text:style-name="T10">(['</text:span><text:span text:style-name="T16">message</text:span><text:span text:style-name="T10">'</text:span> <text:span text:style-name="T10">=&gt;</text:span> <text:span text:style-name="T10">'</text:span><text:span text:style-name="T16">Aucun fichier sélectionné</text:span><text:span text:style-name="T10">'],</text:span> <text:span text:style-name="T11">false</text:span><text:span text:style-name="T10">,</text:span> <text:span text:style-name="T12">ApplicationError</text:span><text:span text:style-name="T10">::</text:span><text:span text:style-name="T11">Ok</text:span><text:span text:style-name="T10">-&gt;</text:span><text:span text:style-name="T14">value</text:span><text:span text:style-name="T10">);</text:span></text:p>
      <text:p text:style-name="P18"><text:span text:style-name="T9">return</text:span><text:span text:style-name="T10">;</text:span></text:p>
      <text:p text:style-name="P19">}</text:p>
      <text:p text:style-name="P18"><text:span text:style-name="T10">$</text:span><text:span text:style-name="T14">file</text:span> <text:span text:style-name="T10">=</text:span> <text:span text:style-name="T10">$</text:span><text:span text:style-name="T14">_FILES</text:span><text:span text:style-name="T10">['</text:span><text:span text:style-name="T16">file</text:span><text:span text:style-name="T10">'];</text:span></text:p>
      <text:p text:style-name="P18"><text:span text:style-name="T9">if</text:span> <text:span text:style-name="T10">($</text:span><text:span text:style-name="T14">file</text:span><text:span text:style-name="T10">['</text:span><text:span text:style-name="T16">error</text:span><text:span text:style-name="T10">']</text:span> <text:span text:style-name="T10">!==</text:span> <text:span text:style-name="T11">UPLOAD_ERR_OK</text:span><text:span text:style-name="T10">)</text:span> <text:span text:style-name="T10">{</text:span></text:p>
      <text:p text:style-name="P18"><text:span text:style-name="T10">$</text:span><text:span text:style-name="T14">response</text:span> <text:span text:style-name="T10">=</text:span> <text:span text:style-name="T10">['</text:span><text:span text:style-name="T16">message</text:span><text:span text:style-name="T10">'</text:span> <text:span text:style-name="T10">=&gt;</text:span> <text:span text:style-name="T10">"</text:span><text:span text:style-name="T16">Erreur lors de l'upload: </text:span><text:span text:style-name="T10">"</text:span> <text:span text:style-name="T10">.</text:span> <text:span text:style-name="T10">$</text:span><text:span text:style-name="T11">this</text:span><text:span text:style-name="T10">-&gt;</text:span><text:span text:style-name="T15">getUploadErrorMessage</text:span><text:span text:style-name="T10">($</text:span><text:span text:style-name="T14">file</text:span><text:span text:style-name="T10">['</text:span><text:span text:style-name="T16">error</text:span><text:span text:style-name="T10">'])];</text:span></text:p>
      <text:p text:style-name="P18"><text:span text:style-name="T10">$</text:span><text:span text:style-name="T11">this</text:span><text:span text:style-name="T10">-&gt;</text:span><text:span text:style-name="T15">renderJsonOk</text:span><text:span text:style-name="T10">($</text:span><text:span text:style-name="T14">response</text:span><text:span text:style-name="T10">);</text:span></text:p>
      <text:p text:style-name="P18"><text:span text:style-name="T9">return</text:span><text:span text:style-name="T10">;</text:span></text:p>
      <text:p text:style-name="P19">}</text:p>
      <text:p text:style-name="P18"><text:span text:style-name="T9">try</text:span> <text:span text:style-name="T10">{</text:span></text:p>
      <text:p text:style-name="P18"><text:span text:style-name="T10">$</text:span><text:span text:style-name="T14">data</text:span> <text:span text:style-name="T10">=</text:span> <text:span text:style-name="T10">$</text:span><text:span text:style-name="T11">this</text:span><text:span text:style-name="T10">-&gt;</text:span><text:span text:style-name="T14">mediaManager</text:span><text:span text:style-name="T10">-&gt;</text:span><text:span text:style-name="T15">uploadFile</text:span><text:span text:style-name="T10">($</text:span><text:span text:style-name="T14">file</text:span><text:span text:style-name="T10">);</text:span></text:p>
      <text:p text:style-name="P18"><text:span text:style-name="T10">$</text:span><text:span text:style-name="T11">this</text:span><text:span text:style-name="T10">-&gt;</text:span><text:span text:style-name="T15">renderJsonOk</text:span><text:span text:style-name="T10">($</text:span><text:span text:style-name="T14">data</text:span><text:span text:style-name="T10">,</text:span> <text:span text:style-name="T10">'</text:span><text:span text:style-name="T16">Fichier uploadé avec succès</text:span><text:span text:style-name="T10">');</text:span></text:p>
      <text:p text:style-name="P18"><text:span text:style-name="T10">}</text:span> <text:span text:style-name="T9">catch</text:span> <text:span text:style-name="T10">(</text:span><text:span text:style-name="T12">Throwable</text:span> <text:span text:style-name="T10">$</text:span><text:span text:style-name="T14">e</text:span><text:span text:style-name="T10">)</text:span> <text:span text:style-name="T10">{</text:span></text:p>
      <text:p text:style-name="P18"><text:span text:style-name="T10">$</text:span><text:span text:style-name="T11">this</text:span><text:span text:style-name="T10">-&gt;</text:span><text:span text:style-name="T15">renderJson</text:span><text:span text:style-name="T10">(</text:span></text:p>
      <text:p text:style-name="P19">[],</text:p>
      <text:p text:style-name="P18"><text:span text:style-name="T11">false</text:span><text:span text:style-name="T10">,</text:span></text:p>
      <text:p text:style-name="P18"><text:span text:style-name="T12">ApplicationError</text:span><text:span text:style-name="T10">::</text:span><text:span text:style-name="T11">Error</text:span><text:span text:style-name="T10">-&gt;</text:span><text:span text:style-name="T14">value</text:span><text:span text:style-name="T10">,</text:span></text:p>
      <text:p text:style-name="P18"><text:span text:style-name="T10">$</text:span><text:span text:style-name="T14">e</text:span><text:span text:style-name="T10">-&gt;</text:span><text:span text:style-name="T15">getMessage</text:span><text:span text:style-name="T10">()</text:span></text:p>
      <text:p text:style-name="P19">);</text:p>
      <text:p text:style-name="P19">}</text:p>
      <text:p text:style-name="P19">}</text:p>
      <text:p text:style-name="P19">}</text:p>
      <text:p text:style-name="P17"/>
      <text:p text:style-name="P54">#region private methods</text:p>
      <text:p text:style-name="P18"><text:span text:style-name="T9">private</text:span> <text:span text:style-name="T14">function</text:span> <text:span text:style-name="T15">getUploadErrorMessage</text:span><text:span text:style-name="T10">(</text:span><text:span text:style-name="T9">int</text:span> <text:span text:style-name="T10">$</text:span><text:span text:style-name="T14">error</text:span><text:span text:style-name="T10">)</text:span></text:p>
      <text:p text:style-name="P19">{</text:p>
      <text:p text:style-name="P18"><text:span text:style-name="T9">switch</text:span> <text:span text:style-name="T10">($</text:span><text:span text:style-name="T14">error</text:span><text:span text:style-name="T10">)</text:span> <text:span text:style-name="T10">{</text:span></text:p>
      <text:p text:style-name="P18"><text:span text:style-name="T9">case</text:span> <text:span text:style-name="T11">UPLOAD_ERR_INI_SIZE</text:span><text:span text:style-name="T10">:</text:span></text:p>
      <text:p text:style-name="P18"><text:span text:style-name="T9">return</text:span> <text:span text:style-name="T10">'</text:span><text:span text:style-name="T16">Le fichier dépasse la taille maximale autorisée par PHP</text:span><text:span text:style-name="T10">';</text:span></text:p>
      <text:p text:style-name="P18"><text:span text:style-name="T9">case</text:span> <text:span text:style-name="T11">UPLOAD_ERR_FORM_SIZE</text:span><text:span text:style-name="T10">:</text:span></text:p>
      <text:p text:style-name="P18"><text:span text:style-name="T9">return</text:span> <text:span text:style-name="T10">'</text:span><text:span text:style-name="T16">Le fichier dépasse la taille maximale autorisée par le formulaire</text:span><text:span text:style-name="T10">';</text:span></text:p>
      <text:p text:style-name="P18"><text:span text:style-name="T9">case</text:span> <text:span text:style-name="T11">UPLOAD_ERR_PARTIAL</text:span><text:span text:style-name="T10">:</text:span></text:p>
      <text:p text:style-name="P18"><text:span text:style-name="T9">return</text:span> <text:span text:style-name="T10">'</text:span><text:span text:style-name="T16">Le fichier n</text:span><text:span text:style-name="T10">\'</text:span><text:span text:style-name="T16">a été que partiellement uploadé</text:span><text:span text:style-name="T10">';</text:span></text:p>
      <text:p text:style-name="P18"><text:span text:style-name="T9">case</text:span> <text:span text:style-name="T11">UPLOAD_ERR_NO_FILE</text:span><text:span text:style-name="T10">:</text:span></text:p>
      <text:p text:style-name="P18"><text:span text:style-name="T9">return</text:span> <text:span text:style-name="T10">'</text:span><text:span text:style-name="T16">Aucun fichier n</text:span><text:span text:style-name="T10">\'</text:span><text:span text:style-name="T16">a été uploadé</text:span><text:span text:style-name="T10">';</text:span></text:p>
      <text:p text:style-name="P18"><text:span text:style-name="T9">case</text:span> <text:span text:style-name="T11">UPLOAD_ERR_NO_TMP_DIR</text:span><text:span text:style-name="T10">:</text:span></text:p>
      <text:p text:style-name="P18"><text:span text:style-name="T9">return</text:span> <text:span text:style-name="T10">'</text:span><text:span text:style-name="T16">Dossier temporaire manquant</text:span><text:span text:style-name="T10">';</text:span></text:p>
      <text:p text:style-name="P18"><text:span text:style-name="T9">case</text:span> <text:span text:style-name="T11">UPLOAD_ERR_CANT_WRITE</text:span><text:span text:style-name="T10">:</text:span></text:p>
      <text:p text:style-name="P18"><text:span text:style-name="T9">return</text:span> <text:span text:style-name="T10">'</text:span><text:span text:style-name="T16">Échec d</text:span><text:span text:style-name="T10">\'</text:span><text:span text:style-name="T16">écriture du fichier sur le disque</text:span><text:span text:style-name="T10">';</text:span></text:p>
      <text:p text:style-name="P18"><text:span text:style-name="T9">case</text:span> <text:span text:style-name="T11">UPLOAD_ERR_EXTENSION</text:span><text:span text:style-name="T10">:</text:span></text:p>
      <text:p text:style-name="P18"><text:span text:style-name="T9">return</text:span> <text:span text:style-name="T10">'</text:span><text:span text:style-name="T16">Upload arrêté par extension</text:span><text:span text:style-name="T10">';</text:span></text:p>
      <text:p text:style-name="P18"><text:span text:style-name="T9">default</text:span><text:span text:style-name="T10">:</text:span></text:p>
      <text:p text:style-name="P18"><text:span text:style-name="T9">return</text:span> <text:span text:style-name="T10">'</text:span><text:span text:style-name="T16">Erreur inconnue</text:span><text:span text:style-name="T10">';</text:span></text:p>
      <text:p text:style-name="P19">}</text:p>
      <text:p text:style-name="P19">}</text:p>
      <text:p text:style-name="P54">#endregion</text:p>
      <text:p text:style-name="P19">}</text:p>
      <text:p text:style-name="P49"/>
      <text:p text:style-name="P55">L’ensemble des exercices est stocké dans un article. Pour le controleur sur baser sur ces fonctions</text:p>
      <text:p text:style-name="P56"><text:soft-page-break/><text:span text:style-name="T9">public</text:span> <text:span text:style-name="T14">function</text:span> <text:span text:style-name="T15">create</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isRedactor</text:span><text:span text:style-name="T10">()</text:span> <text:span text:style-name="T10">??</text:span> <text:span text:style-name="T11">false</text:span><text:span text:style-name="T10">))</text:span> <text:span text:style-name="T10">{</text:span></text:p>
      <text:p text:style-name="P18"><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6">GET</text:span><text:span text:style-name="T10">')</text:span> <text:span text:style-name="T10">{</text:span></text:p>
      <text:p text:style-name="P18"><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7"/>
      <text:p text:style-name="P18"><text:span text:style-name="T10">$</text:span><text:span text:style-name="T14">userId</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4">person</text:span><text:span text:style-name="T10">-&gt;</text:span><text:span text:style-name="T14">Id</text:span></text:p>
      <text:p text:style-name="P18"><text:span text:style-name="T10">??</text:span> <text:span text:style-name="T9">throw</text:span> <text:span text:style-name="T9">new</text:span> <text:span text:style-name="T12">IntegrityException</text:span><text:span text:style-name="T10">('</text:span><text:span text:style-name="T16">Fatal error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P17"/>
      <text:p text:style-name="P18"><text:span text:style-name="T10">$</text:span><text:span text:style-name="T14">articleId</text:span> <text:span text:style-name="T10">=</text:span> <text:span text:style-name="T10">$</text:span><text:span text:style-name="T11">this</text:span><text:span text:style-name="T10">-&gt;</text:span><text:span text:style-name="T14">articleService</text:span><text:span text:style-name="T10">-&gt;</text:span><text:span text:style-name="T15">createWithMedia</text:span><text:span text:style-name="T10">($</text:span><text:span text:style-name="T14">userId</text:span><text:span text:style-name="T10">);</text:span></text:p>
      <text:p text:style-name="P17"/>
      <text:p text:style-name="P18"><text:span text:style-name="T10">$</text:span><text:span text:style-name="T11">this</text:span><text:span text:style-name="T10">-&gt;</text:span><text:span text:style-name="T15">redirect</text:span><text:span text:style-name="T10">('</text:span><text:span text:style-name="T16">/article/edit/</text:span><text:span text:style-name="T10">'</text:span> <text:span text:style-name="T10">.</text:span> <text:span text:style-name="T10">$</text:span><text:span text:style-name="T14">articleId</text:span><text:span text:style-name="T10">);</text:span></text:p>
      <text:p text:style-name="P19">}</text:p>
      <text:p text:style-name="P55"/>
      <text:p text:style-name="P56"><text:span text:style-name="T9">public</text:span> <text:span text:style-name="T14">function</text:span> <text:span text:style-name="T15">update</text:span><text:span text:style-name="T10">(</text:span><text:span text:style-name="T9">int</text:span> <text:span text:style-name="T10">$</text:span><text:span text:style-name="T14">id</text:span><text:span text:style-name="T10">):</text:span> <text:span text:style-name="T9">void</text:span></text:p>
      <text:p text:style-name="P19">{</text:p>
      <text:p text:style-name="P18"><text:span text:style-name="T9">if</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5">isRedactor</text:span><text:span text:style-name="T10">()</text:span> <text:span text:style-name="T10">||</text:span> <text:span text:style-name="T11">false</text:span><text:span text:style-name="T10">))</text:span> <text:span text:style-name="T10">{</text:span></text:p>
      <text:p text:style-name="P18"><text:span text:style-name="T10">$</text:span><text:span text:style-name="T11">this</text:span><text:span text:style-name="T10">-&gt;</text:span><text:span text:style-name="T15">raiseForbidden</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9">if</text:span> <text:span text:style-name="T10">($</text:span><text:span text:style-name="T14">_SERVER</text:span><text:span text:style-name="T10">['</text:span><text:span text:style-name="T16">REQUEST_METHOD</text:span><text:span text:style-name="T10">']</text:span> <text:span text:style-name="T10">!==</text:span> <text:span text:style-name="T10">'</text:span><text:span text:style-name="T16">POST</text:span><text:span text:style-name="T10">')</text:span> <text:span text:style-name="T10">{</text:span></text:p>
      <text:p text:style-name="P18"><text:span text:style-name="T10">$</text:span><text:span text:style-name="T11">this</text:span><text:span text:style-name="T10">-&gt;</text:span><text:span text:style-name="T15">raiseMethodNotAllowed</text:span><text:span text:style-name="T10">(</text:span><text:span text:style-name="T11">__FILE__</text:span><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article</text:span> <text:span text:style-name="T10">=</text:span> <text:span text:style-name="T10">$</text:span><text:span text:style-name="T11">this</text:span><text:span text:style-name="T10">-&gt;</text:span><text:span text:style-name="T14">articleDataHelper</text:span><text:span text:style-name="T10">-&gt;</text:span><text:span text:style-name="T15">getLatestArticle</text:span><text:span text:style-name="T10">([$</text:span><text:span text:style-name="T14">id</text:span><text:span text:style-name="T10">]);</text:span></text:p>
      <text:p text:style-name="P18"><text:span text:style-name="T9">if</text:span> <text:span text:style-name="T10">(!$</text:span><text:span text:style-name="T14">article</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4">person</text:span><text:span text:style-name="T10">?-&gt;</text:span><text:span text:style-name="T14">Id</text:span> <text:span text:style-name="T10">??</text:span> <text:span text:style-name="T11">0</text:span><text:span text:style-name="T10">)</text:span> <text:span text:style-name="T10">!=</text:span> <text:span text:style-name="T10">$</text:span><text:span text:style-name="T14">article</text:span><text:span text:style-name="T10">-&gt;</text:span><text:span text:style-name="T14">CreatedBy</text:span><text:span text:style-name="T10">)</text:span> <text:span text:style-name="T10">{</text:span></text:p>
      <text:p text:style-name="P18"><text:span text:style-name="T10">$</text:span><text:span text:style-name="T11">this</text:span><text:span text:style-name="T10">-&gt;</text:span><text:span text:style-name="T14">application</text:span><text:span text:style-name="T10">-&gt;</text:span><text:span text:style-name="T15">getErrorManager</text:span><text:span text:style-name="T10">()-&gt;</text:span><text:span text:style-name="T15">raise</text:span><text:span text:style-name="T10">(</text:span><text:span text:style-name="T12">ApplicationError</text:span><text:span text:style-name="T10">::</text:span><text:span text:style-name="T11">Forbidden</text:span><text:span text:style-name="T10">,</text:span> <text:span text:style-name="T10">'</text:span><text:span text:style-name="T16">Page not allowed in file </text:span><text:span text:style-name="T10">'</text:span> <text:span text:style-name="T10">.</text:span> <text:span text:style-name="T11">__FILE__</text:span> <text:span text:style-name="T10">.</text:span> <text:span text:style-name="T10">'</text:span><text:span text:style-name="T16"> at line </text:span><text:span text:style-name="T10">'</text:span> <text:span text:style-name="T10">.</text:span> <text:span text:style-name="T11">__LINE__</text:span><text:span text:style-name="T10">);</text:span></text:p>
      <text:p text:style-name="P18"><text:span text:style-name="T9">return</text:span><text:span text:style-name="T10">;</text:span></text:p>
      <text:p text:style-name="P19">}</text:p>
      <text:p text:style-name="P18"><text:span text:style-name="T10">$</text:span><text:span text:style-name="T14">schema</text:span> <text:span text:style-name="T10">=</text:span> <text:span text:style-name="T10">[</text:span></text:p>
      <text:p text:style-name="P18"><text:span text:style-name="T10">'</text:span><text:span text:style-name="T16">title</text:span><text:span text:style-name="T10">'</text:span> <text:span text:style-name="T10">=&gt;</text:span> <text:span text:style-name="T12">FilterInputRule</text:span><text:span text:style-name="T10">::</text:span><text:span text:style-name="T11">HtmlSafeName</text:span><text:span text:style-name="T10">-&gt;</text:span><text:span text:style-name="T14">value</text:span><text:span text:style-name="T10">,</text:span></text:p>
      <text:p text:style-name="P18"><text:span text:style-name="T10">'</text:span><text:span text:style-name="T16">content</text:span><text:span text:style-name="T10">'</text:span> <text:span text:style-name="T10">=&gt;</text:span> <text:span text:style-name="T12">FilterInputRule</text:span><text:span text:style-name="T10">::</text:span><text:span text:style-name="T11">Html</text:span><text:span text:style-name="T10">-&gt;</text:span><text:span text:style-name="T14">value</text:span><text:span text:style-name="T10">,</text:span></text:p>
      <text:p text:style-name="P18"><text:span text:style-name="T10">'</text:span><text:span text:style-name="T16">published</text:span><text:span text:style-name="T10">'</text:span> <text:span text:style-name="T10">=&gt;</text:span> <text:span text:style-name="T12">FilterInputRule</text:span><text:span text:style-name="T10">::</text:span><text:span text:style-name="T11">Int</text:span><text:span text:style-name="T10">-&gt;</text:span><text:span text:style-name="T14">value</text:span><text:span text:style-name="T10">,</text:span></text:p>
      <text:p text:style-name="P18"><text:span text:style-name="T10">'</text:span><text:span text:style-name="T16">idGroup</text:span><text:span text:style-name="T10">'</text:span> <text:span text:style-name="T10">=&gt;</text:span> <text:span text:style-name="T12">FilterInputRule</text:span><text:span text:style-name="T10">::</text:span><text:span text:style-name="T11">Int</text:span><text:span text:style-name="T10">-&gt;</text:span><text:span text:style-name="T14">value</text:span><text:span text:style-name="T10">,</text:span></text:p>
      <text:p text:style-name="P18"><text:span text:style-name="T10">'</text:span><text:span text:style-name="T16">membersOnly</text:span><text:span text:style-name="T10">'</text:span> <text:span text:style-name="T10">=&gt;</text:span> <text:span text:style-name="T12">FilterInputRule</text:span><text:span text:style-name="T10">::</text:span><text:span text:style-name="T11">Int</text:span><text:span text:style-name="T10">-&gt;</text:span><text:span text:style-name="T14">value</text:span><text:span text:style-name="T10">,</text:span></text:p>
      <text:p text:style-name="P19">];</text:p>
      <text:p text:style-name="P18"><text:span text:style-name="T10">$</text:span><text:span text:style-name="T14">input</text:span> <text:span text:style-name="T10">=</text:span> <text:span text:style-name="T12">WebApp</text:span><text:span text:style-name="T10">::</text:span><text:span text:style-name="T15">filterInput</text:span><text:span text:style-name="T10">($</text:span><text:span text:style-name="T14">schema</text:span><text:span text:style-name="T10">,</text:span> <text:span text:style-name="T10">$</text:span><text:span text:style-name="T11">this</text:span><text:span text:style-name="T10">-&gt;</text:span><text:span text:style-name="T14">flight</text:span><text:span text:style-name="T10">-&gt;</text:span><text:span text:style-name="T15">request</text:span><text:span text:style-name="T10">()-&gt;</text:span><text:span text:style-name="T14">data</text:span><text:span text:style-name="T10">-&gt;</text:span><text:span text:style-name="T15">getData</text:span><text:span text:style-name="T10">());</text:span></text:p>
      <text:p text:style-name="P18"><text:span text:style-name="T10">$</text:span><text:span text:style-name="T14">title</text:span> <text:span text:style-name="T10">=</text:span> <text:span text:style-name="T10">$</text:span><text:span text:style-name="T14">input</text:span><text:span text:style-name="T10">['</text:span><text:span text:style-name="T16">title</text:span><text:span text:style-name="T10">']</text:span> <text:span text:style-name="T10">??</text:span> <text:span text:style-name="T10">'</text:span><text:span text:style-name="T16">???</text:span><text:span text:style-name="T10">';</text:span></text:p>
      <text:p text:style-name="P18"><text:span text:style-name="T10">$</text:span><text:span text:style-name="T14">content</text:span> <text:span text:style-name="T10">=</text:span> <text:span text:style-name="T10">$</text:span><text:span text:style-name="T14">input</text:span><text:span text:style-name="T10">['</text:span><text:span text:style-name="T16">content</text:span><text:span text:style-name="T10">']</text:span> <text:span text:style-name="T10">??</text:span> <text:span text:style-name="T10">'</text:span><text:span text:style-name="T16">???</text:span><text:span text:style-name="T10">';</text:span></text:p>
      <text:p text:style-name="P18"><text:span text:style-name="T9">if</text:span> <text:span text:style-name="T10">(</text:span><text:span text:style-name="T15">empty</text:span><text:span text:style-name="T10">($</text:span><text:span text:style-name="T14">title</text:span><text:span text:style-name="T10">)</text:span> <text:span text:style-name="T10">||</text:span> <text:span text:style-name="T15">empty</text:span><text:span text:style-name="T10">($</text:span><text:span text:style-name="T14">content</text:span><text:span text:style-name="T10">))</text:span> <text:span text:style-name="T10">{</text:span></text:p>
      <text:p text:style-name="P18"><text:span text:style-name="T10">$</text:span><text:span text:style-name="T14">_SESSION</text:span><text:span text:style-name="T10">['</text:span><text:span text:style-name="T16">error</text:span><text:span text:style-name="T10">']</text:span> <text:span text:style-name="T10">=</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6">article.error.title_content_required</text:span><text:span text:style-name="T10">');</text:span></text:p>
      <text:p text:style-name="P18"><text:span text:style-name="T10">$</text:span><text:span text:style-name="T11">this</text:span><text:span text:style-name="T10">-&gt;</text:span><text:span text:style-name="T15">redirect</text:span><text:span text:style-name="T10">('/</text:span><text:span text:style-name="T9">article</text:span><text:span text:style-name="T10">/'</text:span> <text:span text:style-name="T10">.</text:span> <text:span text:style-name="T10">$</text:span><text:span text:style-name="T14">id</text:span><text:span text:style-name="T10">);</text:span></text:p>
      <text:p text:style-name="P18"><text:span text:style-name="T9">return</text:span><text:span text:style-name="T10">;</text:span></text:p>
      <text:p text:style-name="P19">}</text:p>
      <text:p text:style-name="P18"><text:span text:style-name="T10">$</text:span><text:span text:style-name="T14">result</text:span> <text:span text:style-name="T10">=</text:span> <text:span text:style-name="T10">$</text:span><text:span text:style-name="T11">this</text:span><text:span text:style-name="T10">-&gt;</text:span><text:span text:style-name="T14">dataHelper</text:span><text:span text:style-name="T10">-&gt;</text:span><text:span text:style-name="T15">set</text:span><text:span text:style-name="T10">('</text:span><text:span text:style-name="T16">Article</text:span><text:span text:style-name="T10">',</text:span> <text:span text:style-name="T10">[</text:span></text:p>
      <text:p text:style-name="P18"><text:span text:style-name="T10">'</text:span><text:span text:style-name="T16">Title</text:span><text:span text:style-name="T10">'</text:span> <text:span text:style-name="T10">=&gt;</text:span> <text:span text:style-name="T10">$</text:span><text:span text:style-name="T14">title</text:span><text:span text:style-name="T10">,</text:span></text:p>
      <text:p text:style-name="P18"><text:span text:style-name="T10">'</text:span><text:span text:style-name="T16">Content</text:span><text:span text:style-name="T10">'</text:span> <text:span text:style-name="T10">=&gt;</text:span> <text:span text:style-name="T10">$</text:span><text:span text:style-name="T14">content</text:span><text:span text:style-name="T10">,</text:span></text:p>
      <text:p text:style-name="P18"><text:span text:style-name="T10">'</text:span><text:span text:style-name="T16">PublishedBy</text:span><text:span text:style-name="T10">'</text:span> <text:span text:style-name="T10">=&gt;</text:span> <text:span text:style-name="T10">$</text:span><text:span text:style-name="T14">input</text:span><text:span text:style-name="T10">['</text:span><text:span text:style-name="T16">published</text:span><text:span text:style-name="T10">']</text:span> <text:span text:style-name="T10">==</text:span> <text:span text:style-name="T11">1</text:span> <text:span text:style-name="T10">?</text:span> <text:span text:style-name="T10">$</text:span><text:span text:style-name="T11">this</text:span><text:span text:style-name="T10">-&gt;</text:span><text:span text:style-name="T14">application</text:span><text:span text:style-name="T10">-&gt;</text:span><text:span text:style-name="T15">getConnectedUser</text:span><text:span text:style-name="T10">()-&gt;</text:span><text:span text:style-name="T14">person</text:span><text:span text:style-name="T10">-&gt;</text:span><text:span text:style-name="T14">Id</text:span> <text:span text:style-name="T10">:</text:span> <text:span text:style-name="T11">null</text:span><text:span text:style-name="T10">,</text:span></text:p>
      <text:p text:style-name="P18"><text:soft-page-break/><text:span text:style-name="T10">'</text:span><text:span text:style-name="T16">IdGroup</text:span><text:span text:style-name="T10">'</text:span> <text:span text:style-name="T10">=&gt;</text:span> <text:span text:style-name="T10">$</text:span><text:span text:style-name="T14">input</text:span><text:span text:style-name="T10">['</text:span><text:span text:style-name="T16">idGroup</text:span><text:span text:style-name="T10">'],</text:span></text:p>
      <text:p text:style-name="P18"><text:span text:style-name="T10">'</text:span><text:span text:style-name="T16">OnlyForMembers</text:span><text:span text:style-name="T10">'</text:span> <text:span text:style-name="T10">=&gt;</text:span> <text:span text:style-name="T10">$</text:span><text:span text:style-name="T14">input</text:span><text:span text:style-name="T10">['</text:span><text:span text:style-name="T16">membersOnly</text:span><text:span text:style-name="T10">']</text:span> <text:span text:style-name="T10">??</text:span> <text:span text:style-name="T11">0</text:span><text:span text:style-name="T10">,</text:span></text:p>
      <text:p text:style-name="P18"><text:span text:style-name="T10">'</text:span><text:span text:style-name="T16">LastUpdate</text:span><text:span text:style-name="T10">'</text:span> <text:span text:style-name="T10">=&gt;</text:span> <text:span text:style-name="T15">date</text:span><text:span text:style-name="T10">('</text:span><text:span text:style-name="T16">Y-m-d H:i:s</text:span><text:span text:style-name="T10">')</text:span></text:p>
      <text:p text:style-name="P18"><text:span text:style-name="T10">],</text:span> <text:span text:style-name="T10">['</text:span><text:span text:style-name="T16">Id</text:span><text:span text:style-name="T10">'</text:span> <text:span text:style-name="T10">=&gt;</text:span> <text:span text:style-name="T10">$</text:span><text:span text:style-name="T14">id</text:span><text:span text:style-name="T10">]);</text:span></text:p>
      <text:p text:style-name="P18"><text:span text:style-name="T9">if</text:span> <text:span text:style-name="T10">($</text:span><text:span text:style-name="T14">result</text:span><text:span text:style-name="T10">)</text:span> <text:span text:style-name="T10">{</text:span></text:p>
      <text:p text:style-name="P18"><text:span text:style-name="T10">$</text:span><text:span text:style-name="T14">_SESSION</text:span><text:span text:style-name="T10">['</text:span><text:span text:style-name="T16">success</text:span><text:span text:style-name="T10">']</text:span> <text:span text:style-name="T10">=</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6">article.success.updated</text:span><text:span text:style-name="T10">');</text:span></text:p>
      <text:p text:style-name="P18"><text:span text:style-name="T10">$</text:span><text:span text:style-name="T11">this</text:span><text:span text:style-name="T10">-&gt;</text:span><text:span text:style-name="T14">backup</text:span><text:span text:style-name="T10">-&gt;</text:span><text:span text:style-name="T15">save</text:span><text:span text:style-name="T10">();</text:span></text:p>
      <text:p text:style-name="P18"><text:span text:style-name="T10">}</text:span> <text:span text:style-name="T9">else</text:span> <text:span text:style-name="T10">$</text:span><text:span text:style-name="T14">_SESSION</text:span><text:span text:style-name="T10">['</text:span><text:span text:style-name="T16">error</text:span><text:span text:style-name="T10">']</text:span> <text:span text:style-name="T10">=</text:span> <text:span text:style-name="T10">$</text:span><text:span text:style-name="T11">this</text:span><text:span text:style-name="T10">-&gt;</text:span><text:span text:style-name="T14">languagesDataHelper</text:span><text:span text:style-name="T10">-&gt;</text:span><text:span text:style-name="T15">translate</text:span><text:span text:style-name="T10">('</text:span><text:span text:style-name="T16">article.error.update_failed</text:span><text:span text:style-name="T10">');</text:span></text:p>
      <text:p text:style-name="P18"><text:span text:style-name="T10">$</text:span><text:span text:style-name="T11">this</text:span><text:span text:style-name="T10">-&gt;</text:span><text:span text:style-name="T15">redirect</text:span><text:span text:style-name="T10">('/</text:span><text:span text:style-name="T9">article</text:span><text:span text:style-name="T10">/'</text:span> <text:span text:style-name="T10">.</text:span> <text:span text:style-name="T10">$</text:span><text:span text:style-name="T14">id</text:span><text:span text:style-name="T10">);</text:span></text:p>
      <text:p text:style-name="P19">}</text:p>
      <text:p text:style-name="P55"/>
      <text:h text:style-name="P57" text:outline-level="1">Last</text:h>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23H50M</meta:editing-duration>
    <meta:editing-cycles>152</meta:editing-cycles>
    <meta:generator>LibreOffice/25.2.3.2$Linux_X86_64 LibreOffice_project/520$Build-2</meta:generator>
    <dc:title>Technical</dc:title>
    <dc:date>2026-05-07T11:57:20.916419096</dc:date>
    <meta:document-statistic meta:table-count="4" meta:image-count="0" meta:object-count="0" meta:page-count="71" meta:paragraph-count="3215" meta:word-count="11444" meta:character-count="108813" meta:non-whitespace-character-count="99555"/>
    <meta:template xlink:type="simple" xlink:actuate="onRequest" xlink:title="Technical" xlink:href="../../../../../.config/libreoffice/4/user/template/Technical.ott" meta:date="2025-01-03T07:52:16.606689178"/>
  </office:meta>
</office:document-meta>
</file>